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d_us_d" table:style-name="ta1">
        <table:shapes>
          <draw:frame draw:z-index="0" draw:style-name="gr1" draw:text-style-name="P1" svg:width="6.2965in" svg:height="4.6697in" svg:x="4.6622in" svg:y="1.1142in">
            <draw:object draw:notify-on-update-of-ranges="schd_us_d.A1:schd_us_d.A1 schd_us_d.A2:schd_us_d.A733 schd_us_d.B1:schd_us_d.B1 schd_us_d.B2:schd_us_d.B733 schd_us_d.D1:schd_us_d.D1 schd_us_d.D2:schd_us_d.D733 schd_us_d.E1:schd_us_d.E1 schd_us_d.E2:schd_us_d.E7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50MA</text:p>
          </table:table-cell>
          <table:table-cell office:value-type="string" calcext:value-type="string">
            <text:p>100MA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25.3223" calcext:value-type="float">
            <text:p>25.3223</text:p>
          </table:table-cell>
          <table:table-cell office:value-type="float" office:value="6045698.9469571" calcext:value-type="float">
            <text:p>6045698.9469571</text:p>
          </table:table-cell>
          <table:table-cell table:number-columns-repeated="2"/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25.3126" calcext:value-type="float">
            <text:p>25.3126</text:p>
          </table:table-cell>
          <table:table-cell office:value-type="float" office:value="11577632.518223" calcext:value-type="float">
            <text:p>11577632.518223</text:p>
          </table:table-cell>
          <table:table-cell table:number-columns-repeated="2"/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25.2899" calcext:value-type="float">
            <text:p>25.2899</text:p>
          </table:table-cell>
          <table:table-cell office:value-type="float" office:value="6843761.600345" calcext:value-type="float">
            <text:p>6843761.600345</text:p>
          </table:table-cell>
          <table:table-cell table:number-columns-repeated="2"/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25.2283" calcext:value-type="float">
            <text:p>25.2283</text:p>
          </table:table-cell>
          <table:table-cell office:value-type="float" office:value="6372355.3859543" calcext:value-type="float">
            <text:p>6372355.3859543</text:p>
          </table:table-cell>
          <table:table-cell table:number-columns-repeated="2"/>
        </table:table-row>
        <table:table-row table:style-name="ro1">
          <table:table-cell office:value-type="date" office:date-value="2024-06-08" calcext:value-type="date">
            <text:p>2024-06-08</text:p>
          </table:table-cell>
          <table:table-cell office:value-type="float" office:value="25.2283" calcext:value-type="float">
            <text:p>25.2283</text:p>
          </table:table-cell>
          <table:table-cell office:value-type="float" office:value="6372355.3859543" calcext:value-type="float">
            <text:p>6372355.3859543</text:p>
          </table:table-cell>
          <table:table-cell table:number-columns-repeated="2"/>
        </table:table-row>
        <table:table-row table:style-name="ro1">
          <table:table-cell office:value-type="date" office:date-value="2024-06-09" calcext:value-type="date">
            <text:p>2024-06-09</text:p>
          </table:table-cell>
          <table:table-cell office:value-type="float" office:value="25.2283" calcext:value-type="float">
            <text:p>25.2283</text:p>
          </table:table-cell>
          <table:table-cell office:value-type="float" office:value="6372355.3859543" calcext:value-type="float">
            <text:p>6372355.3859543</text:p>
          </table:table-cell>
          <table:table-cell table:number-columns-repeated="2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25.1894" calcext:value-type="float">
            <text:p>25.1894</text:p>
          </table:table-cell>
          <table:table-cell office:value-type="float" office:value="7889341.3063154" calcext:value-type="float">
            <text:p>7889341.3063154</text:p>
          </table:table-cell>
          <table:table-cell table:number-columns-repeated="2"/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25.102" calcext:value-type="float">
            <text:p>25.102</text:p>
          </table:table-cell>
          <table:table-cell office:value-type="float" office:value="7714615.9407571" calcext:value-type="float">
            <text:p>7714615.9407571</text:p>
          </table:table-cell>
          <table:table-cell table:number-columns-repeated="2"/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25.0826" calcext:value-type="float">
            <text:p>25.0826</text:p>
          </table:table-cell>
          <table:table-cell office:value-type="float" office:value="8743122.3113057" calcext:value-type="float">
            <text:p>8743122.3113057</text:p>
          </table:table-cell>
          <table:table-cell table:number-columns-repeated="2"/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24.9757" calcext:value-type="float">
            <text:p>24.9757</text:p>
          </table:table-cell>
          <table:table-cell office:value-type="float" office:value="8436157.3249886" calcext:value-type="float">
            <text:p>8436157.3249886</text:p>
          </table:table-cell>
          <table:table-cell table:number-columns-repeated="2"/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24.8721" calcext:value-type="float">
            <text:p>24.8721</text:p>
          </table:table-cell>
          <table:table-cell office:value-type="float" office:value="9753848.3312764" calcext:value-type="float">
            <text:p>9753848.3312764</text:p>
          </table:table-cell>
          <table:table-cell table:number-columns-repeated="2"/>
        </table:table-row>
        <table:table-row table:style-name="ro1">
          <table:table-cell office:value-type="date" office:date-value="2024-06-15" calcext:value-type="date">
            <text:p>2024-06-15</text:p>
          </table:table-cell>
          <table:table-cell office:value-type="float" office:value="24.8721" calcext:value-type="float">
            <text:p>24.8721</text:p>
          </table:table-cell>
          <table:table-cell office:value-type="float" office:value="9753848.3312764" calcext:value-type="float">
            <text:p>9753848.3312764</text:p>
          </table:table-cell>
          <table:table-cell table:number-columns-repeated="2"/>
        </table:table-row>
        <table:table-row table:style-name="ro1">
          <table:table-cell office:value-type="date" office:date-value="2024-06-16" calcext:value-type="date">
            <text:p>2024-06-16</text:p>
          </table:table-cell>
          <table:table-cell office:value-type="float" office:value="24.8721" calcext:value-type="float">
            <text:p>24.8721</text:p>
          </table:table-cell>
          <table:table-cell office:value-type="float" office:value="9753848.3312764" calcext:value-type="float">
            <text:p>9753848.3312764</text:p>
          </table:table-cell>
          <table:table-cell table:number-columns-repeated="2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25.0372" calcext:value-type="float">
            <text:p>25.0372</text:p>
          </table:table-cell>
          <table:table-cell office:value-type="float" office:value="9519752.2170443" calcext:value-type="float">
            <text:p>9519752.2170443</text:p>
          </table:table-cell>
          <table:table-cell table:number-columns-repeated="2"/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25.1473" calcext:value-type="float">
            <text:p>25.1473</text:p>
          </table:table-cell>
          <table:table-cell office:value-type="float" office:value="7534496.8831586" calcext:value-type="float">
            <text:p>7534496.8831586</text:p>
          </table:table-cell>
          <table:table-cell table:number-columns-repeated="2"/>
        </table:table-row>
        <table:table-row table:style-name="ro1">
          <table:table-cell office:value-type="date" office:date-value="2024-06-19" calcext:value-type="date">
            <text:p>2024-06-19</text:p>
          </table:table-cell>
          <table:table-cell office:value-type="float" office:value="25.1473" calcext:value-type="float">
            <text:p>25.1473</text:p>
          </table:table-cell>
          <table:table-cell office:value-type="float" office:value="7534496.8831586" calcext:value-type="float">
            <text:p>7534496.8831586</text:p>
          </table:table-cell>
          <table:table-cell table:number-columns-repeated="2"/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25.2835" calcext:value-type="float">
            <text:p>25.2835</text:p>
          </table:table-cell>
          <table:table-cell office:value-type="float" office:value="10015437.764122" calcext:value-type="float">
            <text:p>10015437.764122</text:p>
          </table:table-cell>
          <table:table-cell table:number-columns-repeated="2"/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25.3028" calcext:value-type="float">
            <text:p>25.3028</text:p>
          </table:table-cell>
          <table:table-cell office:value-type="float" office:value="8641139.2343328" calcext:value-type="float">
            <text:p>8641139.2343328</text:p>
          </table:table-cell>
          <table:table-cell table:number-columns-repeated="2"/>
        </table:table-row>
        <table:table-row table:style-name="ro1">
          <table:table-cell office:value-type="date" office:date-value="2024-06-22" calcext:value-type="date">
            <text:p>2024-06-22</text:p>
          </table:table-cell>
          <table:table-cell office:value-type="float" office:value="25.3028" calcext:value-type="float">
            <text:p>25.3028</text:p>
          </table:table-cell>
          <table:table-cell office:value-type="float" office:value="8641139.2343328" calcext:value-type="float">
            <text:p>8641139.2343328</text:p>
          </table:table-cell>
          <table:table-cell table:number-columns-repeated="2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float" office:value="25.3028" calcext:value-type="float">
            <text:p>25.3028</text:p>
          </table:table-cell>
          <table:table-cell office:value-type="float" office:value="8641139.2343328" calcext:value-type="float">
            <text:p>8641139.2343328</text:p>
          </table:table-cell>
          <table:table-cell table:number-columns-repeated="2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25.6559" calcext:value-type="float">
            <text:p>25.6559</text:p>
          </table:table-cell>
          <table:table-cell office:value-type="float" office:value="8214688.6866836" calcext:value-type="float">
            <text:p>8214688.6866836</text:p>
          </table:table-cell>
          <table:table-cell table:number-columns-repeated="2"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25.4518" calcext:value-type="float">
            <text:p>25.4518</text:p>
          </table:table-cell>
          <table:table-cell office:value-type="float" office:value="8090942.510002" calcext:value-type="float">
            <text:p>8090942.510002</text:p>
          </table:table-cell>
          <table:table-cell table:number-columns-repeated="2"/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25.3452" calcext:value-type="float">
            <text:p>25.3452</text:p>
          </table:table-cell>
          <table:table-cell office:value-type="float" office:value="8312209.0226251" calcext:value-type="float">
            <text:p>8312209.0226251</text:p>
          </table:table-cell>
          <table:table-cell table:number-columns-repeated="2"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25.2928" calcext:value-type="float">
            <text:p>25.2928</text:p>
          </table:table-cell>
          <table:table-cell office:value-type="float" office:value="9340869.0735056" calcext:value-type="float">
            <text:p>9340869.0735056</text:p>
          </table:table-cell>
          <table:table-cell table:number-columns-repeated="2"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25.4532" calcext:value-type="float">
            <text:p>25.4532</text:p>
          </table:table-cell>
          <table:table-cell office:value-type="float" office:value="10804439.228847" calcext:value-type="float">
            <text:p>10804439.228847</text:p>
          </table:table-cell>
          <table:table-cell table:number-columns-repeated="2"/>
        </table:table-row>
        <table:table-row table:style-name="ro1">
          <table:table-cell office:value-type="date" office:date-value="2024-06-29" calcext:value-type="date">
            <text:p>2024-06-29</text:p>
          </table:table-cell>
          <table:table-cell office:value-type="float" office:value="25.4532" calcext:value-type="float">
            <text:p>25.4532</text:p>
          </table:table-cell>
          <table:table-cell office:value-type="float" office:value="10804439.228847" calcext:value-type="float">
            <text:p>10804439.228847</text:p>
          </table:table-cell>
          <table:table-cell table:number-columns-repeated="2"/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25.4532" calcext:value-type="float">
            <text:p>25.4532</text:p>
          </table:table-cell>
          <table:table-cell office:value-type="float" office:value="10804439.228847" calcext:value-type="float">
            <text:p>10804439.228847</text:p>
          </table:table-cell>
          <table:table-cell table:number-columns-repeated="2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25.3386" calcext:value-type="float">
            <text:p>25.3386</text:p>
          </table:table-cell>
          <table:table-cell office:value-type="float" office:value="16945549.905833" calcext:value-type="float">
            <text:p>16945549.905833</text:p>
          </table:table-cell>
          <table:table-cell table:number-columns-repeated="2"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25.3517" calcext:value-type="float">
            <text:p>25.3517</text:p>
          </table:table-cell>
          <table:table-cell office:value-type="float" office:value="8310421.83382" calcext:value-type="float">
            <text:p>8310421.83382</text:p>
          </table:table-cell>
          <table:table-cell table:number-columns-repeated="2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25.2633" calcext:value-type="float">
            <text:p>25.2633</text:p>
          </table:table-cell>
          <table:table-cell office:value-type="float" office:value="6282133.6213159" calcext:value-type="float">
            <text:p>6282133.6213159</text:p>
          </table:table-cell>
          <table:table-cell table:number-columns-repeated="2"/>
        </table:table-row>
        <table:table-row table:style-name="ro1">
          <table:table-cell office:value-type="date" office:date-value="2024-07-04" calcext:value-type="date">
            <text:p>2024-07-04</text:p>
          </table:table-cell>
          <table:table-cell office:value-type="float" office:value="25.2633" calcext:value-type="float">
            <text:p>25.2633</text:p>
          </table:table-cell>
          <table:table-cell office:value-type="float" office:value="6282133.6213159" calcext:value-type="float">
            <text:p>6282133.6213159</text:p>
          </table:table-cell>
          <table:table-cell table:number-columns-repeated="2"/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25.2109" calcext:value-type="float">
            <text:p>25.2109</text:p>
          </table:table-cell>
          <table:table-cell office:value-type="float" office:value="10067622.52731" calcext:value-type="float">
            <text:p>10067622.52731</text:p>
          </table:table-cell>
          <table:table-cell table:number-columns-repeated="2"/>
        </table:table-row>
        <table:table-row table:style-name="ro1">
          <table:table-cell office:value-type="date" office:date-value="2024-07-06" calcext:value-type="date">
            <text:p>2024-07-06</text:p>
          </table:table-cell>
          <table:table-cell office:value-type="float" office:value="25.2109" calcext:value-type="float">
            <text:p>25.2109</text:p>
          </table:table-cell>
          <table:table-cell office:value-type="float" office:value="10067622.52731" calcext:value-type="float">
            <text:p>10067622.52731</text:p>
          </table:table-cell>
          <table:table-cell table:number-columns-repeated="2"/>
        </table:table-row>
        <table:table-row table:style-name="ro1">
          <table:table-cell office:value-type="date" office:date-value="2024-07-07" calcext:value-type="date">
            <text:p>2024-07-07</text:p>
          </table:table-cell>
          <table:table-cell office:value-type="float" office:value="25.2109" calcext:value-type="float">
            <text:p>25.2109</text:p>
          </table:table-cell>
          <table:table-cell office:value-type="float" office:value="10067622.52731" calcext:value-type="float">
            <text:p>10067622.52731</text:p>
          </table:table-cell>
          <table:table-cell table:number-columns-repeated="2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25.2338" calcext:value-type="float">
            <text:p>25.2338</text:p>
          </table:table-cell>
          <table:table-cell office:value-type="float" office:value="8734141.38684" calcext:value-type="float">
            <text:p>8734141.38684</text:p>
          </table:table-cell>
          <table:table-cell table:number-columns-repeated="2"/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25.2404" calcext:value-type="float">
            <text:p>25.2404</text:p>
          </table:table-cell>
          <table:table-cell office:value-type="float" office:value="9039005.2467597" calcext:value-type="float">
            <text:p>9039005.2467597</text:p>
          </table:table-cell>
          <table:table-cell table:number-columns-repeated="2"/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25.4891" calcext:value-type="float">
            <text:p>25.4891</text:p>
          </table:table-cell>
          <table:table-cell office:value-type="float" office:value="7868289.6535717" calcext:value-type="float">
            <text:p>7868289.6535717</text:p>
          </table:table-cell>
          <table:table-cell table:number-columns-repeated="2"/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25.8001" calcext:value-type="float">
            <text:p>25.8001</text:p>
          </table:table-cell>
          <table:table-cell office:value-type="float" office:value="10536678.630532" calcext:value-type="float">
            <text:p>10536678.630532</text:p>
          </table:table-cell>
          <table:table-cell table:number-columns-repeated="2"/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26.0685" calcext:value-type="float">
            <text:p>26.0685</text:p>
          </table:table-cell>
          <table:table-cell office:value-type="float" office:value="9838492.7023972" calcext:value-type="float">
            <text:p>9838492.7023972</text:p>
          </table:table-cell>
          <table:table-cell table:number-columns-repeated="2"/>
        </table:table-row>
        <table:table-row table:style-name="ro1">
          <table:table-cell office:value-type="date" office:date-value="2024-07-13" calcext:value-type="date">
            <text:p>2024-07-13</text:p>
          </table:table-cell>
          <table:table-cell office:value-type="float" office:value="26.0685" calcext:value-type="float">
            <text:p>26.0685</text:p>
          </table:table-cell>
          <table:table-cell office:value-type="float" office:value="9838492.7023972" calcext:value-type="float">
            <text:p>9838492.7023972</text:p>
          </table:table-cell>
          <table:table-cell table:number-columns-repeated="2"/>
        </table:table-row>
        <table:table-row table:style-name="ro1">
          <table:table-cell office:value-type="date" office:date-value="2024-07-14" calcext:value-type="date">
            <text:p>2024-07-14</text:p>
          </table:table-cell>
          <table:table-cell office:value-type="float" office:value="26.0685" calcext:value-type="float">
            <text:p>26.0685</text:p>
          </table:table-cell>
          <table:table-cell office:value-type="float" office:value="9838492.7023972" calcext:value-type="float">
            <text:p>9838492.7023972</text:p>
          </table:table-cell>
          <table:table-cell table:number-columns-repeated="2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26.1635" calcext:value-type="float">
            <text:p>26.1635</text:p>
          </table:table-cell>
          <table:table-cell office:value-type="float" office:value="9764457.2605109" calcext:value-type="float">
            <text:p>9764457.2605109</text:p>
          </table:table-cell>
          <table:table-cell table:number-columns-repeated="2"/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26.5988" calcext:value-type="float">
            <text:p>26.5988</text:p>
          </table:table-cell>
          <table:table-cell office:value-type="float" office:value="9099891.8670781" calcext:value-type="float">
            <text:p>9099891.8670781</text:p>
          </table:table-cell>
          <table:table-cell table:number-columns-repeated="2"/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26.9458" calcext:value-type="float">
            <text:p>26.9458</text:p>
          </table:table-cell>
          <table:table-cell office:value-type="float" office:value="11480888.664078" calcext:value-type="float">
            <text:p>11480888.664078</text:p>
          </table:table-cell>
          <table:table-cell table:number-columns-repeated="2"/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26.7133" calcext:value-type="float">
            <text:p>26.7133</text:p>
          </table:table-cell>
          <table:table-cell office:value-type="float" office:value="11221000.861576" calcext:value-type="float">
            <text:p>11221000.861576</text:p>
          </table:table-cell>
          <table:table-cell table:number-columns-repeated="2"/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26.5497" calcext:value-type="float">
            <text:p>26.5497</text:p>
          </table:table-cell>
          <table:table-cell office:value-type="float" office:value="6848134.7883896" calcext:value-type="float">
            <text:p>6848134.7883896</text:p>
          </table:table-cell>
          <table:table-cell table:number-columns-repeated="2"/>
        </table:table-row>
        <table:table-row table:style-name="ro1">
          <table:table-cell office:value-type="date" office:date-value="2024-07-20" calcext:value-type="date">
            <text:p>2024-07-20</text:p>
          </table:table-cell>
          <table:table-cell office:value-type="float" office:value="26.5497" calcext:value-type="float">
            <text:p>26.5497</text:p>
          </table:table-cell>
          <table:table-cell office:value-type="float" office:value="6848134.7883896" calcext:value-type="float">
            <text:p>6848134.7883896</text:p>
          </table:table-cell>
          <table:table-cell table:number-columns-repeated="2"/>
        </table:table-row>
        <table:table-row table:style-name="ro1">
          <table:table-cell office:value-type="date" office:date-value="2024-07-21" calcext:value-type="date">
            <text:p>2024-07-21</text:p>
          </table:table-cell>
          <table:table-cell office:value-type="float" office:value="26.5497" calcext:value-type="float">
            <text:p>26.5497</text:p>
          </table:table-cell>
          <table:table-cell office:value-type="float" office:value="6848134.7883896" calcext:value-type="float">
            <text:p>6848134.7883896</text:p>
          </table:table-cell>
          <table:table-cell table:number-columns-repeated="2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26.5727" calcext:value-type="float">
            <text:p>26.5727</text:p>
          </table:table-cell>
          <table:table-cell office:value-type="float" office:value="9251097.2050631" calcext:value-type="float">
            <text:p>9251097.2050631</text:p>
          </table:table-cell>
          <table:table-cell table:number-columns-repeated="2"/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26.3435" calcext:value-type="float">
            <text:p>26.3435</text:p>
          </table:table-cell>
          <table:table-cell office:value-type="float" office:value="8730017.104982" calcext:value-type="float">
            <text:p>8730017.104982</text:p>
          </table:table-cell>
          <table:table-cell table:formula="of:=AVERAGE([.B2:.B50])" office:value-type="float" office:value="25.5238040816327" calcext:value-type="float">
            <text:p>25.5238040816327</text:p>
          </table:table-cell>
          <table:table-cell/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26.4155" calcext:value-type="float">
            <text:p>26.4155</text:p>
          </table:table-cell>
          <table:table-cell office:value-type="float" office:value="7947381.1595137" calcext:value-type="float">
            <text:p>7947381.1595137</text:p>
          </table:table-cell>
          <table:table-cell table:formula="of:=AVERAGE([.B3:.B51])" office:value-type="float" office:value="25.5446448979592" calcext:value-type="float">
            <text:p>25.5446448979592</text:p>
          </table:table-cell>
          <table:table-cell/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26.5727" calcext:value-type="float">
            <text:p>26.5727</text:p>
          </table:table-cell>
          <table:table-cell office:value-type="float" office:value="9686135.6205156" calcext:value-type="float">
            <text:p>9686135.6205156</text:p>
          </table:table-cell>
          <table:table-cell table:formula="of:=AVERAGE([.B4:.B52])" office:value-type="float" office:value="25.5671530612245" calcext:value-type="float">
            <text:p>25.5671530612245</text:p>
          </table:table-cell>
          <table:table-cell/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26.9949" calcext:value-type="float">
            <text:p>26.9949</text:p>
          </table:table-cell>
          <table:table-cell office:value-type="float" office:value="7627727.9303537" calcext:value-type="float">
            <text:p>7627727.9303537</text:p>
          </table:table-cell>
          <table:table-cell table:formula="of:=AVERAGE([.B5:.B53])" office:value-type="float" office:value="25.5933326530612" calcext:value-type="float">
            <text:p>25.5933326530612</text:p>
          </table:table-cell>
          <table:table-cell/>
        </table:table-row>
        <table:table-row table:style-name="ro1">
          <table:table-cell office:value-type="date" office:date-value="2024-07-27" calcext:value-type="date">
            <text:p>2024-07-27</text:p>
          </table:table-cell>
          <table:table-cell office:value-type="float" office:value="26.9949" calcext:value-type="float">
            <text:p>26.9949</text:p>
          </table:table-cell>
          <table:table-cell office:value-type="float" office:value="7627727.9303537" calcext:value-type="float">
            <text:p>7627727.9303537</text:p>
          </table:table-cell>
          <table:table-cell table:formula="of:=AVERAGE([.B6:.B54])" office:value-type="float" office:value="25.6293857142857" calcext:value-type="float">
            <text:p>25.6293857142857</text:p>
          </table:table-cell>
          <table:table-cell/>
        </table:table-row>
        <table:table-row table:style-name="ro1">
          <table:table-cell office:value-type="date" office:date-value="2024-07-28" calcext:value-type="date">
            <text:p>2024-07-28</text:p>
          </table:table-cell>
          <table:table-cell office:value-type="float" office:value="26.9949" calcext:value-type="float">
            <text:p>26.9949</text:p>
          </table:table-cell>
          <table:table-cell office:value-type="float" office:value="7627727.9303537" calcext:value-type="float">
            <text:p>7627727.9303537</text:p>
          </table:table-cell>
          <table:table-cell table:formula="of:=AVERAGE([.B7:.B55])" office:value-type="float" office:value="25.6654387755102" calcext:value-type="float">
            <text:p>25.6654387755102</text:p>
          </table:table-cell>
          <table:table-cell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26.8901" calcext:value-type="float">
            <text:p>26.8901</text:p>
          </table:table-cell>
          <table:table-cell office:value-type="float" office:value="9399513.3065027" calcext:value-type="float">
            <text:p>9399513.3065027</text:p>
          </table:table-cell>
          <table:table-cell table:formula="of:=AVERAGE([.B8:.B56])" office:value-type="float" office:value="25.7014918367347" calcext:value-type="float">
            <text:p>25.7014918367347</text:p>
          </table:table-cell>
          <table:table-cell/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27.1029" calcext:value-type="float">
            <text:p>27.1029</text:p>
          </table:table-cell>
          <table:table-cell office:value-type="float" office:value="8530701.2553675" calcext:value-type="float">
            <text:p>8530701.2553675</text:p>
          </table:table-cell>
          <table:table-cell table:formula="of:=AVERAGE([.B9:.B57])" office:value-type="float" office:value="25.7362" calcext:value-type="float">
            <text:p>25.7362</text:p>
          </table:table-cell>
          <table:table-cell/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27.0309" calcext:value-type="float">
            <text:p>27.0309</text:p>
          </table:table-cell>
          <table:table-cell office:value-type="float" office:value="9795502.4103189" calcext:value-type="float">
            <text:p>9795502.4103189</text:p>
          </table:table-cell>
          <table:table-cell table:formula="of:=AVERAGE([.B10:.B58])" office:value-type="float" office:value="25.7770346938776" calcext:value-type="float">
            <text:p>25.7770346938776</text:p>
          </table:table-cell>
          <table:table-cell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26.7625" calcext:value-type="float">
            <text:p>26.7625</text:p>
          </table:table-cell>
          <table:table-cell office:value-type="float" office:value="10315421.601432" calcext:value-type="float">
            <text:p>10315421.601432</text:p>
          </table:table-cell>
          <table:table-cell table:formula="of:=AVERAGE([.B11:.B59])" office:value-type="float" office:value="25.8167959183673" calcext:value-type="float">
            <text:p>25.8167959183673</text:p>
          </table:table-cell>
          <table:table-cell/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26.4482" calcext:value-type="float">
            <text:p>26.4482</text:p>
          </table:table-cell>
          <table:table-cell office:value-type="float" office:value="10652552.620599" calcext:value-type="float">
            <text:p>10652552.620599</text:p>
          </table:table-cell>
          <table:table-cell table:formula="of:=AVERAGE([.B12:.B60])" office:value-type="float" office:value="25.8532612244898" calcext:value-type="float">
            <text:p>25.8532612244898</text:p>
          </table:table-cell>
          <table:table-cell/>
        </table:table-row>
        <table:table-row table:style-name="ro1">
          <table:table-cell office:value-type="date" office:date-value="2024-08-03" calcext:value-type="date">
            <text:p>2024-08-03</text:p>
          </table:table-cell>
          <table:table-cell office:value-type="float" office:value="26.4482" calcext:value-type="float">
            <text:p>26.4482</text:p>
          </table:table-cell>
          <table:table-cell office:value-type="float" office:value="10652552.620599" calcext:value-type="float">
            <text:p>10652552.620599</text:p>
          </table:table-cell>
          <table:table-cell table:formula="of:=AVERAGE([.B13:.B61])" office:value-type="float" office:value="25.8854265306122" calcext:value-type="float">
            <text:p>25.8854265306122</text:p>
          </table:table-cell>
          <table:table-cell/>
        </table:table-row>
        <table:table-row table:style-name="ro1">
          <table:table-cell office:value-type="date" office:date-value="2024-08-04" calcext:value-type="date">
            <text:p>2024-08-04</text:p>
          </table:table-cell>
          <table:table-cell office:value-type="float" office:value="26.4482" calcext:value-type="float">
            <text:p>26.4482</text:p>
          </table:table-cell>
          <table:table-cell office:value-type="float" office:value="10652552.620599" calcext:value-type="float">
            <text:p>10652552.620599</text:p>
          </table:table-cell>
          <table:table-cell table:formula="of:=AVERAGE([.B14:.B62])" office:value-type="float" office:value="25.9175918367347" calcext:value-type="float">
            <text:p>25.9175918367347</text:p>
          </table:table-cell>
          <table:table-cell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25.8525" calcext:value-type="float">
            <text:p>25.8525</text:p>
          </table:table-cell>
          <table:table-cell office:value-type="float" office:value="18617280.204106" calcext:value-type="float">
            <text:p>18617280.204106</text:p>
          </table:table-cell>
          <table:table-cell table:formula="of:=AVERAGE([.B15:.B63])" office:value-type="float" office:value="25.9497571428571" calcext:value-type="float">
            <text:p>25.9497571428571</text:p>
          </table:table-cell>
          <table:table-cell/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25.9834" calcext:value-type="float">
            <text:p>25.9834</text:p>
          </table:table-cell>
          <table:table-cell office:value-type="float" office:value="12937264.238845" calcext:value-type="float">
            <text:p>12937264.238845</text:p>
          </table:table-cell>
          <table:table-cell table:formula="of:=AVERAGE([.B16:.B64])" office:value-type="float" office:value="25.9663959183673" calcext:value-type="float">
            <text:p>25.9663959183673</text:p>
          </table:table-cell>
          <table:table-cell/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25.823" calcext:value-type="float">
            <text:p>25.823</text:p>
          </table:table-cell>
          <table:table-cell office:value-type="float" office:value="10058225.274721" calcext:value-type="float">
            <text:p>10058225.274721</text:p>
          </table:table-cell>
          <table:table-cell table:formula="of:=AVERAGE([.B17:.B65])" office:value-type="float" office:value="25.9834591836735" calcext:value-type="float">
            <text:p>25.9834591836735</text:p>
          </table:table-cell>
          <table:table-cell/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26.2584" calcext:value-type="float">
            <text:p>26.2584</text:p>
          </table:table-cell>
          <table:table-cell office:value-type="float" office:value="8743324.7877771" calcext:value-type="float">
            <text:p>8743324.7877771</text:p>
          </table:table-cell>
          <table:table-cell table:formula="of:=AVERAGE([.B18:.B66])" office:value-type="float" office:value="25.9972489795918" calcext:value-type="float">
            <text:p>25.9972489795918</text:p>
          </table:table-cell>
          <table:table-cell/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26.242" calcext:value-type="float">
            <text:p>26.242</text:p>
          </table:table-cell>
          <table:table-cell office:value-type="float" office:value="7724462.1975772" calcext:value-type="float">
            <text:p>7724462.1975772</text:p>
          </table:table-cell>
          <table:table-cell table:formula="of:=AVERAGE([.B19:.B67])" office:value-type="float" office:value="26.0171448979592" calcext:value-type="float">
            <text:p>26.0171448979592</text:p>
          </table:table-cell>
          <table:table-cell/>
        </table:table-row>
        <table:table-row table:style-name="ro1">
          <table:table-cell office:value-type="date" office:date-value="2024-08-10" calcext:value-type="date">
            <text:p>2024-08-10</text:p>
          </table:table-cell>
          <table:table-cell office:value-type="float" office:value="26.242" calcext:value-type="float">
            <text:p>26.242</text:p>
          </table:table-cell>
          <table:table-cell office:value-type="float" office:value="7724462.1975772" calcext:value-type="float">
            <text:p>7724462.1975772</text:p>
          </table:table-cell>
          <table:table-cell table:formula="of:=AVERAGE([.B20:.B68])" office:value-type="float" office:value="26.036312244898" calcext:value-type="float">
            <text:p>26.036312244898</text:p>
          </table:table-cell>
          <table:table-cell/>
        </table:table-row>
        <table:table-row table:style-name="ro1">
          <table:table-cell office:value-type="date" office:date-value="2024-08-11" calcext:value-type="date">
            <text:p>2024-08-11</text:p>
          </table:table-cell>
          <table:table-cell office:value-type="float" office:value="26.242" calcext:value-type="float">
            <text:p>26.242</text:p>
          </table:table-cell>
          <table:table-cell office:value-type="float" office:value="7724462.1975772" calcext:value-type="float">
            <text:p>7724462.1975772</text:p>
          </table:table-cell>
          <table:table-cell table:formula="of:=AVERAGE([.B21:.B69])" office:value-type="float" office:value="26.0554795918367" calcext:value-type="float">
            <text:p>26.0554795918367</text:p>
          </table:table-cell>
          <table:table-cell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26.1176" calcext:value-type="float">
            <text:p>26.1176</text:p>
          </table:table-cell>
          <table:table-cell office:value-type="float" office:value="7802013.9716255" calcext:value-type="float">
            <text:p>7802013.9716255</text:p>
          </table:table-cell>
          <table:table-cell table:formula="of:=AVERAGE([.B22:.B70])" office:value-type="float" office:value="26.0746469387755" calcext:value-type="float">
            <text:p>26.0746469387755</text:p>
          </table:table-cell>
          <table:table-cell/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26.3959" calcext:value-type="float">
            <text:p>26.3959</text:p>
          </table:table-cell>
          <table:table-cell office:value-type="float" office:value="7144328.4913367" calcext:value-type="float">
            <text:p>7144328.4913367</text:p>
          </table:table-cell>
          <table:table-cell table:formula="of:=AVERAGE([.B23:.B71])" office:value-type="float" office:value="26.0840693877551" calcext:value-type="float">
            <text:p>26.0840693877551</text:p>
          </table:table-cell>
          <table:table-cell/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26.4286" calcext:value-type="float">
            <text:p>26.4286</text:p>
          </table:table-cell>
          <table:table-cell office:value-type="float" office:value="6746759.94032" calcext:value-type="float">
            <text:p>6746759.94032</text:p>
          </table:table-cell>
          <table:table-cell table:formula="of:=AVERAGE([.B24:.B72])" office:value-type="float" office:value="26.1033367346939" calcext:value-type="float">
            <text:p>26.1033367346939</text:p>
          </table:table-cell>
          <table:table-cell/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26.7068" calcext:value-type="float">
            <text:p>26.7068</text:p>
          </table:table-cell>
          <table:table-cell office:value-type="float" office:value="8357209.5202313" calcext:value-type="float">
            <text:p>8357209.5202313</text:p>
          </table:table-cell>
          <table:table-cell table:formula="of:=AVERAGE([.B25:.B73])" office:value-type="float" office:value="26.1254469387755" calcext:value-type="float">
            <text:p>26.1254469387755</text:p>
          </table:table-cell>
          <table:table-cell/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26.828" calcext:value-type="float">
            <text:p>26.828</text:p>
          </table:table-cell>
          <table:table-cell office:value-type="float" office:value="6512412.1351013" calcext:value-type="float">
            <text:p>6512412.1351013</text:p>
          </table:table-cell>
          <table:table-cell table:formula="of:=AVERAGE([.B26:.B74])" office:value-type="float" office:value="26.1543040816327" calcext:value-type="float">
            <text:p>26.1543040816327</text:p>
          </table:table-cell>
          <table:table-cell/>
        </table:table-row>
        <table:table-row table:style-name="ro1">
          <table:table-cell office:value-type="date" office:date-value="2024-08-17" calcext:value-type="date">
            <text:p>2024-08-17</text:p>
          </table:table-cell>
          <table:table-cell office:value-type="float" office:value="26.828" calcext:value-type="float">
            <text:p>26.828</text:p>
          </table:table-cell>
          <table:table-cell office:value-type="float" office:value="6512412.1351013" calcext:value-type="float">
            <text:p>6512412.1351013</text:p>
          </table:table-cell>
          <table:table-cell table:formula="of:=AVERAGE([.B27:.B75])" office:value-type="float" office:value="26.1823612244898" calcext:value-type="float">
            <text:p>26.1823612244898</text:p>
          </table:table-cell>
          <table:table-cell/>
        </table:table-row>
        <table:table-row table:style-name="ro1">
          <table:table-cell office:value-type="date" office:date-value="2024-08-18" calcext:value-type="date">
            <text:p>2024-08-18</text:p>
          </table:table-cell>
          <table:table-cell office:value-type="float" office:value="26.828" calcext:value-type="float">
            <text:p>26.828</text:p>
          </table:table-cell>
          <table:table-cell office:value-type="float" office:value="6512412.1351013" calcext:value-type="float">
            <text:p>6512412.1351013</text:p>
          </table:table-cell>
          <table:table-cell table:formula="of:=AVERAGE([.B28:.B76])" office:value-type="float" office:value="26.2104183673469" calcext:value-type="float">
            <text:p>26.2104183673469</text:p>
          </table:table-cell>
          <table:table-cell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26.985" calcext:value-type="float">
            <text:p>26.985</text:p>
          </table:table-cell>
          <table:table-cell office:value-type="float" office:value="7413219.4483838" calcext:value-type="float">
            <text:p>7413219.4483838</text:p>
          </table:table-cell>
          <table:table-cell table:formula="of:=AVERAGE([.B29:.B77])" office:value-type="float" office:value="26.2384755102041" calcext:value-type="float">
            <text:p>26.2384755102041</text:p>
          </table:table-cell>
          <table:table-cell/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26.9131" calcext:value-type="float">
            <text:p>26.9131</text:p>
          </table:table-cell>
          <table:table-cell office:value-type="float" office:value="7172278.9022395" calcext:value-type="float">
            <text:p>7172278.9022395</text:p>
          </table:table-cell>
          <table:table-cell table:formula="of:=AVERAGE([.B30:.B78])" office:value-type="float" office:value="26.2720755102041" calcext:value-type="float">
            <text:p>26.2720755102041</text:p>
          </table:table-cell>
          <table:table-cell/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27.0276" calcext:value-type="float">
            <text:p>27.0276</text:p>
          </table:table-cell>
          <table:table-cell office:value-type="float" office:value="7261784.9836288" calcext:value-type="float">
            <text:p>7261784.9836288</text:p>
          </table:table-cell>
          <table:table-cell table:formula="of:=AVERAGE([.B31:.B79])" office:value-type="float" office:value="26.3039408163265" calcext:value-type="float">
            <text:p>26.3039408163265</text:p>
          </table:table-cell>
          <table:table-cell/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26.9523" calcext:value-type="float">
            <text:p>26.9523</text:p>
          </table:table-cell>
          <table:table-cell office:value-type="float" office:value="6595414.0712494" calcext:value-type="float">
            <text:p>6595414.0712494</text:p>
          </table:table-cell>
          <table:table-cell table:formula="of:=AVERAGE([.B32:.B80])" office:value-type="float" office:value="26.3399469387755" calcext:value-type="float">
            <text:p>26.3399469387755</text:p>
          </table:table-cell>
          <table:table-cell/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27.3386" calcext:value-type="float">
            <text:p>27.3386</text:p>
          </table:table-cell>
          <table:table-cell office:value-type="float" office:value="7603260.2463532" calcext:value-type="float">
            <text:p>7603260.2463532</text:p>
          </table:table-cell>
          <table:table-cell table:formula="of:=AVERAGE([.B33:.B81])" office:value-type="float" office:value="26.3744163265306" calcext:value-type="float">
            <text:p>26.3744163265306</text:p>
          </table:table-cell>
          <table:table-cell/>
        </table:table-row>
        <table:table-row table:style-name="ro1">
          <table:table-cell office:value-type="date" office:date-value="2024-08-24" calcext:value-type="date">
            <text:p>2024-08-24</text:p>
          </table:table-cell>
          <table:table-cell office:value-type="float" office:value="27.3386" calcext:value-type="float">
            <text:p>27.3386</text:p>
          </table:table-cell>
          <table:table-cell office:value-type="float" office:value="7603260.2463532" calcext:value-type="float">
            <text:p>7603260.2463532</text:p>
          </table:table-cell>
          <table:table-cell table:formula="of:=AVERAGE([.B34:.B82])" office:value-type="float" office:value="26.4178387755102" calcext:value-type="float">
            <text:p>26.4178387755102</text:p>
          </table:table-cell>
          <table:table-cell/>
        </table:table-row>
        <table:table-row table:style-name="ro1">
          <table:table-cell office:value-type="date" office:date-value="2024-08-25" calcext:value-type="date">
            <text:p>2024-08-25</text:p>
          </table:table-cell>
          <table:table-cell office:value-type="float" office:value="27.3386" calcext:value-type="float">
            <text:p>27.3386</text:p>
          </table:table-cell>
          <table:table-cell office:value-type="float" office:value="7603260.2463532" calcext:value-type="float">
            <text:p>7603260.2463532</text:p>
          </table:table-cell>
          <table:table-cell table:formula="of:=AVERAGE([.B35:.B83])" office:value-type="float" office:value="26.4612612244898" calcext:value-type="float">
            <text:p>26.4612612244898</text:p>
          </table:table-cell>
          <table:table-cell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27.3713" calcext:value-type="float">
            <text:p>27.3713</text:p>
          </table:table-cell>
          <table:table-cell office:value-type="float" office:value="9735431.4813013" calcext:value-type="float">
            <text:p>9735431.4813013</text:p>
          </table:table-cell>
          <table:table-cell table:formula="of:=AVERAGE([.B36:.B84])" office:value-type="float" office:value="26.5046836734694" calcext:value-type="float">
            <text:p>26.5046836734694</text:p>
          </table:table-cell>
          <table:table-cell/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27.3254" calcext:value-type="float">
            <text:p>27.3254</text:p>
          </table:table-cell>
          <table:table-cell office:value-type="float" office:value="7060590.2945014" calcext:value-type="float">
            <text:p>7060590.2945014</text:p>
          </table:table-cell>
          <table:table-cell table:formula="of:=AVERAGE([.B37:.B85])" office:value-type="float" office:value="26.548306122449" calcext:value-type="float">
            <text:p>26.548306122449</text:p>
          </table:table-cell>
          <table:table-cell/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27.332" calcext:value-type="float">
            <text:p>27.332</text:p>
          </table:table-cell>
          <table:table-cell office:value-type="float" office:value="6534875.7236212" calcext:value-type="float">
            <text:p>6534875.7236212</text:p>
          </table:table-cell>
          <table:table-cell table:formula="of:=AVERAGE([.B38:.B86])" office:value-type="float" office:value="26.5908571428571" calcext:value-type="float">
            <text:p>26.5908571428571</text:p>
          </table:table-cell>
          <table:table-cell/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27.4499" calcext:value-type="float">
            <text:p>27.4499</text:p>
          </table:table-cell>
          <table:table-cell office:value-type="float" office:value="7285183.40937" calcext:value-type="float">
            <text:p>7285183.40937</text:p>
          </table:table-cell>
          <table:table-cell table:formula="of:=AVERAGE([.B39:.B87])" office:value-type="float" office:value="26.6284673469388" calcext:value-type="float">
            <text:p>26.6284673469388</text:p>
          </table:table-cell>
          <table:table-cell/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27.6691" calcext:value-type="float">
            <text:p>27.6691</text:p>
          </table:table-cell>
          <table:table-cell office:value-type="float" office:value="7554975.5983786" calcext:value-type="float">
            <text:p>7554975.5983786</text:p>
          </table:table-cell>
          <table:table-cell table:formula="of:=AVERAGE([.B40:.B88])" office:value-type="float" office:value="26.6621367346939" calcext:value-type="float">
            <text:p>26.6621367346939</text:p>
          </table:table-cell>
          <table:table-cell/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27.6691" calcext:value-type="float">
            <text:p>27.6691</text:p>
          </table:table-cell>
          <table:table-cell office:value-type="float" office:value="7554975.5983786" calcext:value-type="float">
            <text:p>7554975.5983786</text:p>
          </table:table-cell>
          <table:table-cell table:formula="of:=AVERAGE([.B41:.B89])" office:value-type="float" office:value="26.6948020408163" calcext:value-type="float">
            <text:p>26.6948020408163</text:p>
          </table:table-cell>
          <table:table-cell/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float" office:value="27.6691" calcext:value-type="float">
            <text:p>27.6691</text:p>
          </table:table-cell>
          <table:table-cell office:value-type="float" office:value="7554975.5983786" calcext:value-type="float">
            <text:p>7554975.5983786</text:p>
          </table:table-cell>
          <table:table-cell table:formula="of:=AVERAGE([.B42:.B90])" office:value-type="float" office:value="26.7274673469388" calcext:value-type="float">
            <text:p>26.7274673469388</text:p>
          </table:table-cell>
          <table:table-cell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27.6691" calcext:value-type="float">
            <text:p>27.6691</text:p>
          </table:table-cell>
          <table:table-cell office:value-type="float" office:value="7554975.5983786" calcext:value-type="float">
            <text:p>7554975.5983786</text:p>
          </table:table-cell>
          <table:table-cell table:formula="of:=AVERAGE([.B43:.B91])" office:value-type="float" office:value="26.7601326530612" calcext:value-type="float">
            <text:p>26.7601326530612</text:p>
          </table:table-cell>
          <table:table-cell/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27.4237" calcext:value-type="float">
            <text:p>27.4237</text:p>
          </table:table-cell>
          <table:table-cell office:value-type="float" office:value="11016115.703941" calcext:value-type="float">
            <text:p>11016115.703941</text:p>
          </table:table-cell>
          <table:table-cell table:formula="of:=AVERAGE([.B44:.B92])" office:value-type="float" office:value="26.7908591836735" calcext:value-type="float">
            <text:p>26.7908591836735</text:p>
          </table:table-cell>
          <table:table-cell/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27.332" calcext:value-type="float">
            <text:p>27.332</text:p>
          </table:table-cell>
          <table:table-cell office:value-type="float" office:value="9779992.0555092" calcext:value-type="float">
            <text:p>9779992.0555092</text:p>
          </table:table-cell>
          <table:table-cell table:formula="of:=AVERAGE([.B45:.B93])" office:value-type="float" office:value="26.807693877551" calcext:value-type="float">
            <text:p>26.807693877551</text:p>
          </table:table-cell>
          <table:table-cell/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27.0734" calcext:value-type="float">
            <text:p>27.0734</text:p>
          </table:table-cell>
          <table:table-cell office:value-type="float" office:value="8651790.1707183" calcext:value-type="float">
            <text:p>8651790.1707183</text:p>
          </table:table-cell>
          <table:table-cell table:formula="of:=AVERAGE([.B46:.B94])" office:value-type="float" office:value="26.8155755102041" calcext:value-type="float">
            <text:p>26.8155755102041</text:p>
          </table:table-cell>
          <table:table-cell/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26.8411" calcext:value-type="float">
            <text:p>26.8411</text:p>
          </table:table-cell>
          <table:table-cell office:value-type="float" office:value="10021726.907789" calcext:value-type="float">
            <text:p>10021726.907789</text:p>
          </table:table-cell>
          <table:table-cell table:formula="of:=AVERAGE([.B47:.B95])" office:value-type="float" office:value="26.8229244897959" calcext:value-type="float">
            <text:p>26.8229244897959</text:p>
          </table:table-cell>
          <table:table-cell/>
        </table:table-row>
        <table:table-row table:style-name="ro1">
          <table:table-cell office:value-type="date" office:date-value="2024-09-07" calcext:value-type="date">
            <text:p>2024-09-07</text:p>
          </table:table-cell>
          <table:table-cell office:value-type="float" office:value="26.8411" calcext:value-type="float">
            <text:p>26.8411</text:p>
          </table:table-cell>
          <table:table-cell office:value-type="float" office:value="10021726.907789" calcext:value-type="float">
            <text:p>10021726.907789</text:p>
          </table:table-cell>
          <table:table-cell table:formula="of:=AVERAGE([.B48:.B96])" office:value-type="float" office:value="26.8288714285714" calcext:value-type="float">
            <text:p>26.8288714285714</text:p>
          </table:table-cell>
          <table:table-cell/>
        </table:table-row>
        <table:table-row table:style-name="ro1">
          <table:table-cell office:value-type="date" office:date-value="2024-09-08" calcext:value-type="date">
            <text:p>2024-09-08</text:p>
          </table:table-cell>
          <table:table-cell office:value-type="float" office:value="26.8411" calcext:value-type="float">
            <text:p>26.8411</text:p>
          </table:table-cell>
          <table:table-cell office:value-type="float" office:value="10021726.907789" calcext:value-type="float">
            <text:p>10021726.907789</text:p>
          </table:table-cell>
          <table:table-cell table:formula="of:=AVERAGE([.B49:.B97])" office:value-type="float" office:value="26.8348183673469" calcext:value-type="float">
            <text:p>26.8348183673469</text:p>
          </table:table-cell>
          <table:table-cell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27.1651" calcext:value-type="float">
            <text:p>27.1651</text:p>
          </table:table-cell>
          <table:table-cell office:value-type="float" office:value="8824683.1212292" calcext:value-type="float">
            <text:p>8824683.1212292</text:p>
          </table:table-cell>
          <table:table-cell table:formula="of:=AVERAGE([.B50:.B98])" office:value-type="float" office:value="26.8407653061225" calcext:value-type="float">
            <text:p>26.8407653061225</text:p>
          </table:table-cell>
          <table:table-cell/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27.188" calcext:value-type="float">
            <text:p>27.188</text:p>
          </table:table-cell>
          <table:table-cell office:value-type="float" office:value="7064668.7510053" calcext:value-type="float">
            <text:p>7064668.7510053</text:p>
          </table:table-cell>
          <table:table-cell table:formula="of:=AVERAGE([.B51:.B99])" office:value-type="float" office:value="26.8528551020408" calcext:value-type="float">
            <text:p>26.8528551020408</text:p>
          </table:table-cell>
          <table:table-cell/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27.0211" calcext:value-type="float">
            <text:p>27.0211</text:p>
          </table:table-cell>
          <table:table-cell office:value-type="float" office:value="8887219.4542909" calcext:value-type="float">
            <text:p>8887219.4542909</text:p>
          </table:table-cell>
          <table:table-cell table:formula="of:=AVERAGE([.B52:.B100])" office:value-type="float" office:value="26.8700897959184" calcext:value-type="float">
            <text:p>26.8700897959184</text:p>
          </table:table-cell>
          <table:table-cell table:formula="of:=AVERAGE([.B2:.B100])" office:value-type="float" office:value="26.1984272727273" calcext:value-type="float">
            <text:p>26.1984272727273</text:p>
          </table:table-cell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27.0472" calcext:value-type="float">
            <text:p>27.0472</text:p>
          </table:table-cell>
          <table:table-cell office:value-type="float" office:value="7127122.5984299" calcext:value-type="float">
            <text:p>7127122.5984299</text:p>
          </table:table-cell>
          <table:table-cell table:formula="of:=AVERAGE([.B53:.B101])" office:value-type="float" office:value="26.8824489795918" calcext:value-type="float">
            <text:p>26.8824489795918</text:p>
          </table:table-cell>
          <table:table-cell table:formula="of:=AVERAGE([.B3:.B101])" office:value-type="float" office:value="26.2155868686869" calcext:value-type="float">
            <text:p>26.2155868686869</text:p>
          </table:table-cell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27.2862" calcext:value-type="float">
            <text:p>27.2862</text:p>
          </table:table-cell>
          <table:table-cell office:value-type="float" office:value="6982568.0468188" calcext:value-type="float">
            <text:p>6982568.0468188</text:p>
          </table:table-cell>
          <table:table-cell table:formula="of:=AVERAGE([.B54:.B102])" office:value-type="float" office:value="26.8921326530612" calcext:value-type="float">
            <text:p>26.8921326530612</text:p>
          </table:table-cell>
          <table:table-cell table:formula="of:=AVERAGE([.B4:.B102])" office:value-type="float" office:value="26.2331080808081" calcext:value-type="float">
            <text:p>26.2331080808081</text:p>
          </table:table-cell>
        </table:table-row>
        <table:table-row table:style-name="ro1">
          <table:table-cell office:value-type="date" office:date-value="2024-09-14" calcext:value-type="date">
            <text:p>2024-09-14</text:p>
          </table:table-cell>
          <table:table-cell office:value-type="float" office:value="27.2862" calcext:value-type="float">
            <text:p>27.2862</text:p>
          </table:table-cell>
          <table:table-cell office:value-type="float" office:value="6982568.0468188" calcext:value-type="float">
            <text:p>6982568.0468188</text:p>
          </table:table-cell>
          <table:table-cell table:formula="of:=AVERAGE([.B55:.B103])" office:value-type="float" office:value="26.8980775510204" calcext:value-type="float">
            <text:p>26.8980775510204</text:p>
          </table:table-cell>
          <table:table-cell table:formula="of:=AVERAGE([.B5:.B103])" office:value-type="float" office:value="26.2532727272727" calcext:value-type="float">
            <text:p>26.2532727272727</text:p>
          </table:table-cell>
        </table:table-row>
        <table:table-row table:style-name="ro1">
          <table:table-cell office:value-type="date" office:date-value="2024-09-15" calcext:value-type="date">
            <text:p>2024-09-15</text:p>
          </table:table-cell>
          <table:table-cell office:value-type="float" office:value="27.2862" calcext:value-type="float">
            <text:p>27.2862</text:p>
          </table:table-cell>
          <table:table-cell office:value-type="float" office:value="6982568.0468188" calcext:value-type="float">
            <text:p>6982568.0468188</text:p>
          </table:table-cell>
          <table:table-cell table:formula="of:=AVERAGE([.B56:.B104])" office:value-type="float" office:value="26.9040224489796" calcext:value-type="float">
            <text:p>26.9040224489796</text:p>
          </table:table-cell>
          <table:table-cell table:formula="of:=AVERAGE([.B6:.B104])" office:value-type="float" office:value="26.2740595959596" calcext:value-type="float">
            <text:p>26.2740595959596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27.5448" calcext:value-type="float">
            <text:p>27.5448</text:p>
          </table:table-cell>
          <table:table-cell office:value-type="float" office:value="7852046.0930985" calcext:value-type="float">
            <text:p>7852046.0930985</text:p>
          </table:table-cell>
          <table:table-cell table:formula="of:=AVERAGE([.B57:.B105])" office:value-type="float" office:value="26.9099673469388" calcext:value-type="float">
            <text:p>26.9099673469388</text:p>
          </table:table-cell>
          <table:table-cell table:formula="of:=AVERAGE([.B7:.B105])" office:value-type="float" office:value="26.2948464646465" calcext:value-type="float">
            <text:p>26.2948464646465</text:p>
          </table:table-cell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27.5252" calcext:value-type="float">
            <text:p>27.5252</text:p>
          </table:table-cell>
          <table:table-cell office:value-type="float" office:value="7710763.4717614" calcext:value-type="float">
            <text:p>7710763.4717614</text:p>
          </table:table-cell>
          <table:table-cell table:formula="of:=AVERAGE([.B58:.B106])" office:value-type="float" office:value="26.9233285714286" calcext:value-type="float">
            <text:p>26.9233285714286</text:p>
          </table:table-cell>
          <table:table-cell table:formula="of:=AVERAGE([.B8:.B106])" office:value-type="float" office:value="26.3182454545455" calcext:value-type="float">
            <text:p>26.3182454545455</text:p>
          </table:table-cell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27.5415" calcext:value-type="float">
            <text:p>27.5415</text:p>
          </table:table-cell>
          <table:table-cell office:value-type="float" office:value="8765207.9218133" calcext:value-type="float">
            <text:p>8765207.9218133</text:p>
          </table:table-cell>
          <table:table-cell table:formula="of:=AVERAGE([.B59:.B107])" office:value-type="float" office:value="26.9319469387755" calcext:value-type="float">
            <text:p>26.9319469387755</text:p>
          </table:table-cell>
          <table:table-cell table:formula="of:=AVERAGE([.B9:.B107])" office:value-type="float" office:value="26.3418393939394" calcext:value-type="float">
            <text:p>26.3418393939394</text:p>
          </table:table-cell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27.7805" calcext:value-type="float">
            <text:p>27.7805</text:p>
          </table:table-cell>
          <table:table-cell office:value-type="float" office:value="9450208.3680965" calcext:value-type="float">
            <text:p>9450208.3680965</text:p>
          </table:table-cell>
          <table:table-cell table:formula="of:=AVERAGE([.B60:.B108])" office:value-type="float" office:value="26.9423673469388" calcext:value-type="float">
            <text:p>26.9423673469388</text:p>
          </table:table-cell>
          <table:table-cell table:formula="of:=AVERAGE([.B10:.B108])" office:value-type="float" office:value="26.3664808080808" calcext:value-type="float">
            <text:p>26.3664808080808</text:p>
          </table:table-cell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27.6528" calcext:value-type="float">
            <text:p>27.6528</text:p>
          </table:table-cell>
          <table:table-cell office:value-type="float" office:value="11122259.443848" calcext:value-type="float">
            <text:p>11122259.443848</text:p>
          </table:table-cell>
          <table:table-cell table:formula="of:=AVERAGE([.B61:.B109])" office:value-type="float" office:value="26.9631428571429" calcext:value-type="float">
            <text:p>26.9631428571429</text:p>
          </table:table-cell>
          <table:table-cell table:formula="of:=AVERAGE([.B11:.B109])" office:value-type="float" office:value="26.3937323232323" calcext:value-type="float">
            <text:p>26.3937323232323</text:p>
          </table:table-cell>
        </table:table-row>
        <table:table-row table:style-name="ro1">
          <table:table-cell office:value-type="date" office:date-value="2024-09-21" calcext:value-type="date">
            <text:p>2024-09-21</text:p>
          </table:table-cell>
          <table:table-cell office:value-type="float" office:value="27.6528" calcext:value-type="float">
            <text:p>27.6528</text:p>
          </table:table-cell>
          <table:table-cell office:value-type="float" office:value="11122259.443848" calcext:value-type="float">
            <text:p>11122259.443848</text:p>
          </table:table-cell>
          <table:table-cell table:formula="of:=AVERAGE([.B62:.B110])" office:value-type="float" office:value="26.9877265306122" calcext:value-type="float">
            <text:p>26.9877265306122</text:p>
          </table:table-cell>
          <table:table-cell table:formula="of:=AVERAGE([.B12:.B110])" office:value-type="float" office:value="26.4207737373737" calcext:value-type="float">
            <text:p>26.4207737373737</text:p>
          </table:table-cell>
        </table:table-row>
        <table:table-row table:style-name="ro1">
          <table:table-cell office:value-type="date" office:date-value="2024-09-22" calcext:value-type="date">
            <text:p>2024-09-22</text:p>
          </table:table-cell>
          <table:table-cell office:value-type="float" office:value="27.6528" calcext:value-type="float">
            <text:p>27.6528</text:p>
          </table:table-cell>
          <table:table-cell office:value-type="float" office:value="11122259.443848" calcext:value-type="float">
            <text:p>11122259.443848</text:p>
          </table:table-cell>
          <table:table-cell table:formula="of:=AVERAGE([.B63:.B111])" office:value-type="float" office:value="27.0123102040816" calcext:value-type="float">
            <text:p>27.0123102040816</text:p>
          </table:table-cell>
          <table:table-cell table:formula="of:=AVERAGE([.B13:.B111])" office:value-type="float" office:value="26.4488616161616" calcext:value-type="float">
            <text:p>26.4488616161616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27.8001" calcext:value-type="float">
            <text:p>27.8001</text:p>
          </table:table-cell>
          <table:table-cell office:value-type="float" office:value="7830584.5523189" calcext:value-type="float">
            <text:p>7830584.5523189</text:p>
          </table:table-cell>
          <table:table-cell table:formula="of:=AVERAGE([.B64:.B112])" office:value-type="float" office:value="27.036893877551" calcext:value-type="float">
            <text:p>27.036893877551</text:p>
          </table:table-cell>
          <table:table-cell table:formula="of:=AVERAGE([.B14:.B112])" office:value-type="float" office:value="26.4769494949495" calcext:value-type="float">
            <text:p>26.4769494949495</text:p>
          </table:table-cell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27.8426" calcext:value-type="float">
            <text:p>27.8426</text:p>
          </table:table-cell>
          <table:table-cell office:value-type="float" office:value="9616261.1207703" calcext:value-type="float">
            <text:p>9616261.1207703</text:p>
          </table:table-cell>
          <table:table-cell table:formula="of:=AVERAGE([.B65:.B113])" office:value-type="float" office:value="27.0766408163265" calcext:value-type="float">
            <text:p>27.0766408163265</text:p>
          </table:table-cell>
          <table:table-cell table:formula="of:=AVERAGE([.B15:.B113])" office:value-type="float" office:value="26.5065252525253" calcext:value-type="float">
            <text:p>26.5065252525253</text:p>
          </table:table-cell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27.5337" calcext:value-type="float">
            <text:p>27.5337</text:p>
          </table:table-cell>
          <table:table-cell office:value-type="float" office:value="10683469.815619" calcext:value-type="float">
            <text:p>10683469.815619</text:p>
          </table:table-cell>
          <table:table-cell table:formula="of:=AVERAGE([.B66:.B114])" office:value-type="float" office:value="27.1145836734694" calcext:value-type="float">
            <text:p>27.1145836734694</text:p>
          </table:table-cell>
          <table:table-cell table:formula="of:=AVERAGE([.B16:.B114])" office:value-type="float" office:value="26.5348626262626" calcext:value-type="float">
            <text:p>26.5348626262626</text:p>
          </table:table-cell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27.6559" calcext:value-type="float">
            <text:p>27.6559</text:p>
          </table:table-cell>
          <table:table-cell office:value-type="float" office:value="10450640.558358" calcext:value-type="float">
            <text:p>10450640.558358</text:p>
          </table:table-cell>
          <table:table-cell table:formula="of:=AVERAGE([.B67:.B115])" office:value-type="float" office:value="27.1494959183673" calcext:value-type="float">
            <text:p>27.1494959183673</text:p>
          </table:table-cell>
          <table:table-cell table:formula="of:=AVERAGE([.B17:.B115])" office:value-type="float" office:value="26.5589676767677" calcext:value-type="float">
            <text:p>26.5589676767677</text:p>
          </table:table-cell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27.8277" calcext:value-type="float">
            <text:p>27.8277</text:p>
          </table:table-cell>
          <table:table-cell office:value-type="float" office:value="13266283.699469" calcext:value-type="float">
            <text:p>13266283.699469</text:p>
          </table:table-cell>
          <table:table-cell table:formula="of:=AVERAGE([.B68:.B116])" office:value-type="float" office:value="27.1780163265306" calcext:value-type="float">
            <text:p>27.1780163265306</text:p>
          </table:table-cell>
          <table:table-cell table:formula="of:=AVERAGE([.B18:.B116])" office:value-type="float" office:value="26.5843070707071" calcext:value-type="float">
            <text:p>26.5843070707071</text:p>
          </table:table-cell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office:value-type="float" office:value="27.8277" calcext:value-type="float">
            <text:p>27.8277</text:p>
          </table:table-cell>
          <table:table-cell office:value-type="float" office:value="13266283.699469" calcext:value-type="float">
            <text:p>13266283.699469</text:p>
          </table:table-cell>
          <table:table-cell table:formula="of:=AVERAGE([.B69:.B117])" office:value-type="float" office:value="27.2103775510204" calcext:value-type="float">
            <text:p>27.2103775510204</text:p>
          </table:table-cell>
          <table:table-cell table:formula="of:=AVERAGE([.B19:.B117])" office:value-type="float" office:value="26.6100060606061" calcext:value-type="float">
            <text:p>26.6100060606061</text:p>
          </table:table-cell>
        </table:table-row>
        <table:table-row table:style-name="ro1">
          <table:table-cell office:value-type="date" office:date-value="2024-09-29" calcext:value-type="date">
            <text:p>2024-09-29</text:p>
          </table:table-cell>
          <table:table-cell office:value-type="float" office:value="27.8277" calcext:value-type="float">
            <text:p>27.8277</text:p>
          </table:table-cell>
          <table:table-cell office:value-type="float" office:value="13266283.699469" calcext:value-type="float">
            <text:p>13266283.699469</text:p>
          </table:table-cell>
          <table:table-cell table:formula="of:=AVERAGE([.B70:.B118])" office:value-type="float" office:value="27.2427387755102" calcext:value-type="float">
            <text:p>27.2427387755102</text:p>
          </table:table-cell>
          <table:table-cell table:formula="of:=AVERAGE([.B20:.B118])" office:value-type="float" office:value="26.6355101010101" calcext:value-type="float">
            <text:p>26.6355101010101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27.9168" calcext:value-type="float">
            <text:p>27.9168</text:p>
          </table:table-cell>
          <table:table-cell office:value-type="float" office:value="21814139.915568" calcext:value-type="float">
            <text:p>21814139.915568</text:p>
          </table:table-cell>
          <table:table-cell table:formula="of:=AVERAGE([.B71:.B119])" office:value-type="float" office:value="27.2751" calcext:value-type="float">
            <text:p>27.2751</text:p>
          </table:table-cell>
          <table:table-cell table:formula="of:=AVERAGE([.B21:.B119])" office:value-type="float" office:value="26.6610141414141" calcext:value-type="float">
            <text:p>26.6610141414141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27.9003" calcext:value-type="float">
            <text:p>27.9003</text:p>
          </table:table-cell>
          <table:table-cell office:value-type="float" office:value="13215329.779252" calcext:value-type="float">
            <text:p>13215329.779252</text:p>
          </table:table-cell>
          <table:table-cell table:formula="of:=AVERAGE([.B72:.B120])" office:value-type="float" office:value="27.3118183673469" calcext:value-type="float">
            <text:p>27.3118183673469</text:p>
          </table:table-cell>
          <table:table-cell table:formula="of:=AVERAGE([.B22:.B120])" office:value-type="float" office:value="26.6874181818182" calcext:value-type="float">
            <text:p>26.6874181818182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27.9201" calcext:value-type="float">
            <text:p>27.9201</text:p>
          </table:table-cell>
          <table:table-cell office:value-type="float" office:value="10801150.116857" calcext:value-type="float">
            <text:p>10801150.116857</text:p>
          </table:table-cell>
          <table:table-cell table:formula="of:=AVERAGE([.B73:.B121])" office:value-type="float" office:value="27.3425204081633" calcext:value-type="float">
            <text:p>27.3425204081633</text:p>
          </table:table-cell>
          <table:table-cell table:formula="of:=AVERAGE([.B23:.B121])" office:value-type="float" office:value="26.7100888888889" calcext:value-type="float">
            <text:p>26.7100888888889</text:p>
          </table:table-cell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27.8475" calcext:value-type="float">
            <text:p>27.8475</text:p>
          </table:table-cell>
          <table:table-cell office:value-type="float" office:value="9950097.3210639" calcext:value-type="float">
            <text:p>9950097.3210639</text:p>
          </table:table-cell>
          <table:table-cell table:formula="of:=AVERAGE([.B74:.B122])" office:value-type="float" office:value="27.3729591836735" calcext:value-type="float">
            <text:p>27.3729591836735</text:p>
          </table:table-cell>
          <table:table-cell table:formula="of:=AVERAGE([.B24:.B122])" office:value-type="float" office:value="26.7350212121212" calcext:value-type="float">
            <text:p>26.7350212121212</text:p>
          </table:table-cell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27.9565" calcext:value-type="float">
            <text:p>27.9565</text:p>
          </table:table-cell>
          <table:table-cell office:value-type="float" office:value="9621618.9441372" calcext:value-type="float">
            <text:p>9621618.9441372</text:p>
          </table:table-cell>
          <table:table-cell table:formula="of:=AVERAGE([.B75:.B123])" office:value-type="float" office:value="27.3962387755102" calcext:value-type="float">
            <text:p>27.3962387755102</text:p>
          </table:table-cell>
          <table:table-cell table:formula="of:=AVERAGE([.B25:.B123])" office:value-type="float" office:value="26.760296969697" calcext:value-type="float">
            <text:p>26.760296969697</text:p>
          </table:table-cell>
        </table:table-row>
        <table:table-row table:style-name="ro1">
          <table:table-cell office:value-type="date" office:date-value="2024-10-05" calcext:value-type="date">
            <text:p>2024-10-05</text:p>
          </table:table-cell>
          <table:table-cell office:value-type="float" office:value="27.9565" calcext:value-type="float">
            <text:p>27.9565</text:p>
          </table:table-cell>
          <table:table-cell office:value-type="float" office:value="9621618.9441372" calcext:value-type="float">
            <text:p>9621618.9441372</text:p>
          </table:table-cell>
          <table:table-cell table:formula="of:=AVERAGE([.B76:.B124])" office:value-type="float" office:value="27.4192693877551" calcext:value-type="float">
            <text:p>27.4192693877551</text:p>
          </table:table-cell>
          <table:table-cell table:formula="of:=AVERAGE([.B26:.B124])" office:value-type="float" office:value="26.787203030303" calcext:value-type="float">
            <text:p>26.787203030303</text:p>
          </table:table-cell>
        </table:table-row>
        <table:table-row table:style-name="ro1">
          <table:table-cell office:value-type="date" office:date-value="2024-10-06" calcext:value-type="date">
            <text:p>2024-10-06</text:p>
          </table:table-cell>
          <table:table-cell office:value-type="float" office:value="27.9565" calcext:value-type="float">
            <text:p>27.9565</text:p>
          </table:table-cell>
          <table:table-cell office:value-type="float" office:value="9621618.9441372" calcext:value-type="float">
            <text:p>9621618.9441372</text:p>
          </table:table-cell>
          <table:table-cell table:formula="of:=AVERAGE([.B77:.B125])" office:value-type="float" office:value="27.4423" calcext:value-type="float">
            <text:p>27.4423</text:p>
          </table:table-cell>
          <table:table-cell table:formula="of:=AVERAGE([.B27:.B125])" office:value-type="float" office:value="26.8124888888889" calcext:value-type="float">
            <text:p>26.8124888888889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27.8408" calcext:value-type="float">
            <text:p>27.8408</text:p>
          </table:table-cell>
          <table:table-cell office:value-type="float" office:value="12720148.996955" calcext:value-type="float">
            <text:p>12720148.996955</text:p>
          </table:table-cell>
          <table:table-cell table:formula="of:=AVERAGE([.B78:.B126])" office:value-type="float" office:value="27.4653306122449" calcext:value-type="float">
            <text:p>27.4653306122449</text:p>
          </table:table-cell>
          <table:table-cell table:formula="of:=AVERAGE([.B28:.B126])" office:value-type="float" office:value="26.8377747474747" calcext:value-type="float">
            <text:p>26.8377747474747</text:p>
          </table:table-cell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27.7946" calcext:value-type="float">
            <text:p>27.7946</text:p>
          </table:table-cell>
          <table:table-cell office:value-type="float" office:value="10180258.976488" calcext:value-type="float">
            <text:p>10180258.976488</text:p>
          </table:table-cell>
          <table:table-cell table:formula="of:=AVERAGE([.B79:.B127])" office:value-type="float" office:value="27.4827959183673" calcext:value-type="float">
            <text:p>27.4827959183673</text:p>
          </table:table-cell>
          <table:table-cell table:formula="of:=AVERAGE([.B29:.B127])" office:value-type="float" office:value="26.8618919191919" calcext:value-type="float">
            <text:p>26.8618919191919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28.0556" calcext:value-type="float">
            <text:p>28.0556</text:p>
          </table:table-cell>
          <table:table-cell office:value-type="float" office:value="11972917.690133" calcext:value-type="float">
            <text:p>11972917.690133</text:p>
          </table:table-cell>
          <table:table-cell table:formula="of:=AVERAGE([.B80:.B128])" office:value-type="float" office:value="27.5007857142857" calcext:value-type="float">
            <text:p>27.5007857142857</text:p>
          </table:table-cell>
          <table:table-cell table:formula="of:=AVERAGE([.B30:.B128])" office:value-type="float" office:value="26.8867" calcext:value-type="float">
            <text:p>26.8867</text:p>
          </table:table-cell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27.9466" calcext:value-type="float">
            <text:p>27.9466</text:p>
          </table:table-cell>
          <table:table-cell office:value-type="float" office:value="9723045.3445125" calcext:value-type="float">
            <text:p>9723045.3445125</text:p>
          </table:table-cell>
          <table:table-cell table:formula="of:=AVERAGE([.B81:.B129])" office:value-type="float" office:value="27.5217653061224" calcext:value-type="float">
            <text:p>27.5217653061224</text:p>
          </table:table-cell>
          <table:table-cell table:formula="of:=AVERAGE([.B31:.B129])" office:value-type="float" office:value="26.9140121212121" calcext:value-type="float">
            <text:p>26.9140121212121</text:p>
          </table:table-cell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28.2768" calcext:value-type="float">
            <text:p>28.2768</text:p>
          </table:table-cell>
          <table:table-cell office:value-type="float" office:value="10030387.796329" calcext:value-type="float">
            <text:p>10030387.796329</text:p>
          </table:table-cell>
          <table:table-cell table:formula="of:=AVERAGE([.B82:.B130])" office:value-type="float" office:value="27.5420571428571" calcext:value-type="float">
            <text:p>27.5420571428571</text:p>
          </table:table-cell>
          <table:table-cell table:formula="of:=AVERAGE([.B32:.B130])" office:value-type="float" office:value="26.9411161616162" calcext:value-type="float">
            <text:p>26.9411161616162</text:p>
          </table:table-cell>
        </table:table-row>
        <table:table-row table:style-name="ro1">
          <table:table-cell office:value-type="date" office:date-value="2024-10-12" calcext:value-type="date">
            <text:p>2024-10-12</text:p>
          </table:table-cell>
          <table:table-cell office:value-type="float" office:value="28.2768" calcext:value-type="float">
            <text:p>28.2768</text:p>
          </table:table-cell>
          <table:table-cell office:value-type="float" office:value="10030387.796329" calcext:value-type="float">
            <text:p>10030387.796329</text:p>
          </table:table-cell>
          <table:table-cell table:formula="of:=AVERAGE([.B83:.B131])" office:value-type="float" office:value="27.5612040816327" calcext:value-type="float">
            <text:p>27.5612040816327</text:p>
          </table:table-cell>
          <table:table-cell table:formula="of:=AVERAGE([.B33:.B131])" office:value-type="float" office:value="26.9715555555556" calcext:value-type="float">
            <text:p>26.9715555555556</text:p>
          </table:table-cell>
        </table:table-row>
        <table:table-row table:style-name="ro1">
          <table:table-cell office:value-type="date" office:date-value="2024-10-13" calcext:value-type="date">
            <text:p>2024-10-13</text:p>
          </table:table-cell>
          <table:table-cell office:value-type="float" office:value="28.2768" calcext:value-type="float">
            <text:p>28.2768</text:p>
          </table:table-cell>
          <table:table-cell office:value-type="float" office:value="10030387.796329" calcext:value-type="float">
            <text:p>10030387.796329</text:p>
          </table:table-cell>
          <table:table-cell table:formula="of:=AVERAGE([.B84:.B132])" office:value-type="float" office:value="27.5803510204082" calcext:value-type="float">
            <text:p>27.5803510204082</text:p>
          </table:table-cell>
          <table:table-cell table:formula="of:=AVERAGE([.B34:.B132])" office:value-type="float" office:value="27.0025242424242" calcext:value-type="float">
            <text:p>27.0025242424242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28.4254" calcext:value-type="float">
            <text:p>28.4254</text:p>
          </table:table-cell>
          <table:table-cell office:value-type="float" office:value="9170275.4492349" calcext:value-type="float">
            <text:p>9170275.4492349</text:p>
          </table:table-cell>
          <table:table-cell table:formula="of:=AVERAGE([.B85:.B133])" office:value-type="float" office:value="27.5994979591837" calcext:value-type="float">
            <text:p>27.5994979591837</text:p>
          </table:table-cell>
          <table:table-cell table:formula="of:=AVERAGE([.B35:.B133])" office:value-type="float" office:value="27.0334929292929" calcext:value-type="float">
            <text:p>27.0334929292929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28.3065" calcext:value-type="float">
            <text:p>28.3065</text:p>
          </table:table-cell>
          <table:table-cell office:value-type="float" office:value="11321949.162424" calcext:value-type="float">
            <text:p>11321949.162424</text:p>
          </table:table-cell>
          <table:table-cell table:formula="of:=AVERAGE([.B86:.B134])" office:value-type="float" office:value="27.6210102040816" calcext:value-type="float">
            <text:p>27.6210102040816</text:p>
          </table:table-cell>
          <table:table-cell table:formula="of:=AVERAGE([.B36:.B134])" office:value-type="float" office:value="27.0659626262626" calcext:value-type="float">
            <text:p>27.0659626262626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28.5344" calcext:value-type="float">
            <text:p>28.5344</text:p>
          </table:table-cell>
          <table:table-cell office:value-type="float" office:value="9257081.0095764" calcext:value-type="float">
            <text:p>9257081.0095764</text:p>
          </table:table-cell>
          <table:table-cell table:formula="of:=AVERAGE([.B87:.B135])" office:value-type="float" office:value="27.6410326530612" calcext:value-type="float">
            <text:p>27.6410326530612</text:p>
          </table:table-cell>
          <table:table-cell table:formula="of:=AVERAGE([.B37:.B135])" office:value-type="float" office:value="27.097" calcext:value-type="float">
            <text:p>27.097</text:p>
          </table:table-cell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28.5443" calcext:value-type="float">
            <text:p>28.5443</text:p>
          </table:table-cell>
          <table:table-cell office:value-type="float" office:value="8821713.8557548" calcext:value-type="float">
            <text:p>8821713.8557548</text:p>
          </table:table-cell>
          <table:table-cell table:formula="of:=AVERAGE([.B88:.B136])" office:value-type="float" office:value="27.6655714285714" calcext:value-type="float">
            <text:p>27.6655714285714</text:p>
          </table:table-cell>
          <table:table-cell table:formula="of:=AVERAGE([.B38:.B136])" office:value-type="float" office:value="27.1302727272727" calcext:value-type="float">
            <text:p>27.1302727272727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28.5443" calcext:value-type="float">
            <text:p>28.5443</text:p>
          </table:table-cell>
          <table:table-cell office:value-type="float" office:value="8255350.5962928" calcext:value-type="float">
            <text:p>8255350.5962928</text:p>
          </table:table-cell>
          <table:table-cell table:formula="of:=AVERAGE([.B89:.B137])" office:value-type="float" office:value="27.687906122449" calcext:value-type="float">
            <text:p>27.687906122449</text:p>
          </table:table-cell>
          <table:table-cell table:formula="of:=AVERAGE([.B39:.B137])" office:value-type="float" office:value="27.1611333333333" calcext:value-type="float">
            <text:p>27.1611333333333</text:p>
          </table:table-cell>
        </table:table-row>
        <table:table-row table:style-name="ro1">
          <table:table-cell office:value-type="date" office:date-value="2024-10-19" calcext:value-type="date">
            <text:p>2024-10-19</text:p>
          </table:table-cell>
          <table:table-cell office:value-type="float" office:value="28.5443" calcext:value-type="float">
            <text:p>28.5443</text:p>
          </table:table-cell>
          <table:table-cell office:value-type="float" office:value="8255350.5962928" calcext:value-type="float">
            <text:p>8255350.5962928</text:p>
          </table:table-cell>
          <table:table-cell table:formula="of:=AVERAGE([.B90:.B138])" office:value-type="float" office:value="27.7057673469388" calcext:value-type="float">
            <text:p>27.7057673469388</text:p>
          </table:table-cell>
          <table:table-cell table:formula="of:=AVERAGE([.B40:.B138])" office:value-type="float" office:value="27.1888525252525" calcext:value-type="float">
            <text:p>27.1888525252525</text:p>
          </table:table-cell>
        </table:table-row>
        <table:table-row table:style-name="ro1">
          <table:table-cell office:value-type="date" office:date-value="2024-10-20" calcext:value-type="date">
            <text:p>2024-10-20</text:p>
          </table:table-cell>
          <table:table-cell office:value-type="float" office:value="28.5443" calcext:value-type="float">
            <text:p>28.5443</text:p>
          </table:table-cell>
          <table:table-cell office:value-type="float" office:value="8255350.5962928" calcext:value-type="float">
            <text:p>8255350.5962928</text:p>
          </table:table-cell>
          <table:table-cell table:formula="of:=AVERAGE([.B91:.B139])" office:value-type="float" office:value="27.7236285714286" calcext:value-type="float">
            <text:p>27.7236285714286</text:p>
          </table:table-cell>
          <table:table-cell table:formula="of:=AVERAGE([.B41:.B139])" office:value-type="float" office:value="27.2138606060606" calcext:value-type="float">
            <text:p>27.2138606060606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28.2074" calcext:value-type="float">
            <text:p>28.2074</text:p>
          </table:table-cell>
          <table:table-cell office:value-type="float" office:value="13085597.327603" calcext:value-type="float">
            <text:p>13085597.327603</text:p>
          </table:table-cell>
          <table:table-cell table:formula="of:=AVERAGE([.B92:.B140])" office:value-type="float" office:value="27.7414897959184" calcext:value-type="float">
            <text:p>27.7414897959184</text:p>
          </table:table-cell>
          <table:table-cell table:formula="of:=AVERAGE([.B42:.B140])" office:value-type="float" office:value="27.2388686868687" calcext:value-type="float">
            <text:p>27.2388686868687</text:p>
          </table:table-cell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28.0687" calcext:value-type="float">
            <text:p>28.0687</text:p>
          </table:table-cell>
          <table:table-cell office:value-type="float" office:value="11443806.990716" calcext:value-type="float">
            <text:p>11443806.990716</text:p>
          </table:table-cell>
          <table:table-cell table:formula="of:=AVERAGE([.B93:.B141])" office:value-type="float" office:value="27.7524755102041" calcext:value-type="float">
            <text:p>27.7524755102041</text:p>
          </table:table-cell>
          <table:table-cell table:formula="of:=AVERAGE([.B43:.B141])" office:value-type="float" office:value="27.2604737373737" calcext:value-type="float">
            <text:p>27.2604737373737</text:p>
          </table:table-cell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28.0192" calcext:value-type="float">
            <text:p>28.0192</text:p>
          </table:table-cell>
          <table:table-cell office:value-type="float" office:value="11987570.828033" calcext:value-type="float">
            <text:p>11987570.828033</text:p>
          </table:table-cell>
          <table:table-cell table:formula="of:=AVERAGE([.B94:.B142])" office:value-type="float" office:value="27.7656387755102" calcext:value-type="float">
            <text:p>27.7656387755102</text:p>
          </table:table-cell>
          <table:table-cell table:formula="of:=AVERAGE([.B44:.B142])" office:value-type="float" office:value="27.2797181818182" calcext:value-type="float">
            <text:p>27.2797181818182</text:p>
          </table:table-cell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28.0687" calcext:value-type="float">
            <text:p>28.0687</text:p>
          </table:table-cell>
          <table:table-cell office:value-type="float" office:value="8896583.3361405" calcext:value-type="float">
            <text:p>8896583.3361405</text:p>
          </table:table-cell>
          <table:table-cell table:formula="of:=AVERAGE([.B95:.B143])" office:value-type="float" office:value="27.7796632653061" calcext:value-type="float">
            <text:p>27.7796632653061</text:p>
          </table:table-cell>
          <table:table-cell table:formula="of:=AVERAGE([.B45:.B143])" office:value-type="float" office:value="27.2940656565657" calcext:value-type="float">
            <text:p>27.2940656565657</text:p>
          </table:table-cell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27.8904" calcext:value-type="float">
            <text:p>27.8904</text:p>
          </table:table-cell>
          <table:table-cell office:value-type="float" office:value="9391837.7979426" calcext:value-type="float">
            <text:p>9391837.7979426</text:p>
          </table:table-cell>
          <table:table-cell table:formula="of:=AVERAGE([.B96:.B144])" office:value-type="float" office:value="27.7999755102041" calcext:value-type="float">
            <text:p>27.7999755102041</text:p>
          </table:table-cell>
          <table:table-cell table:formula="of:=AVERAGE([.B46:.B144])" office:value-type="float" office:value="27.3054080808081" calcext:value-type="float">
            <text:p>27.3054080808081</text:p>
          </table:table-cell>
        </table:table-row>
        <table:table-row table:style-name="ro1">
          <table:table-cell office:value-type="date" office:date-value="2024-10-26" calcext:value-type="date">
            <text:p>2024-10-26</text:p>
          </table:table-cell>
          <table:table-cell office:value-type="float" office:value="27.8904" calcext:value-type="float">
            <text:p>27.8904</text:p>
          </table:table-cell>
          <table:table-cell office:value-type="float" office:value="9391837.7979426" calcext:value-type="float">
            <text:p>9391837.7979426</text:p>
          </table:table-cell>
          <table:table-cell table:formula="of:=AVERAGE([.B97:.B145])" office:value-type="float" office:value="27.8213897959184" calcext:value-type="float">
            <text:p>27.8213897959184</text:p>
          </table:table-cell>
          <table:table-cell table:formula="of:=AVERAGE([.B47:.B145])" office:value-type="float" office:value="27.317297979798" calcext:value-type="float">
            <text:p>27.317297979798</text:p>
          </table:table-cell>
        </table:table-row>
        <table:table-row table:style-name="ro1">
          <table:table-cell office:value-type="date" office:date-value="2024-10-27" calcext:value-type="date">
            <text:p>2024-10-27</text:p>
          </table:table-cell>
          <table:table-cell office:value-type="float" office:value="27.8904" calcext:value-type="float">
            <text:p>27.8904</text:p>
          </table:table-cell>
          <table:table-cell office:value-type="float" office:value="9391837.7979426" calcext:value-type="float">
            <text:p>9391837.7979426</text:p>
          </table:table-cell>
          <table:table-cell table:formula="of:=AVERAGE([.B98:.B146])" office:value-type="float" office:value="27.8428040816327" calcext:value-type="float">
            <text:p>27.8428040816327</text:p>
          </table:table-cell>
          <table:table-cell table:formula="of:=AVERAGE([.B48:.B146])" office:value-type="float" office:value="27.3308404040404" calcext:value-type="float">
            <text:p>27.3308404040404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28.0588" calcext:value-type="float">
            <text:p>28.0588</text:p>
          </table:table-cell>
          <table:table-cell office:value-type="float" office:value="10443084.876424" calcext:value-type="float">
            <text:p>10443084.876424</text:p>
          </table:table-cell>
          <table:table-cell table:formula="of:=AVERAGE([.B99:.B147])" office:value-type="float" office:value="27.8642183673469" calcext:value-type="float">
            <text:p>27.8642183673469</text:p>
          </table:table-cell>
          <table:table-cell table:formula="of:=AVERAGE([.B49:.B147])" office:value-type="float" office:value="27.3443828282828" calcext:value-type="float">
            <text:p>27.3443828282828</text:p>
          </table:table-cell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27.8309" calcext:value-type="float">
            <text:p>27.8309</text:p>
          </table:table-cell>
          <table:table-cell office:value-type="float" office:value="10304775.322842" calcext:value-type="float">
            <text:p>10304775.322842</text:p>
          </table:table-cell>
          <table:table-cell table:formula="of:=AVERAGE([.B100:.B148])" office:value-type="float" office:value="27.8824571428571" calcext:value-type="float">
            <text:p>27.8824571428571</text:p>
          </table:table-cell>
          <table:table-cell table:formula="of:=AVERAGE([.B50:.B148])" office:value-type="float" office:value="27.3596262626263" calcext:value-type="float">
            <text:p>27.3596262626263</text:p>
          </table:table-cell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27.9201" calcext:value-type="float">
            <text:p>27.9201</text:p>
          </table:table-cell>
          <table:table-cell office:value-type="float" office:value="10601653.266204" calcext:value-type="float">
            <text:p>10601653.266204</text:p>
          </table:table-cell>
          <table:table-cell table:formula="of:=AVERAGE([.B101:.B149])" office:value-type="float" office:value="27.8955775510204" calcext:value-type="float">
            <text:p>27.8955775510204</text:p>
          </table:table-cell>
          <table:table-cell table:formula="of:=AVERAGE([.B51:.B149])" office:value-type="float" office:value="27.3723353535354" calcext:value-type="float">
            <text:p>27.3723353535354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27.9697" calcext:value-type="float">
            <text:p>27.9697</text:p>
          </table:table-cell>
          <table:table-cell office:value-type="float" office:value="11006740.161717" calcext:value-type="float">
            <text:p>11006740.161717</text:p>
          </table:table-cell>
          <table:table-cell table:formula="of:=AVERAGE([.B102:.B150])" office:value-type="float" office:value="27.9139244897959" calcext:value-type="float">
            <text:p>27.9139244897959</text:p>
          </table:table-cell>
          <table:table-cell table:formula="of:=AVERAGE([.B52:.B150])" office:value-type="float" office:value="27.3882606060606" calcext:value-type="float">
            <text:p>27.3882606060606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27.8408" calcext:value-type="float">
            <text:p>27.8408</text:p>
          </table:table-cell>
          <table:table-cell office:value-type="float" office:value="9461205.538785" calcext:value-type="float">
            <text:p>9461205.538785</text:p>
          </table:table-cell>
          <table:table-cell table:formula="of:=AVERAGE([.B103:.B151])" office:value-type="float" office:value="27.9327510204082" calcext:value-type="float">
            <text:p>27.9327510204082</text:p>
          </table:table-cell>
          <table:table-cell table:formula="of:=AVERAGE([.B53:.B151])" office:value-type="float" office:value="27.4039595959596" calcext:value-type="float">
            <text:p>27.4039595959596</text:p>
          </table:table-cell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float" office:value="27.8408" calcext:value-type="float">
            <text:p>27.8408</text:p>
          </table:table-cell>
          <table:table-cell office:value-type="float" office:value="9461205.538785" calcext:value-type="float">
            <text:p>9461205.538785</text:p>
          </table:table-cell>
          <table:table-cell table:formula="of:=AVERAGE([.B104:.B152])" office:value-type="float" office:value="27.9440693877551" calcext:value-type="float">
            <text:p>27.9440693877551</text:p>
          </table:table-cell>
          <table:table-cell table:formula="of:=AVERAGE([.B54:.B152])" office:value-type="float" office:value="27.4167686868687" calcext:value-type="float">
            <text:p>27.4167686868687</text:p>
          </table:table-cell>
        </table:table-row>
        <table:table-row table:style-name="ro1">
          <table:table-cell office:value-type="date" office:date-value="2024-11-03" calcext:value-type="date">
            <text:p>2024-11-03</text:p>
          </table:table-cell>
          <table:table-cell office:value-type="float" office:value="27.8408" calcext:value-type="float">
            <text:p>27.8408</text:p>
          </table:table-cell>
          <table:table-cell office:value-type="float" office:value="9461205.538785" calcext:value-type="float">
            <text:p>9461205.538785</text:p>
          </table:table-cell>
          <table:table-cell table:formula="of:=AVERAGE([.B105:.B153])" office:value-type="float" office:value="27.955387755102" calcext:value-type="float">
            <text:p>27.955387755102</text:p>
          </table:table-cell>
          <table:table-cell table:formula="of:=AVERAGE([.B55:.B153])" office:value-type="float" office:value="27.4253131313131" calcext:value-type="float">
            <text:p>27.4253131313131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27.8706" calcext:value-type="float">
            <text:p>27.8706</text:p>
          </table:table-cell>
          <table:table-cell office:value-type="float" office:value="10861179.737308" calcext:value-type="float">
            <text:p>10861179.737308</text:p>
          </table:table-cell>
          <table:table-cell table:formula="of:=AVERAGE([.B106:.B154])" office:value-type="float" office:value="27.966706122449" calcext:value-type="float">
            <text:p>27.966706122449</text:p>
          </table:table-cell>
          <table:table-cell table:formula="of:=AVERAGE([.B56:.B154])" office:value-type="float" office:value="27.4338575757576" calcext:value-type="float">
            <text:p>27.4338575757576</text:p>
          </table:table-cell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28.1183" calcext:value-type="float">
            <text:p>28.1183</text:p>
          </table:table-cell>
          <table:table-cell office:value-type="float" office:value="10192142.572412" calcext:value-type="float">
            <text:p>10192142.572412</text:p>
          </table:table-cell>
          <table:table-cell table:formula="of:=AVERAGE([.B107:.B155])" office:value-type="float" office:value="27.9733551020408" calcext:value-type="float">
            <text:p>27.9733551020408</text:p>
          </table:table-cell>
          <table:table-cell table:formula="of:=AVERAGE([.B57:.B155])" office:value-type="float" office:value="27.442703030303" calcext:value-type="float">
            <text:p>27.442703030303</text:p>
          </table:table-cell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28.7722" calcext:value-type="float">
            <text:p>28.7722</text:p>
          </table:table-cell>
          <table:table-cell office:value-type="float" office:value="16210620.713988" calcext:value-type="float">
            <text:p>16210620.713988</text:p>
          </table:table-cell>
          <table:table-cell table:formula="of:=AVERAGE([.B108:.B156])" office:value-type="float" office:value="27.9854591836735" calcext:value-type="float">
            <text:p>27.9854591836735</text:p>
          </table:table-cell>
          <table:table-cell table:formula="of:=AVERAGE([.B58:.B156])" office:value-type="float" office:value="27.4551090909091" calcext:value-type="float">
            <text:p>27.4551090909091</text:p>
          </table:table-cell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28.6434" calcext:value-type="float">
            <text:p>28.6434</text:p>
          </table:table-cell>
          <table:table-cell office:value-type="float" office:value="13346399.564398" calcext:value-type="float">
            <text:p>13346399.564398</text:p>
          </table:table-cell>
          <table:table-cell table:formula="of:=AVERAGE([.B109:.B157])" office:value-type="float" office:value="28.0105755102041" calcext:value-type="float">
            <text:p>28.0105755102041</text:p>
          </table:table-cell>
          <table:table-cell table:formula="of:=AVERAGE([.B59:.B157])" office:value-type="float" office:value="27.4719707070707" calcext:value-type="float">
            <text:p>27.4719707070707</text:p>
          </table:table-cell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28.8118" calcext:value-type="float">
            <text:p>28.8118</text:p>
          </table:table-cell>
          <table:table-cell office:value-type="float" office:value="11782674.177975" calcext:value-type="float">
            <text:p>11782674.177975</text:p>
          </table:table-cell>
          <table:table-cell table:formula="of:=AVERAGE([.B110:.B158])" office:value-type="float" office:value="28.0281857142857" calcext:value-type="float">
            <text:p>28.0281857142857</text:p>
          </table:table-cell>
          <table:table-cell table:formula="of:=AVERAGE([.B60:.B158])" office:value-type="float" office:value="27.4882585858586" calcext:value-type="float">
            <text:p>27.4882585858586</text:p>
          </table:table-cell>
        </table:table-row>
        <table:table-row table:style-name="ro1">
          <table:table-cell office:value-type="date" office:date-value="2024-11-09" calcext:value-type="date">
            <text:p>2024-11-09</text:p>
          </table:table-cell>
          <table:table-cell office:value-type="float" office:value="28.8118" calcext:value-type="float">
            <text:p>28.8118</text:p>
          </table:table-cell>
          <table:table-cell office:value-type="float" office:value="11782674.177975" calcext:value-type="float">
            <text:p>11782674.177975</text:p>
          </table:table-cell>
          <table:table-cell table:formula="of:=AVERAGE([.B111:.B159])" office:value-type="float" office:value="28.0518387755102" calcext:value-type="float">
            <text:p>28.0518387755102</text:p>
          </table:table-cell>
          <table:table-cell table:formula="of:=AVERAGE([.B61:.B159])" office:value-type="float" office:value="27.5089585858586" calcext:value-type="float">
            <text:p>27.5089585858586</text:p>
          </table:table-cell>
        </table:table-row>
        <table:table-row table:style-name="ro1">
          <table:table-cell office:value-type="date" office:date-value="2024-11-10" calcext:value-type="date">
            <text:p>2024-11-10</text:p>
          </table:table-cell>
          <table:table-cell office:value-type="float" office:value="28.8118" calcext:value-type="float">
            <text:p>28.8118</text:p>
          </table:table-cell>
          <table:table-cell office:value-type="float" office:value="11782674.177975" calcext:value-type="float">
            <text:p>11782674.177975</text:p>
          </table:table-cell>
          <table:table-cell table:formula="of:=AVERAGE([.B112:.B160])" office:value-type="float" office:value="28.0754918367347" calcext:value-type="float">
            <text:p>28.0754918367347</text:p>
          </table:table-cell>
          <table:table-cell table:formula="of:=AVERAGE([.B62:.B160])" office:value-type="float" office:value="27.5328333333333" calcext:value-type="float">
            <text:p>27.5328333333333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28.8911" calcext:value-type="float">
            <text:p>28.8911</text:p>
          </table:table-cell>
          <table:table-cell office:value-type="float" office:value="11268613.274619" calcext:value-type="float">
            <text:p>11268613.274619</text:p>
          </table:table-cell>
          <table:table-cell table:formula="of:=AVERAGE([.B113:.B161])" office:value-type="float" office:value="28.0991448979592" calcext:value-type="float">
            <text:p>28.0991448979592</text:p>
          </table:table-cell>
          <table:table-cell table:formula="of:=AVERAGE([.B63:.B161])" office:value-type="float" office:value="27.5567080808081" calcext:value-type="float">
            <text:p>27.5567080808081</text:p>
          </table:table-cell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28.6434" calcext:value-type="float">
            <text:p>28.6434</text:p>
          </table:table-cell>
          <table:table-cell office:value-type="float" office:value="13358721.200124" calcext:value-type="float">
            <text:p>13358721.200124</text:p>
          </table:table-cell>
          <table:table-cell table:formula="of:=AVERAGE([.B114:.B162])" office:value-type="float" office:value="28.1214102040816" calcext:value-type="float">
            <text:p>28.1214102040816</text:p>
          </table:table-cell>
          <table:table-cell table:formula="of:=AVERAGE([.B64:.B162])" office:value-type="float" office:value="27.5813838383838" calcext:value-type="float">
            <text:p>27.5813838383838</text:p>
          </table:table-cell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28.7425" calcext:value-type="float">
            <text:p>28.7425</text:p>
          </table:table-cell>
          <table:table-cell office:value-type="float" office:value="10600791.316916" calcext:value-type="float">
            <text:p>10600791.316916</text:p>
          </table:table-cell>
          <table:table-cell table:formula="of:=AVERAGE([.B115:.B163])" office:value-type="float" office:value="28.1377530612245" calcext:value-type="float">
            <text:p>28.1377530612245</text:p>
          </table:table-cell>
          <table:table-cell table:formula="of:=AVERAGE([.B65:.B163])" office:value-type="float" office:value="27.6095747474748" calcext:value-type="float">
            <text:p>27.6095747474748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28.6137" calcext:value-type="float">
            <text:p>28.6137</text:p>
          </table:table-cell>
          <table:table-cell office:value-type="float" office:value="8985115.8229833" calcext:value-type="float">
            <text:p>8985115.8229833</text:p>
          </table:table-cell>
          <table:table-cell table:formula="of:=AVERAGE([.B116:.B164])" office:value-type="float" office:value="28.1624224489796" calcext:value-type="float">
            <text:p>28.1624224489796</text:p>
          </table:table-cell>
          <table:table-cell table:formula="of:=AVERAGE([.B66:.B164])" office:value-type="float" office:value="27.6374444444444" calcext:value-type="float">
            <text:p>27.6374444444444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28.366" calcext:value-type="float">
            <text:p>28.366</text:p>
          </table:table-cell>
          <table:table-cell office:value-type="float" office:value="12666122.742273" calcext:value-type="float">
            <text:p>12666122.742273</text:p>
          </table:table-cell>
          <table:table-cell table:formula="of:=AVERAGE([.B117:.B165])" office:value-type="float" office:value="28.1819693877551" calcext:value-type="float">
            <text:p>28.1819693877551</text:p>
          </table:table-cell>
          <table:table-cell table:formula="of:=AVERAGE([.B67:.B165])" office:value-type="float" office:value="27.6656333333333" calcext:value-type="float">
            <text:p>27.6656333333333</text:p>
          </table:table-cell>
        </table:table-row>
        <table:table-row table:style-name="ro1">
          <table:table-cell office:value-type="date" office:date-value="2024-11-16" calcext:value-type="date">
            <text:p>2024-11-16</text:p>
          </table:table-cell>
          <table:table-cell office:value-type="float" office:value="28.366" calcext:value-type="float">
            <text:p>28.366</text:p>
          </table:table-cell>
          <table:table-cell office:value-type="float" office:value="12666122.742273" calcext:value-type="float">
            <text:p>12666122.742273</text:p>
          </table:table-cell>
          <table:table-cell table:formula="of:=AVERAGE([.B118:.B166])" office:value-type="float" office:value="28.1929551020408" calcext:value-type="float">
            <text:p>28.1929551020408</text:p>
          </table:table-cell>
          <table:table-cell table:formula="of:=AVERAGE([.B68:.B166])" office:value-type="float" office:value="27.6869222222222" calcext:value-type="float">
            <text:p>27.6869222222222</text:p>
          </table:table-cell>
        </table:table-row>
        <table:table-row table:style-name="ro1">
          <table:table-cell office:value-type="date" office:date-value="2024-11-17" calcext:value-type="date">
            <text:p>2024-11-17</text:p>
          </table:table-cell>
          <table:table-cell office:value-type="float" office:value="28.366" calcext:value-type="float">
            <text:p>28.366</text:p>
          </table:table-cell>
          <table:table-cell office:value-type="float" office:value="12666122.742273" calcext:value-type="float">
            <text:p>12666122.742273</text:p>
          </table:table-cell>
          <table:table-cell table:formula="of:=AVERAGE([.B119:.B167])" office:value-type="float" office:value="28.2039408163265" calcext:value-type="float">
            <text:p>28.2039408163265</text:p>
          </table:table-cell>
          <table:table-cell table:formula="of:=AVERAGE([.B69:.B167])" office:value-type="float" office:value="27.7083767676768" calcext:value-type="float">
            <text:p>27.7083767676768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28.5245" calcext:value-type="float">
            <text:p>28.5245</text:p>
          </table:table-cell>
          <table:table-cell office:value-type="float" office:value="11198275.5885" calcext:value-type="float">
            <text:p>11198275.5885</text:p>
          </table:table-cell>
          <table:table-cell table:formula="of:=AVERAGE([.B120:.B168])" office:value-type="float" office:value="28.2149265306122" calcext:value-type="float">
            <text:p>28.2149265306122</text:p>
          </table:table-cell>
          <table:table-cell table:formula="of:=AVERAGE([.B70:.B168])" office:value-type="float" office:value="27.7298313131313" calcext:value-type="float">
            <text:p>27.7298313131313</text:p>
          </table:table-cell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28.3759" calcext:value-type="float">
            <text:p>28.3759</text:p>
          </table:table-cell>
          <table:table-cell office:value-type="float" office:value="11766026.646875" calcext:value-type="float">
            <text:p>11766026.646875</text:p>
          </table:table-cell>
          <table:table-cell table:formula="of:=AVERAGE([.B121:.B169])" office:value-type="float" office:value="28.2273285714286" calcext:value-type="float">
            <text:p>28.2273285714286</text:p>
          </table:table-cell>
          <table:table-cell table:formula="of:=AVERAGE([.B71:.B169])" office:value-type="float" office:value="27.7528868686869" calcext:value-type="float">
            <text:p>27.7528868686869</text:p>
          </table:table-cell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28.4452" calcext:value-type="float">
            <text:p>28.4452</text:p>
          </table:table-cell>
          <table:table-cell office:value-type="float" office:value="9287123.0711259" calcext:value-type="float">
            <text:p>9287123.0711259</text:p>
          </table:table-cell>
          <table:table-cell table:formula="of:=AVERAGE([.B122:.B170])" office:value-type="float" office:value="28.2370346938776" calcext:value-type="float">
            <text:p>28.2370346938776</text:p>
          </table:table-cell>
          <table:table-cell table:formula="of:=AVERAGE([.B72:.B170])" office:value-type="float" office:value="27.775697979798" calcext:value-type="float">
            <text:p>27.775697979798</text:p>
          </table:table-cell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28.7127" calcext:value-type="float">
            <text:p>28.7127</text:p>
          </table:table-cell>
          <table:table-cell office:value-type="float" office:value="11236138.780066" calcext:value-type="float">
            <text:p>11236138.780066</text:p>
          </table:table-cell>
          <table:table-cell table:formula="of:=AVERAGE([.B123:.B171])" office:value-type="float" office:value="28.2477510204082" calcext:value-type="float">
            <text:p>28.2477510204082</text:p>
          </table:table-cell>
          <table:table-cell table:formula="of:=AVERAGE([.B73:.B171])" office:value-type="float" office:value="27.796397979798" calcext:value-type="float">
            <text:p>27.796397979798</text:p>
          </table:table-cell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29.0793" calcext:value-type="float">
            <text:p>29.0793</text:p>
          </table:table-cell>
          <table:table-cell office:value-type="float" office:value="12341375.778131" calcext:value-type="float">
            <text:p>12341375.778131</text:p>
          </table:table-cell>
          <table:table-cell table:formula="of:=AVERAGE([.B124:.B172])" office:value-type="float" office:value="28.2654081632653" calcext:value-type="float">
            <text:p>28.2654081632653</text:p>
          </table:table-cell>
          <table:table-cell table:formula="of:=AVERAGE([.B74:.B172])" office:value-type="float" office:value="27.8194696969697" calcext:value-type="float">
            <text:p>27.8194696969697</text:p>
          </table:table-cell>
        </table:table-row>
        <table:table-row table:style-name="ro1">
          <table:table-cell office:value-type="date" office:date-value="2024-11-23" calcext:value-type="date">
            <text:p>2024-11-23</text:p>
          </table:table-cell>
          <table:table-cell office:value-type="float" office:value="29.0793" calcext:value-type="float">
            <text:p>29.0793</text:p>
          </table:table-cell>
          <table:table-cell office:value-type="float" office:value="12341375.778131" calcext:value-type="float">
            <text:p>12341375.778131</text:p>
          </table:table-cell>
          <table:table-cell table:formula="of:=AVERAGE([.B125:.B173])" office:value-type="float" office:value="28.2883224489796" calcext:value-type="float">
            <text:p>28.2883224489796</text:p>
          </table:table-cell>
          <table:table-cell table:formula="of:=AVERAGE([.B75:.B173])" office:value-type="float" office:value="27.8434343434343" calcext:value-type="float">
            <text:p>27.8434343434343</text:p>
          </table:table-cell>
        </table:table-row>
        <table:table-row table:style-name="ro1">
          <table:table-cell office:value-type="date" office:date-value="2024-11-24" calcext:value-type="date">
            <text:p>2024-11-24</text:p>
          </table:table-cell>
          <table:table-cell office:value-type="float" office:value="29.0793" calcext:value-type="float">
            <text:p>29.0793</text:p>
          </table:table-cell>
          <table:table-cell office:value-type="float" office:value="12341375.778131" calcext:value-type="float">
            <text:p>12341375.778131</text:p>
          </table:table-cell>
          <table:table-cell table:formula="of:=AVERAGE([.B126:.B174])" office:value-type="float" office:value="28.3112367346939" calcext:value-type="float">
            <text:p>28.3112367346939</text:p>
          </table:table-cell>
          <table:table-cell table:formula="of:=AVERAGE([.B76:.B174])" office:value-type="float" office:value="27.8661747474747" calcext:value-type="float">
            <text:p>27.8661747474747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29.2378" calcext:value-type="float">
            <text:p>29.2378</text:p>
          </table:table-cell>
          <table:table-cell office:value-type="float" office:value="12436225.525624" calcext:value-type="float">
            <text:p>12436225.525624</text:p>
          </table:table-cell>
          <table:table-cell table:formula="of:=AVERAGE([.B127:.B175])" office:value-type="float" office:value="28.3341510204082" calcext:value-type="float">
            <text:p>28.3341510204082</text:p>
          </table:table-cell>
          <table:table-cell table:formula="of:=AVERAGE([.B77:.B175])" office:value-type="float" office:value="27.8889151515152" calcext:value-type="float">
            <text:p>27.8889151515152</text:p>
          </table:table-cell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29.1784" calcext:value-type="float">
            <text:p>29.1784</text:p>
          </table:table-cell>
          <table:table-cell office:value-type="float" office:value="11411851.28063" calcext:value-type="float">
            <text:p>11411851.28063</text:p>
          </table:table-cell>
          <table:table-cell table:formula="of:=AVERAGE([.B128:.B176])" office:value-type="float" office:value="28.3626612244898" calcext:value-type="float">
            <text:p>28.3626612244898</text:p>
          </table:table-cell>
          <table:table-cell table:formula="of:=AVERAGE([.B78:.B176])" office:value-type="float" office:value="27.9132565656566" calcext:value-type="float">
            <text:p>27.9132565656566</text:p>
          </table:table-cell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29.1685" calcext:value-type="float">
            <text:p>29.1685</text:p>
          </table:table-cell>
          <table:table-cell office:value-type="float" office:value="10645708.564191" calcext:value-type="float">
            <text:p>10645708.564191</text:p>
          </table:table-cell>
          <table:table-cell table:formula="of:=AVERAGE([.B129:.B177])" office:value-type="float" office:value="28.3909020408163" calcext:value-type="float">
            <text:p>28.3909020408163</text:p>
          </table:table-cell>
          <table:table-cell table:formula="of:=AVERAGE([.B79:.B177])" office:value-type="float" office:value="27.9354121212121" calcext:value-type="float">
            <text:p>27.9354121212121</text:p>
          </table:table-cell>
        </table:table-row>
        <table:table-row table:style-name="ro1">
          <table:table-cell office:value-type="date" office:date-value="2024-11-28" calcext:value-type="date">
            <text:p>2024-11-28</text:p>
          </table:table-cell>
          <table:table-cell office:value-type="float" office:value="29.1685" calcext:value-type="float">
            <text:p>29.1685</text:p>
          </table:table-cell>
          <table:table-cell office:value-type="float" office:value="10645708.564191" calcext:value-type="float">
            <text:p>10645708.564191</text:p>
          </table:table-cell>
          <table:table-cell table:formula="of:=AVERAGE([.B130:.B178])" office:value-type="float" office:value="28.4136142857143" calcext:value-type="float">
            <text:p>28.4136142857143</text:p>
          </table:table-cell>
          <table:table-cell table:formula="of:=AVERAGE([.B80:.B178])" office:value-type="float" office:value="27.9581939393939" calcext:value-type="float">
            <text:p>27.9581939393939</text:p>
          </table:table-cell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29.2577" calcext:value-type="float">
            <text:p>29.2577</text:p>
          </table:table-cell>
          <table:table-cell office:value-type="float" office:value="7756844.1431481" calcext:value-type="float">
            <text:p>7756844.1431481</text:p>
          </table:table-cell>
          <table:table-cell table:formula="of:=AVERAGE([.B131:.B179])" office:value-type="float" office:value="28.4385510204082" calcext:value-type="float">
            <text:p>28.4385510204082</text:p>
          </table:table-cell>
          <table:table-cell table:formula="of:=AVERAGE([.B81:.B179])" office:value-type="float" office:value="27.9798191919192" calcext:value-type="float">
            <text:p>27.9798191919192</text:p>
          </table:table-cell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29.2577" calcext:value-type="float">
            <text:p>29.2577</text:p>
          </table:table-cell>
          <table:table-cell office:value-type="float" office:value="7756844.1431481" calcext:value-type="float">
            <text:p>7756844.1431481</text:p>
          </table:table-cell>
          <table:table-cell table:formula="of:=AVERAGE([.B132:.B180])" office:value-type="float" office:value="28.4585693877551" calcext:value-type="float">
            <text:p>28.4585693877551</text:p>
          </table:table-cell>
          <table:table-cell table:formula="of:=AVERAGE([.B82:.B180])" office:value-type="float" office:value="28.0031060606061" calcext:value-type="float">
            <text:p>28.0031060606061</text:p>
          </table:table-cell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float" office:value="29.2577" calcext:value-type="float">
            <text:p>29.2577</text:p>
          </table:table-cell>
          <table:table-cell office:value-type="float" office:value="7756844.1431481" calcext:value-type="float">
            <text:p>7756844.1431481</text:p>
          </table:table-cell>
          <table:table-cell table:formula="of:=AVERAGE([.B133:.B181])" office:value-type="float" office:value="28.478587755102" calcext:value-type="float">
            <text:p>28.478587755102</text:p>
          </table:table-cell>
          <table:table-cell table:formula="of:=AVERAGE([.B83:.B181])" office:value-type="float" office:value="28.0224909090909" calcext:value-type="float">
            <text:p>28.0224909090909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29.0694" calcext:value-type="float">
            <text:p>29.0694</text:p>
          </table:table-cell>
          <table:table-cell office:value-type="float" office:value="15700460.787211" calcext:value-type="float">
            <text:p>15700460.787211</text:p>
          </table:table-cell>
          <table:table-cell table:formula="of:=AVERAGE([.B134:.B182])" office:value-type="float" office:value="28.498606122449" calcext:value-type="float">
            <text:p>28.498606122449</text:p>
          </table:table-cell>
          <table:table-cell table:formula="of:=AVERAGE([.B84:.B182])" office:value-type="float" office:value="28.0418757575758" calcext:value-type="float">
            <text:p>28.0418757575758</text:p>
          </table:table-cell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28.9109" calcext:value-type="float">
            <text:p>28.9109</text:p>
          </table:table-cell>
          <table:table-cell office:value-type="float" office:value="13219770.735772" calcext:value-type="float">
            <text:p>13219770.735772</text:p>
          </table:table-cell>
          <table:table-cell table:formula="of:=AVERAGE([.B135:.B183])" office:value-type="float" office:value="28.5117489795918" calcext:value-type="float">
            <text:p>28.5117489795918</text:p>
          </table:table-cell>
          <table:table-cell table:formula="of:=AVERAGE([.B85:.B183])" office:value-type="float" office:value="28.0593585858586" calcext:value-type="float">
            <text:p>28.0593585858586</text:p>
          </table:table-cell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28.6731" calcext:value-type="float">
            <text:p>28.6731</text:p>
          </table:table-cell>
          <table:table-cell office:value-type="float" office:value="16173056.277678" calcext:value-type="float">
            <text:p>16173056.277678</text:p>
          </table:table-cell>
          <table:table-cell table:formula="of:=AVERAGE([.B136:.B184])" office:value-type="float" office:value="28.5240836734694" calcext:value-type="float">
            <text:p>28.5240836734694</text:p>
          </table:table-cell>
          <table:table-cell table:formula="of:=AVERAGE([.B86:.B184])" office:value-type="float" office:value="28.0749101010101" calcext:value-type="float">
            <text:p>28.0749101010101</text:p>
          </table:table-cell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28.683" calcext:value-type="float">
            <text:p>28.683</text:p>
          </table:table-cell>
          <table:table-cell office:value-type="float" office:value="12867918.797234" calcext:value-type="float">
            <text:p>12867918.797234</text:p>
          </table:table-cell>
          <table:table-cell table:formula="of:=AVERAGE([.B137:.B185])" office:value-type="float" office:value="28.5269142857143" calcext:value-type="float">
            <text:p>28.5269142857143</text:p>
          </table:table-cell>
          <table:table-cell table:formula="of:=AVERAGE([.B87:.B185])" office:value-type="float" office:value="28.0885232323232" calcext:value-type="float">
            <text:p>28.0885232323232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28.5542" calcext:value-type="float">
            <text:p>28.5542</text:p>
          </table:table-cell>
          <table:table-cell office:value-type="float" office:value="12789831.641987" calcext:value-type="float">
            <text:p>12789831.641987</text:p>
          </table:table-cell>
          <table:table-cell table:formula="of:=AVERAGE([.B138:.B186])" office:value-type="float" office:value="28.5297448979592" calcext:value-type="float">
            <text:p>28.5297448979592</text:p>
          </table:table-cell>
          <table:table-cell table:formula="of:=AVERAGE([.B88:.B186])" office:value-type="float" office:value="28.1021696969697" calcext:value-type="float">
            <text:p>28.1021696969697</text:p>
          </table:table-cell>
        </table:table-row>
        <table:table-row table:style-name="ro1">
          <table:table-cell office:value-type="date" office:date-value="2024-12-07" calcext:value-type="date">
            <text:p>2024-12-07</text:p>
          </table:table-cell>
          <table:table-cell office:value-type="float" office:value="28.5542" calcext:value-type="float">
            <text:p>28.5542</text:p>
          </table:table-cell>
          <table:table-cell office:value-type="float" office:value="12789831.641987" calcext:value-type="float">
            <text:p>12789831.641987</text:p>
          </table:table-cell>
          <table:table-cell table:formula="of:=AVERAGE([.B139:.B187])" office:value-type="float" office:value="28.5299469387755" calcext:value-type="float">
            <text:p>28.5299469387755</text:p>
          </table:table-cell>
          <table:table-cell table:formula="of:=AVERAGE([.B89:.B187])" office:value-type="float" office:value="28.1133242424242" calcext:value-type="float">
            <text:p>28.1133242424242</text:p>
          </table:table-cell>
        </table:table-row>
        <table:table-row table:style-name="ro1">
          <table:table-cell office:value-type="date" office:date-value="2024-12-08" calcext:value-type="date">
            <text:p>2024-12-08</text:p>
          </table:table-cell>
          <table:table-cell office:value-type="float" office:value="28.5542" calcext:value-type="float">
            <text:p>28.5542</text:p>
          </table:table-cell>
          <table:table-cell office:value-type="float" office:value="12789831.641987" calcext:value-type="float">
            <text:p>12789831.641987</text:p>
          </table:table-cell>
          <table:table-cell table:formula="of:=AVERAGE([.B140:.B188])" office:value-type="float" office:value="28.5301489795918" calcext:value-type="float">
            <text:p>28.5301489795918</text:p>
          </table:table-cell>
          <table:table-cell table:formula="of:=AVERAGE([.B90:.B188])" office:value-type="float" office:value="28.1222646464647" calcext:value-type="float">
            <text:p>28.1222646464647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28.5245" calcext:value-type="float">
            <text:p>28.5245</text:p>
          </table:table-cell>
          <table:table-cell office:value-type="float" office:value="19722631.070142" calcext:value-type="float">
            <text:p>19722631.070142</text:p>
          </table:table-cell>
          <table:table-cell table:formula="of:=AVERAGE([.B141:.B189])" office:value-type="float" office:value="28.5303510204082" calcext:value-type="float">
            <text:p>28.5303510204082</text:p>
          </table:table-cell>
          <table:table-cell table:formula="of:=AVERAGE([.B91:.B189])" office:value-type="float" office:value="28.1312050505051" calcext:value-type="float">
            <text:p>28.1312050505051</text:p>
          </table:table-cell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28.4155" calcext:value-type="float">
            <text:p>28.4155</text:p>
          </table:table-cell>
          <table:table-cell office:value-type="float" office:value="17692114.725285" calcext:value-type="float">
            <text:p>17692114.725285</text:p>
          </table:table-cell>
          <table:table-cell table:formula="of:=AVERAGE([.B142:.B190])" office:value-type="float" office:value="28.5368224489796" calcext:value-type="float">
            <text:p>28.5368224489796</text:p>
          </table:table-cell>
          <table:table-cell table:formula="of:=AVERAGE([.B92:.B190])" office:value-type="float" office:value="28.1398454545455" calcext:value-type="float">
            <text:p>28.1398454545455</text:p>
          </table:table-cell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28.25" calcext:value-type="float">
            <text:p>28.25</text:p>
          </table:table-cell>
          <table:table-cell office:value-type="float" office:value="15896091" calcext:value-type="float">
            <text:p>15896091</text:p>
          </table:table-cell>
          <table:table-cell table:formula="of:=AVERAGE([.B143:.B191])" office:value-type="float" office:value="28.5439" calcext:value-type="float">
            <text:p>28.5439</text:p>
          </table:table-cell>
          <table:table-cell table:formula="of:=AVERAGE([.B93:.B191])" office:value-type="float" office:value="28.1473848484849" calcext:value-type="float">
            <text:p>28.1473848484849</text:p>
          </table:table-cell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28.2" calcext:value-type="float">
            <text:p>28.2</text:p>
          </table:table-cell>
          <table:table-cell office:value-type="float" office:value="14370717" calcext:value-type="float">
            <text:p>14370717</text:p>
          </table:table-cell>
          <table:table-cell table:formula="of:=AVERAGE([.B144:.B192])" office:value-type="float" office:value="28.5486102040816" calcext:value-type="float">
            <text:p>28.5486102040816</text:p>
          </table:table-cell>
          <table:table-cell table:formula="of:=AVERAGE([.B94:.B192])" office:value-type="float" office:value="28.1557313131313" calcext:value-type="float">
            <text:p>28.1557313131313</text:p>
          </table:table-cell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28.13" calcext:value-type="float">
            <text:p>28.13</text:p>
          </table:table-cell>
          <table:table-cell office:value-type="float" office:value="16919650" calcext:value-type="float">
            <text:p>16919650</text:p>
          </table:table-cell>
          <table:table-cell table:formula="of:=AVERAGE([.B145:.B193])" office:value-type="float" office:value="28.5512897959184" calcext:value-type="float">
            <text:p>28.5512897959184</text:p>
          </table:table-cell>
          <table:table-cell table:formula="of:=AVERAGE([.B95:.B193])" office:value-type="float" office:value="28.164498989899" calcext:value-type="float">
            <text:p>28.164498989899</text:p>
          </table:table-cell>
        </table:table-row>
        <table:table-row table:style-name="ro1">
          <table:table-cell office:value-type="date" office:date-value="2024-12-14" calcext:value-type="date">
            <text:p>2024-12-14</text:p>
          </table:table-cell>
          <table:table-cell office:value-type="float" office:value="28.13" calcext:value-type="float">
            <text:p>28.13</text:p>
          </table:table-cell>
          <table:table-cell office:value-type="float" office:value="16919650" calcext:value-type="float">
            <text:p>16919650</text:p>
          </table:table-cell>
          <table:table-cell table:formula="of:=AVERAGE([.B146:.B194])" office:value-type="float" office:value="28.5561795918367" calcext:value-type="float">
            <text:p>28.5561795918367</text:p>
          </table:table-cell>
          <table:table-cell table:formula="of:=AVERAGE([.B96:.B194])" office:value-type="float" office:value="28.1751717171717" calcext:value-type="float">
            <text:p>28.1751717171717</text:p>
          </table:table-cell>
        </table:table-row>
        <table:table-row table:style-name="ro1">
          <table:table-cell office:value-type="date" office:date-value="2024-12-15" calcext:value-type="date">
            <text:p>2024-12-15</text:p>
          </table:table-cell>
          <table:table-cell office:value-type="float" office:value="28.13" calcext:value-type="float">
            <text:p>28.13</text:p>
          </table:table-cell>
          <table:table-cell office:value-type="float" office:value="16919650" calcext:value-type="float">
            <text:p>16919650</text:p>
          </table:table-cell>
          <table:table-cell table:formula="of:=AVERAGE([.B147:.B195])" office:value-type="float" office:value="28.5610693877551" calcext:value-type="float">
            <text:p>28.5610693877551</text:p>
          </table:table-cell>
          <table:table-cell table:formula="of:=AVERAGE([.B97:.B195])" office:value-type="float" office:value="28.1881909090909" calcext:value-type="float">
            <text:p>28.1881909090909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27.87" calcext:value-type="float">
            <text:p>27.87</text:p>
          </table:table-cell>
          <table:table-cell office:value-type="float" office:value="24794000" calcext:value-type="float">
            <text:p>24794000</text:p>
          </table:table-cell>
          <table:table-cell table:formula="of:=AVERAGE([.B148:.B196])" office:value-type="float" office:value="28.5659591836735" calcext:value-type="float">
            <text:p>28.5659591836735</text:p>
          </table:table-cell>
          <table:table-cell table:formula="of:=AVERAGE([.B98:.B196])" office:value-type="float" office:value="28.2012101010101" calcext:value-type="float">
            <text:p>28.2012101010101</text:p>
          </table:table-cell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27.81" calcext:value-type="float">
            <text:p>27.81</text:p>
          </table:table-cell>
          <table:table-cell office:value-type="float" office:value="17417910" calcext:value-type="float">
            <text:p>17417910</text:p>
          </table:table-cell>
          <table:table-cell table:formula="of:=AVERAGE([.B149:.B197])" office:value-type="float" office:value="28.562106122449" calcext:value-type="float">
            <text:p>28.562106122449</text:p>
          </table:table-cell>
          <table:table-cell table:formula="of:=AVERAGE([.B99:.B197])" office:value-type="float" office:value="28.211603030303" calcext:value-type="float">
            <text:p>28.211603030303</text:p>
          </table:table-cell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27.08" calcext:value-type="float">
            <text:p>27.08</text:p>
          </table:table-cell>
          <table:table-cell office:value-type="float" office:value="20343971" calcext:value-type="float">
            <text:p>20343971</text:p>
          </table:table-cell>
          <table:table-cell table:formula="of:=AVERAGE([.B150:.B198])" office:value-type="float" office:value="28.5616795918367" calcext:value-type="float">
            <text:p>28.5616795918367</text:p>
          </table:table-cell>
          <table:table-cell table:formula="of:=AVERAGE([.B100:.B198])" office:value-type="float" office:value="28.2181171717172" calcext:value-type="float">
            <text:p>28.2181171717172</text:p>
          </table:table-cell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26.93" calcext:value-type="float">
            <text:p>26.93</text:p>
          </table:table-cell>
          <table:table-cell office:value-type="float" office:value="22797673" calcext:value-type="float">
            <text:p>22797673</text:p>
          </table:table-cell>
          <table:table-cell table:formula="of:=AVERAGE([.B151:.B199])" office:value-type="float" office:value="28.5445346938776" calcext:value-type="float">
            <text:p>28.5445346938776</text:p>
          </table:table-cell>
          <table:table-cell table:formula="of:=AVERAGE([.B101:.B199])" office:value-type="float" office:value="28.2170262626263" calcext:value-type="float">
            <text:p>28.2170262626263</text:p>
          </table:table-cell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27.29" calcext:value-type="float">
            <text:p>27.29</text:p>
          </table:table-cell>
          <table:table-cell office:value-type="float" office:value="35339507" calcext:value-type="float">
            <text:p>35339507</text:p>
          </table:table-cell>
          <table:table-cell table:formula="of:=AVERAGE([.B152:.B200])" office:value-type="float" office:value="28.5233163265306" calcext:value-type="float">
            <text:p>28.5233163265306</text:p>
          </table:table-cell>
          <table:table-cell table:formula="of:=AVERAGE([.B102:.B200])" office:value-type="float" office:value="28.2161060606061" calcext:value-type="float">
            <text:p>28.2161060606061</text:p>
          </table:table-cell>
        </table:table-row>
        <table:table-row table:style-name="ro1">
          <table:table-cell office:value-type="date" office:date-value="2024-12-21" calcext:value-type="date">
            <text:p>2024-12-21</text:p>
          </table:table-cell>
          <table:table-cell office:value-type="float" office:value="27.29" calcext:value-type="float">
            <text:p>27.29</text:p>
          </table:table-cell>
          <table:table-cell office:value-type="float" office:value="35339507" calcext:value-type="float">
            <text:p>35339507</text:p>
          </table:table-cell>
          <table:table-cell table:formula="of:=AVERAGE([.B153:.B201])" office:value-type="float" office:value="28.5120755102041" calcext:value-type="float">
            <text:p>28.5120755102041</text:p>
          </table:table-cell>
          <table:table-cell table:formula="of:=AVERAGE([.B103:.B201])" office:value-type="float" office:value="28.2185585858586" calcext:value-type="float">
            <text:p>28.2185585858586</text:p>
          </table:table-cell>
        </table:table-row>
        <table:table-row table:style-name="ro1">
          <table:table-cell office:value-type="date" office:date-value="2024-12-22" calcext:value-type="date">
            <text:p>2024-12-22</text:p>
          </table:table-cell>
          <table:table-cell office:value-type="float" office:value="27.29" calcext:value-type="float">
            <text:p>27.29</text:p>
          </table:table-cell>
          <table:table-cell office:value-type="float" office:value="35339507" calcext:value-type="float">
            <text:p>35339507</text:p>
          </table:table-cell>
          <table:table-cell table:formula="of:=AVERAGE([.B154:.B202])" office:value-type="float" office:value="28.5008346938776" calcext:value-type="float">
            <text:p>28.5008346938776</text:p>
          </table:table-cell>
          <table:table-cell table:formula="of:=AVERAGE([.B104:.B202])" office:value-type="float" office:value="28.218596969697" calcext:value-type="float">
            <text:p>28.218596969697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27.37" calcext:value-type="float">
            <text:p>27.37</text:p>
          </table:table-cell>
          <table:table-cell office:value-type="float" office:value="22013796" calcext:value-type="float">
            <text:p>22013796</text:p>
          </table:table-cell>
          <table:table-cell table:formula="of:=AVERAGE([.B155:.B203])" office:value-type="float" office:value="28.489593877551" calcext:value-type="float">
            <text:p>28.489593877551</text:p>
          </table:table-cell>
          <table:table-cell table:formula="of:=AVERAGE([.B105:.B203])" office:value-type="float" office:value="28.2186353535354" calcext:value-type="float">
            <text:p>28.2186353535354</text:p>
          </table:table-cell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27.58" calcext:value-type="float">
            <text:p>27.58</text:p>
          </table:table-cell>
          <table:table-cell office:value-type="float" office:value="9522506" calcext:value-type="float">
            <text:p>9522506</text:p>
          </table:table-cell>
          <table:table-cell table:formula="of:=AVERAGE([.B156:.B204])" office:value-type="float" office:value="28.4793775510204" calcext:value-type="float">
            <text:p>28.4793775510204</text:p>
          </table:table-cell>
          <table:table-cell table:formula="of:=AVERAGE([.B106:.B204])" office:value-type="float" office:value="28.2194818181818" calcext:value-type="float">
            <text:p>28.2194818181818</text:p>
          </table:table-cell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float" office:value="27.58" calcext:value-type="float">
            <text:p>27.58</text:p>
          </table:table-cell>
          <table:table-cell office:value-type="float" office:value="9522506" calcext:value-type="float">
            <text:p>9522506</text:p>
          </table:table-cell>
          <table:table-cell table:formula="of:=AVERAGE([.B157:.B205])" office:value-type="float" office:value="28.4683918367347" calcext:value-type="float">
            <text:p>28.4683918367347</text:p>
          </table:table-cell>
          <table:table-cell table:formula="of:=AVERAGE([.B107:.B205])" office:value-type="float" office:value="28.2198373737374" calcext:value-type="float">
            <text:p>28.2198373737374</text:p>
          </table:table-cell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27.59" calcext:value-type="float">
            <text:p>27.59</text:p>
          </table:table-cell>
          <table:table-cell office:value-type="float" office:value="14137693" calcext:value-type="float">
            <text:p>14137693</text:p>
          </table:table-cell>
          <table:table-cell table:formula="of:=AVERAGE([.B158:.B206])" office:value-type="float" office:value="28.4440612244898" calcext:value-type="float">
            <text:p>28.4440612244898</text:p>
          </table:table-cell>
          <table:table-cell table:formula="of:=AVERAGE([.B108:.B206])" office:value-type="float" office:value="28.2203909090909" calcext:value-type="float">
            <text:p>28.2203909090909</text:p>
          </table:table-cell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27.47" calcext:value-type="float">
            <text:p>27.47</text:p>
          </table:table-cell>
          <table:table-cell office:value-type="float" office:value="16074005" calcext:value-type="float">
            <text:p>16074005</text:p>
          </table:table-cell>
          <table:table-cell table:formula="of:=AVERAGE([.B159:.B207])" office:value-type="float" office:value="28.4225632653061" calcext:value-type="float">
            <text:p>28.4225632653061</text:p>
          </table:table-cell>
          <table:table-cell table:formula="of:=AVERAGE([.B109:.B207])" office:value-type="float" office:value="28.2208808080808" calcext:value-type="float">
            <text:p>28.2208808080808</text:p>
          </table:table-cell>
        </table:table-row>
        <table:table-row table:style-name="ro1">
          <table:table-cell office:value-type="date" office:date-value="2024-12-28" calcext:value-type="date">
            <text:p>2024-12-28</text:p>
          </table:table-cell>
          <table:table-cell office:value-type="float" office:value="27.47" calcext:value-type="float">
            <text:p>27.47</text:p>
          </table:table-cell>
          <table:table-cell office:value-type="float" office:value="16074005" calcext:value-type="float">
            <text:p>16074005</text:p>
          </table:table-cell>
          <table:table-cell table:formula="of:=AVERAGE([.B160:.B208])" office:value-type="float" office:value="28.3951795918367" calcext:value-type="float">
            <text:p>28.3951795918367</text:p>
          </table:table-cell>
          <table:table-cell table:formula="of:=AVERAGE([.B110:.B208])" office:value-type="float" office:value="28.2177444444444" calcext:value-type="float">
            <text:p>28.2177444444444</text:p>
          </table:table-cell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float" office:value="27.47" calcext:value-type="float">
            <text:p>27.47</text:p>
          </table:table-cell>
          <table:table-cell office:value-type="float" office:value="16074005" calcext:value-type="float">
            <text:p>16074005</text:p>
          </table:table-cell>
          <table:table-cell table:formula="of:=AVERAGE([.B161:.B209])" office:value-type="float" office:value="28.3677959183673" calcext:value-type="float">
            <text:p>28.3677959183673</text:p>
          </table:table-cell>
          <table:table-cell table:formula="of:=AVERAGE([.B111:.B209])" office:value-type="float" office:value="28.215897979798" calcext:value-type="float">
            <text:p>28.215897979798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27.23" calcext:value-type="float">
            <text:p>27.23</text:p>
          </table:table-cell>
          <table:table-cell office:value-type="float" office:value="16946416" calcext:value-type="float">
            <text:p>16946416</text:p>
          </table:table-cell>
          <table:table-cell table:formula="of:=AVERAGE([.B162:.B210])" office:value-type="float" office:value="28.340412244898" calcext:value-type="float">
            <text:p>28.340412244898</text:p>
          </table:table-cell>
          <table:table-cell table:formula="of:=AVERAGE([.B112:.B210])" office:value-type="float" office:value="28.2140515151515" calcext:value-type="float">
            <text:p>28.2140515151515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27.32" calcext:value-type="float">
            <text:p>27.32</text:p>
          </table:table-cell>
          <table:table-cell office:value-type="float" office:value="13234120" calcext:value-type="float">
            <text:p>13234120</text:p>
          </table:table-cell>
          <table:table-cell table:formula="of:=AVERAGE([.B163:.B211])" office:value-type="float" office:value="28.306512244898" calcext:value-type="float">
            <text:p>28.306512244898</text:p>
          </table:table-cell>
          <table:table-cell table:formula="of:=AVERAGE([.B113:.B211])" office:value-type="float" office:value="28.2097808080808" calcext:value-type="float">
            <text:p>28.2097808080808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float" office:value="27.32" calcext:value-type="float">
            <text:p>27.32</text:p>
          </table:table-cell>
          <table:table-cell office:value-type="float" office:value="13234120" calcext:value-type="float">
            <text:p>13234120</text:p>
          </table:table-cell>
          <table:table-cell table:formula="of:=AVERAGE([.B164:.B212])" office:value-type="float" office:value="28.2795040816327" calcext:value-type="float">
            <text:p>28.2795040816327</text:p>
          </table:table-cell>
          <table:table-cell table:formula="of:=AVERAGE([.B114:.B212])" office:value-type="float" office:value="28.2049313131313" calcext:value-type="float">
            <text:p>28.2049313131313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27.26" calcext:value-type="float">
            <text:p>27.26</text:p>
          </table:table-cell>
          <table:table-cell office:value-type="float" office:value="17005241" calcext:value-type="float">
            <text:p>17005241</text:p>
          </table:table-cell>
          <table:table-cell table:formula="of:=AVERAGE([.B165:.B213])" office:value-type="float" office:value="28.2504734693878" calcext:value-type="float">
            <text:p>28.2504734693878</text:p>
          </table:table-cell>
          <table:table-cell table:formula="of:=AVERAGE([.B115:.B213])" office:value-type="float" office:value="28.1996525252525" calcext:value-type="float">
            <text:p>28.1996525252525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27.44" calcext:value-type="float">
            <text:p>27.44</text:p>
          </table:table-cell>
          <table:table-cell office:value-type="float" office:value="11470511" calcext:value-type="float">
            <text:p>11470511</text:p>
          </table:table-cell>
          <table:table-cell table:formula="of:=AVERAGE([.B166:.B214])" office:value-type="float" office:value="28.2228469387755" calcext:value-type="float">
            <text:p>28.2228469387755</text:p>
          </table:table-cell>
          <table:table-cell table:formula="of:=AVERAGE([.B116:.B214])" office:value-type="float" office:value="28.1968878787879" calcext:value-type="float">
            <text:p>28.1968878787879</text:p>
          </table:table-cell>
        </table:table-row>
        <table:table-row table:style-name="ro1">
          <table:table-cell office:value-type="date" office:date-value="2025-01-04" calcext:value-type="date">
            <text:p>2025-01-04</text:p>
          </table:table-cell>
          <table:table-cell office:value-type="float" office:value="27.44" calcext:value-type="float">
            <text:p>27.44</text:p>
          </table:table-cell>
          <table:table-cell office:value-type="float" office:value="11470511" calcext:value-type="float">
            <text:p>11470511</text:p>
          </table:table-cell>
          <table:table-cell table:formula="of:=AVERAGE([.B167:.B215])" office:value-type="float" office:value="28.2039489795918" calcext:value-type="float">
            <text:p>28.2039489795918</text:p>
          </table:table-cell>
          <table:table-cell table:formula="of:=AVERAGE([.B117:.B215])" office:value-type="float" office:value="28.1947070707071" calcext:value-type="float">
            <text:p>28.1947070707071</text:p>
          </table:table-cell>
        </table:table-row>
        <table:table-row table:style-name="ro1">
          <table:table-cell office:value-type="date" office:date-value="2025-01-05" calcext:value-type="date">
            <text:p>2025-01-05</text:p>
          </table:table-cell>
          <table:table-cell office:value-type="float" office:value="27.44" calcext:value-type="float">
            <text:p>27.44</text:p>
          </table:table-cell>
          <table:table-cell office:value-type="float" office:value="11470511" calcext:value-type="float">
            <text:p>11470511</text:p>
          </table:table-cell>
          <table:table-cell table:formula="of:=AVERAGE([.B168:.B216])" office:value-type="float" office:value="28.1850510204082" calcext:value-type="float">
            <text:p>28.1850510204082</text:p>
          </table:table-cell>
          <table:table-cell table:formula="of:=AVERAGE([.B118:.B216])" office:value-type="float" office:value="28.1907909090909" calcext:value-type="float">
            <text:p>28.1907909090909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27.27" calcext:value-type="float">
            <text:p>27.27</text:p>
          </table:table-cell>
          <table:table-cell office:value-type="float" office:value="22820266" calcext:value-type="float">
            <text:p>22820266</text:p>
          </table:table-cell>
          <table:table-cell table:formula="of:=AVERAGE([.B169:.B217])" office:value-type="float" office:value="28.1661530612245" calcext:value-type="float">
            <text:p>28.1661530612245</text:p>
          </table:table-cell>
          <table:table-cell table:formula="of:=AVERAGE([.B119:.B217])" office:value-type="float" office:value="28.1868747474747" calcext:value-type="float">
            <text:p>28.1868747474747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27.26" calcext:value-type="float">
            <text:p>27.26</text:p>
          </table:table-cell>
          <table:table-cell office:value-type="float" office:value="16406039" calcext:value-type="float">
            <text:p>16406039</text:p>
          </table:table-cell>
          <table:table-cell table:formula="of:=AVERAGE([.B170:.B218])" office:value-type="float" office:value="28.1405510204082" calcext:value-type="float">
            <text:p>28.1405510204082</text:p>
          </table:table-cell>
          <table:table-cell table:formula="of:=AVERAGE([.B120:.B218])" office:value-type="float" office:value="28.1812414141414" calcext:value-type="float">
            <text:p>28.1812414141414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27.32" calcext:value-type="float">
            <text:p>27.32</text:p>
          </table:table-cell>
          <table:table-cell office:value-type="float" office:value="13723644" calcext:value-type="float">
            <text:p>13723644</text:p>
          </table:table-cell>
          <table:table-cell table:formula="of:=AVERAGE([.B171:.B219])" office:value-type="float" office:value="28.1177775510204" calcext:value-type="float">
            <text:p>28.1177775510204</text:p>
          </table:table-cell>
          <table:table-cell table:formula="of:=AVERAGE([.B121:.B219])" office:value-type="float" office:value="28.1746070707071" calcext:value-type="float">
            <text:p>28.1746070707071</text:p>
          </table:table-cell>
        </table:table-row>
        <table:table-row table:style-name="ro1">
          <table:table-cell office:value-type="date" office:date-value="2025-01-09" calcext:value-type="date">
            <text:p>2025-01-09</text:p>
          </table:table-cell>
          <table:table-cell office:value-type="float" office:value="27.32" calcext:value-type="float">
            <text:p>27.32</text:p>
          </table:table-cell>
          <table:table-cell office:value-type="float" office:value="13723644" calcext:value-type="float">
            <text:p>13723644</text:p>
          </table:table-cell>
          <table:table-cell table:formula="of:=AVERAGE([.B172:.B220])" office:value-type="float" office:value="28.0948142857143" calcext:value-type="float">
            <text:p>28.0948142857143</text:p>
          </table:table-cell>
          <table:table-cell table:formula="of:=AVERAGE([.B122:.B220])" office:value-type="float" office:value="28.1687454545455" calcext:value-type="float">
            <text:p>28.1687454545455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27.01" calcext:value-type="float">
            <text:p>27.01</text:p>
          </table:table-cell>
          <table:table-cell office:value-type="float" office:value="22011173" calcext:value-type="float">
            <text:p>22011173</text:p>
          </table:table-cell>
          <table:table-cell table:formula="of:=AVERAGE([.B173:.B221])" office:value-type="float" office:value="28.0663918367347" calcext:value-type="float">
            <text:p>28.0663918367347</text:p>
          </table:table-cell>
          <table:table-cell table:formula="of:=AVERAGE([.B123:.B221])" office:value-type="float" office:value="28.1626838383838" calcext:value-type="float">
            <text:p>28.1626838383838</text:p>
          </table:table-cell>
        </table:table-row>
        <table:table-row table:style-name="ro1">
          <table:table-cell office:value-type="date" office:date-value="2025-01-11" calcext:value-type="date">
            <text:p>2025-01-11</text:p>
          </table:table-cell>
          <table:table-cell office:value-type="float" office:value="27.01" calcext:value-type="float">
            <text:p>27.01</text:p>
          </table:table-cell>
          <table:table-cell office:value-type="float" office:value="22011173" calcext:value-type="float">
            <text:p>22011173</text:p>
          </table:table-cell>
          <table:table-cell table:formula="of:=AVERAGE([.B174:.B222])" office:value-type="float" office:value="28.0241612244898" calcext:value-type="float">
            <text:p>28.0241612244898</text:p>
          </table:table-cell>
          <table:table-cell table:formula="of:=AVERAGE([.B124:.B222])" office:value-type="float" office:value="28.1542242424242" calcext:value-type="float">
            <text:p>28.1542242424242</text:p>
          </table:table-cell>
        </table:table-row>
        <table:table-row table:style-name="ro1">
          <table:table-cell office:value-type="date" office:date-value="2025-01-12" calcext:value-type="date">
            <text:p>2025-01-12</text:p>
          </table:table-cell>
          <table:table-cell office:value-type="float" office:value="27.01" calcext:value-type="float">
            <text:p>27.01</text:p>
          </table:table-cell>
          <table:table-cell office:value-type="float" office:value="22011173" calcext:value-type="float">
            <text:p>22011173</text:p>
          </table:table-cell>
          <table:table-cell table:formula="of:=AVERAGE([.B175:.B223])" office:value-type="float" office:value="27.9819306122449" calcext:value-type="float">
            <text:p>27.9819306122449</text:p>
          </table:table-cell>
          <table:table-cell table:formula="of:=AVERAGE([.B125:.B223])" office:value-type="float" office:value="28.1446636363636" calcext:value-type="float">
            <text:p>28.1446636363636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27.3" calcext:value-type="float">
            <text:p>27.3</text:p>
          </table:table-cell>
          <table:table-cell office:value-type="float" office:value="17826414" calcext:value-type="float">
            <text:p>17826414</text:p>
          </table:table-cell>
          <table:table-cell table:formula="of:=AVERAGE([.B176:.B224])" office:value-type="float" office:value="27.9397" calcext:value-type="float">
            <text:p>27.9397</text:p>
          </table:table-cell>
          <table:table-cell table:formula="of:=AVERAGE([.B126:.B224])" office:value-type="float" office:value="28.135103030303" calcext:value-type="float">
            <text:p>28.135103030303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27.52" calcext:value-type="float">
            <text:p>27.52</text:p>
          </table:table-cell>
          <table:table-cell office:value-type="float" office:value="14077423" calcext:value-type="float">
            <text:p>14077423</text:p>
          </table:table-cell>
          <table:table-cell table:formula="of:=AVERAGE([.B177:.B225])" office:value-type="float" office:value="27.9001530612245" calcext:value-type="float">
            <text:p>27.9001530612245</text:p>
          </table:table-cell>
          <table:table-cell table:formula="of:=AVERAGE([.B127:.B225])" office:value-type="float" office:value="28.1284717171717" calcext:value-type="float">
            <text:p>28.1284717171717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27.82" calcext:value-type="float">
            <text:p>27.82</text:p>
          </table:table-cell>
          <table:table-cell office:value-type="float" office:value="12225320" calcext:value-type="float">
            <text:p>12225320</text:p>
          </table:table-cell>
          <table:table-cell table:formula="of:=AVERAGE([.B178:.B226])" office:value-type="float" office:value="27.8663081632653" calcext:value-type="float">
            <text:p>27.8663081632653</text:p>
          </table:table-cell>
          <table:table-cell table:formula="of:=AVERAGE([.B128:.B226])" office:value-type="float" office:value="28.1252313131313" calcext:value-type="float">
            <text:p>28.1252313131313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27.83" calcext:value-type="float">
            <text:p>27.83</text:p>
          </table:table-cell>
          <table:table-cell office:value-type="float" office:value="13454449" calcext:value-type="float">
            <text:p>13454449</text:p>
          </table:table-cell>
          <table:table-cell table:formula="of:=AVERAGE([.B179:.B227])" office:value-type="float" office:value="27.838787755102" calcext:value-type="float">
            <text:p>27.838787755102</text:p>
          </table:table-cell>
          <table:table-cell table:formula="of:=AVERAGE([.B129:.B227])" office:value-type="float" office:value="28.1254878787879" calcext:value-type="float">
            <text:p>28.1254878787879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27.99" calcext:value-type="float">
            <text:p>27.99</text:p>
          </table:table-cell>
          <table:table-cell office:value-type="float" office:value="15361450" calcext:value-type="float">
            <text:p>15361450</text:p>
          </table:table-cell>
          <table:table-cell table:formula="of:=AVERAGE([.B180:.B228])" office:value-type="float" office:value="27.8114714285714" calcext:value-type="float">
            <text:p>27.8114714285714</text:p>
          </table:table-cell>
          <table:table-cell table:formula="of:=AVERAGE([.B130:.B228])" office:value-type="float" office:value="28.1232090909091" calcext:value-type="float">
            <text:p>28.1232090909091</text:p>
          </table:table-cell>
        </table:table-row>
        <table:table-row table:style-name="ro1">
          <table:table-cell office:value-type="date" office:date-value="2025-01-18" calcext:value-type="date">
            <text:p>2025-01-18</text:p>
          </table:table-cell>
          <table:table-cell office:value-type="float" office:value="27.99" calcext:value-type="float">
            <text:p>27.99</text:p>
          </table:table-cell>
          <table:table-cell office:value-type="float" office:value="15361450" calcext:value-type="float">
            <text:p>15361450</text:p>
          </table:table-cell>
          <table:table-cell table:formula="of:=AVERAGE([.B181:.B229])" office:value-type="float" office:value="27.7856" calcext:value-type="float">
            <text:p>27.7856</text:p>
          </table:table-cell>
          <table:table-cell table:formula="of:=AVERAGE([.B131:.B229])" office:value-type="float" office:value="28.1236474747475" calcext:value-type="float">
            <text:p>28.1236474747475</text:p>
          </table:table-cell>
        </table:table-row>
        <table:table-row table:style-name="ro1">
          <table:table-cell office:value-type="date" office:date-value="2025-01-19" calcext:value-type="date">
            <text:p>2025-01-19</text:p>
          </table:table-cell>
          <table:table-cell office:value-type="float" office:value="27.99" calcext:value-type="float">
            <text:p>27.99</text:p>
          </table:table-cell>
          <table:table-cell office:value-type="float" office:value="15361450" calcext:value-type="float">
            <text:p>15361450</text:p>
          </table:table-cell>
          <table:table-cell table:formula="of:=AVERAGE([.B182:.B230])" office:value-type="float" office:value="27.7597285714286" calcext:value-type="float">
            <text:p>27.7597285714286</text:p>
          </table:table-cell>
          <table:table-cell table:formula="of:=AVERAGE([.B132:.B230])" office:value-type="float" office:value="28.1207505050505" calcext:value-type="float">
            <text:p>28.1207505050505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27.99" calcext:value-type="float">
            <text:p>27.99</text:p>
          </table:table-cell>
          <table:table-cell office:value-type="float" office:value="15361450" calcext:value-type="float">
            <text:p>15361450</text:p>
          </table:table-cell>
          <table:table-cell table:formula="of:=AVERAGE([.B183:.B231])" office:value-type="float" office:value="27.7338571428571" calcext:value-type="float">
            <text:p>27.7338571428571</text:p>
          </table:table-cell>
          <table:table-cell table:formula="of:=AVERAGE([.B133:.B231])" office:value-type="float" office:value="28.1178535353535" calcext:value-type="float">
            <text:p>28.1178535353535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28.22" calcext:value-type="float">
            <text:p>28.22</text:p>
          </table:table-cell>
          <table:table-cell office:value-type="float" office:value="21390223" calcext:value-type="float">
            <text:p>21390223</text:p>
          </table:table-cell>
          <table:table-cell table:formula="of:=AVERAGE([.B184:.B232])" office:value-type="float" office:value="27.7118285714286" calcext:value-type="float">
            <text:p>27.7118285714286</text:p>
          </table:table-cell>
          <table:table-cell table:formula="of:=AVERAGE([.B134:.B232])" office:value-type="float" office:value="28.1149565656566" calcext:value-type="float">
            <text:p>28.1149565656566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27.92" calcext:value-type="float">
            <text:p>27.92</text:p>
          </table:table-cell>
          <table:table-cell office:value-type="float" office:value="15660854" calcext:value-type="float">
            <text:p>15660854</text:p>
          </table:table-cell>
          <table:table-cell table:formula="of:=AVERAGE([.B185:.B233])" office:value-type="float" office:value="27.6977285714286" calcext:value-type="float">
            <text:p>27.6977285714286</text:p>
          </table:table-cell>
          <table:table-cell table:formula="of:=AVERAGE([.B135:.B233])" office:value-type="float" office:value="28.1128818181818" calcext:value-type="float">
            <text:p>28.1128818181818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28.09" calcext:value-type="float">
            <text:p>28.09</text:p>
          </table:table-cell>
          <table:table-cell office:value-type="float" office:value="14818679" calcext:value-type="float">
            <text:p>14818679</text:p>
          </table:table-cell>
          <table:table-cell table:formula="of:=AVERAGE([.B186:.B234])" office:value-type="float" office:value="27.6823591836735" calcext:value-type="float">
            <text:p>27.6823591836735</text:p>
          </table:table-cell>
          <table:table-cell table:formula="of:=AVERAGE([.B136:.B234])" office:value-type="float" office:value="28.1089777777778" calcext:value-type="float">
            <text:p>28.1089777777778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28.07" calcext:value-type="float">
            <text:p>28.07</text:p>
          </table:table-cell>
          <table:table-cell office:value-type="float" office:value="11739412" calcext:value-type="float">
            <text:p>11739412</text:p>
          </table:table-cell>
          <table:table-cell table:formula="of:=AVERAGE([.B187:.B235])" office:value-type="float" office:value="27.6702571428571" calcext:value-type="float">
            <text:p>27.6702571428571</text:p>
          </table:table-cell>
          <table:table-cell table:formula="of:=AVERAGE([.B137:.B235])" office:value-type="float" office:value="28.1044888888889" calcext:value-type="float">
            <text:p>28.1044888888889</text:p>
          </table:table-cell>
        </table:table-row>
        <table:table-row table:style-name="ro1">
          <table:table-cell office:value-type="date" office:date-value="2025-01-25" calcext:value-type="date">
            <text:p>2025-01-25</text:p>
          </table:table-cell>
          <table:table-cell office:value-type="float" office:value="28.07" calcext:value-type="float">
            <text:p>28.07</text:p>
          </table:table-cell>
          <table:table-cell office:value-type="float" office:value="11739412" calcext:value-type="float">
            <text:p>11739412</text:p>
          </table:table-cell>
          <table:table-cell table:formula="of:=AVERAGE([.B188:.B236])" office:value-type="float" office:value="27.6603755102041" calcext:value-type="float">
            <text:p>27.6603755102041</text:p>
          </table:table-cell>
          <table:table-cell table:formula="of:=AVERAGE([.B138:.B236])" office:value-type="float" office:value="28.099697979798" calcext:value-type="float">
            <text:p>28.099697979798</text:p>
          </table:table-cell>
        </table:table-row>
        <table:table-row table:style-name="ro1">
          <table:table-cell office:value-type="date" office:date-value="2025-01-26" calcext:value-type="date">
            <text:p>2025-01-26</text:p>
          </table:table-cell>
          <table:table-cell office:value-type="float" office:value="28.07" calcext:value-type="float">
            <text:p>28.07</text:p>
          </table:table-cell>
          <table:table-cell office:value-type="float" office:value="11739412" calcext:value-type="float">
            <text:p>11739412</text:p>
          </table:table-cell>
          <table:table-cell table:formula="of:=AVERAGE([.B189:.B237])" office:value-type="float" office:value="27.650493877551" calcext:value-type="float">
            <text:p>27.650493877551</text:p>
          </table:table-cell>
          <table:table-cell table:formula="of:=AVERAGE([.B139:.B237])" office:value-type="float" office:value="28.0949070707071" calcext:value-type="float">
            <text:p>28.0949070707071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28.45" calcext:value-type="float">
            <text:p>28.45</text:p>
          </table:table-cell>
          <table:table-cell office:value-type="float" office:value="21061083" calcext:value-type="float">
            <text:p>21061083</text:p>
          </table:table-cell>
          <table:table-cell table:formula="of:=AVERAGE([.B190:.B238])" office:value-type="float" office:value="27.640612244898" calcext:value-type="float">
            <text:p>27.640612244898</text:p>
          </table:table-cell>
          <table:table-cell table:formula="of:=AVERAGE([.B140:.B238])" office:value-type="float" office:value="28.0901161616162" calcext:value-type="float">
            <text:p>28.0901161616162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28.07" calcext:value-type="float">
            <text:p>28.07</text:p>
          </table:table-cell>
          <table:table-cell office:value-type="float" office:value="14748435" calcext:value-type="float">
            <text:p>14748435</text:p>
          </table:table-cell>
          <table:table-cell table:formula="of:=AVERAGE([.B191:.B239])" office:value-type="float" office:value="27.6390918367347" calcext:value-type="float">
            <text:p>27.6390918367347</text:p>
          </table:table-cell>
          <table:table-cell table:formula="of:=AVERAGE([.B141:.B239])" office:value-type="float" office:value="28.0891636363636" calcext:value-type="float">
            <text:p>28.0891636363636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28.01" calcext:value-type="float">
            <text:p>28.01</text:p>
          </table:table-cell>
          <table:table-cell office:value-type="float" office:value="11720261" calcext:value-type="float">
            <text:p>11720261</text:p>
          </table:table-cell>
          <table:table-cell table:formula="of:=AVERAGE([.B192:.B240])" office:value-type="float" office:value="27.6320408163265" calcext:value-type="float">
            <text:p>27.6320408163265</text:p>
          </table:table-cell>
          <table:table-cell table:formula="of:=AVERAGE([.B142:.B240])" office:value-type="float" office:value="28.0877757575758" calcext:value-type="float">
            <text:p>28.0877757575758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27.98" calcext:value-type="float">
            <text:p>27.98</text:p>
          </table:table-cell>
          <table:table-cell office:value-type="float" office:value="15498855" calcext:value-type="float">
            <text:p>15498855</text:p>
          </table:table-cell>
          <table:table-cell table:formula="of:=AVERAGE([.B193:.B241])" office:value-type="float" office:value="27.6271428571429" calcext:value-type="float">
            <text:p>27.6271428571429</text:p>
          </table:table-cell>
          <table:table-cell table:formula="of:=AVERAGE([.B143:.B241])" office:value-type="float" office:value="28.0871828282828" calcext:value-type="float">
            <text:p>28.0871828282828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27.83" calcext:value-type="float">
            <text:p>27.83</text:p>
          </table:table-cell>
          <table:table-cell office:value-type="float" office:value="15449687" calcext:value-type="float">
            <text:p>15449687</text:p>
          </table:table-cell>
          <table:table-cell table:formula="of:=AVERAGE([.B194:.B242])" office:value-type="float" office:value="27.6226530612245" calcext:value-type="float">
            <text:p>27.6226530612245</text:p>
          </table:table-cell>
          <table:table-cell table:formula="of:=AVERAGE([.B144:.B242])" office:value-type="float" office:value="28.0867868686869" calcext:value-type="float">
            <text:p>28.0867868686869</text:p>
          </table:table-cell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27.83" calcext:value-type="float">
            <text:p>27.83</text:p>
          </table:table-cell>
          <table:table-cell office:value-type="float" office:value="15449687" calcext:value-type="float">
            <text:p>15449687</text:p>
          </table:table-cell>
          <table:table-cell table:formula="of:=AVERAGE([.B195:.B243])" office:value-type="float" office:value="27.6165306122449" calcext:value-type="float">
            <text:p>27.6165306122449</text:p>
          </table:table-cell>
          <table:table-cell table:formula="of:=AVERAGE([.B145:.B243])" office:value-type="float" office:value="28.0843757575758" calcext:value-type="float">
            <text:p>28.0843757575758</text:p>
          </table:table-cell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float" office:value="27.83" calcext:value-type="float">
            <text:p>27.83</text:p>
          </table:table-cell>
          <table:table-cell office:value-type="float" office:value="15449687" calcext:value-type="float">
            <text:p>15449687</text:p>
          </table:table-cell>
          <table:table-cell table:formula="of:=AVERAGE([.B196:.B244])" office:value-type="float" office:value="27.6104081632653" calcext:value-type="float">
            <text:p>27.6104081632653</text:p>
          </table:table-cell>
          <table:table-cell table:formula="of:=AVERAGE([.B146:.B244])" office:value-type="float" office:value="28.0837656565657" calcext:value-type="float">
            <text:p>28.0837656565657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27.72" calcext:value-type="float">
            <text:p>27.72</text:p>
          </table:table-cell>
          <table:table-cell office:value-type="float" office:value="19749139" calcext:value-type="float">
            <text:p>19749139</text:p>
          </table:table-cell>
          <table:table-cell table:formula="of:=AVERAGE([.B197:.B245])" office:value-type="float" office:value="27.6042857142857" calcext:value-type="float">
            <text:p>27.6042857142857</text:p>
          </table:table-cell>
          <table:table-cell table:formula="of:=AVERAGE([.B147:.B245])" office:value-type="float" office:value="28.0831555555556" calcext:value-type="float">
            <text:p>28.0831555555556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27.76" calcext:value-type="float">
            <text:p>27.76</text:p>
          </table:table-cell>
          <table:table-cell office:value-type="float" office:value="11507184" calcext:value-type="float">
            <text:p>11507184</text:p>
          </table:table-cell>
          <table:table-cell table:formula="of:=AVERAGE([.B198:.B246])" office:value-type="float" office:value="27.6012244897959" calcext:value-type="float">
            <text:p>27.6012244897959</text:p>
          </table:table-cell>
          <table:table-cell table:formula="of:=AVERAGE([.B148:.B246])" office:value-type="float" office:value="28.0814343434343" calcext:value-type="float">
            <text:p>28.0814343434343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27.95" calcext:value-type="float">
            <text:p>27.95</text:p>
          </table:table-cell>
          <table:table-cell office:value-type="float" office:value="10937263" calcext:value-type="float">
            <text:p>10937263</text:p>
          </table:table-cell>
          <table:table-cell table:formula="of:=AVERAGE([.B199:.B247])" office:value-type="float" office:value="27.6002040816327" calcext:value-type="float">
            <text:p>27.6002040816327</text:p>
          </table:table-cell>
          <table:table-cell table:formula="of:=AVERAGE([.B149:.B247])" office:value-type="float" office:value="28.0784161616162" calcext:value-type="float">
            <text:p>28.0784161616162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27.75" calcext:value-type="float">
            <text:p>27.75</text:p>
          </table:table-cell>
          <table:table-cell office:value-type="float" office:value="13421988" calcext:value-type="float">
            <text:p>13421988</text:p>
          </table:table-cell>
          <table:table-cell table:formula="of:=AVERAGE([.B200:.B248])" office:value-type="float" office:value="27.6179591836735" calcext:value-type="float">
            <text:p>27.6179591836735</text:p>
          </table:table-cell>
          <table:table-cell table:formula="of:=AVERAGE([.B150:.B248])" office:value-type="float" office:value="28.0796191919192" calcext:value-type="float">
            <text:p>28.0796191919192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27.56" calcext:value-type="float">
            <text:p>27.56</text:p>
          </table:table-cell>
          <table:table-cell office:value-type="float" office:value="14969996" calcext:value-type="float">
            <text:p>14969996</text:p>
          </table:table-cell>
          <table:table-cell table:formula="of:=AVERAGE([.B201:.B249])" office:value-type="float" office:value="27.634693877551" calcext:value-type="float">
            <text:p>27.634693877551</text:p>
          </table:table-cell>
          <table:table-cell table:formula="of:=AVERAGE([.B151:.B249])" office:value-type="float" office:value="28.077901010101" calcext:value-type="float">
            <text:p>28.077901010101</text:p>
          </table:table-cell>
        </table:table-row>
        <table:table-row table:style-name="ro1">
          <table:table-cell office:value-type="date" office:date-value="2025-02-08" calcext:value-type="date">
            <text:p>2025-02-08</text:p>
          </table:table-cell>
          <table:table-cell office:value-type="float" office:value="27.56" calcext:value-type="float">
            <text:p>27.56</text:p>
          </table:table-cell>
          <table:table-cell office:value-type="float" office:value="14969996" calcext:value-type="float">
            <text:p>14969996</text:p>
          </table:table-cell>
          <table:table-cell table:formula="of:=AVERAGE([.B202:.B250])" office:value-type="float" office:value="27.6402040816327" calcext:value-type="float">
            <text:p>27.6402040816327</text:p>
          </table:table-cell>
          <table:table-cell table:formula="of:=AVERAGE([.B152:.B250])" office:value-type="float" office:value="28.0737626262626" calcext:value-type="float">
            <text:p>28.0737626262626</text:p>
          </table:table-cell>
        </table:table-row>
        <table:table-row table:style-name="ro1">
          <table:table-cell office:value-type="date" office:date-value="2025-02-09" calcext:value-type="date">
            <text:p>2025-02-09</text:p>
          </table:table-cell>
          <table:table-cell office:value-type="float" office:value="27.56" calcext:value-type="float">
            <text:p>27.56</text:p>
          </table:table-cell>
          <table:table-cell office:value-type="float" office:value="14969996" calcext:value-type="float">
            <text:p>14969996</text:p>
          </table:table-cell>
          <table:table-cell table:formula="of:=AVERAGE([.B203:.B251])" office:value-type="float" office:value="27.6457142857143" calcext:value-type="float">
            <text:p>27.6457142857143</text:p>
          </table:table-cell>
          <table:table-cell table:formula="of:=AVERAGE([.B153:.B251])" office:value-type="float" office:value="28.0709262626263" calcext:value-type="float">
            <text:p>28.0709262626263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27.68" calcext:value-type="float">
            <text:p>27.68</text:p>
          </table:table-cell>
          <table:table-cell office:value-type="float" office:value="11902596" calcext:value-type="float">
            <text:p>11902596</text:p>
          </table:table-cell>
          <table:table-cell table:formula="of:=AVERAGE([.B204:.B252])" office:value-type="float" office:value="27.6512244897959" calcext:value-type="float">
            <text:p>27.6512244897959</text:p>
          </table:table-cell>
          <table:table-cell table:formula="of:=AVERAGE([.B154:.B252])" office:value-type="float" office:value="28.0680898989899" calcext:value-type="float">
            <text:p>28.0680898989899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27.87" calcext:value-type="float">
            <text:p>27.87</text:p>
          </table:table-cell>
          <table:table-cell office:value-type="float" office:value="11203759" calcext:value-type="float">
            <text:p>11203759</text:p>
          </table:table-cell>
          <table:table-cell table:formula="of:=AVERAGE([.B205:.B253])" office:value-type="float" office:value="27.6575510204082" calcext:value-type="float">
            <text:p>27.6575510204082</text:p>
          </table:table-cell>
          <table:table-cell table:formula="of:=AVERAGE([.B155:.B253])" office:value-type="float" office:value="28.0664656565657" calcext:value-type="float">
            <text:p>28.0664656565657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27.65" calcext:value-type="float">
            <text:p>27.65</text:p>
          </table:table-cell>
          <table:table-cell office:value-type="float" office:value="12124231" calcext:value-type="float">
            <text:p>12124231</text:p>
          </table:table-cell>
          <table:table-cell table:formula="of:=AVERAGE([.B206:.B254])" office:value-type="float" office:value="27.6634693877551" calcext:value-type="float">
            <text:p>27.6634693877551</text:p>
          </table:table-cell>
          <table:table-cell table:formula="of:=AVERAGE([.B156:.B254])" office:value-type="float" office:value="28.0664595959596" calcext:value-type="float">
            <text:p>28.0664595959596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27.85" calcext:value-type="float">
            <text:p>27.85</text:p>
          </table:table-cell>
          <table:table-cell office:value-type="float" office:value="10936943" calcext:value-type="float">
            <text:p>10936943</text:p>
          </table:table-cell>
          <table:table-cell table:formula="of:=AVERAGE([.B207:.B255])" office:value-type="float" office:value="27.6648979591837" calcext:value-type="float">
            <text:p>27.6648979591837</text:p>
          </table:table-cell>
          <table:table-cell table:formula="of:=AVERAGE([.B157:.B255])" office:value-type="float" office:value="28.0617292929293" calcext:value-type="float">
            <text:p>28.0617292929293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27.79" calcext:value-type="float">
            <text:p>27.79</text:p>
          </table:table-cell>
          <table:table-cell office:value-type="float" office:value="10062610" calcext:value-type="float">
            <text:p>10062610</text:p>
          </table:table-cell>
          <table:table-cell table:formula="of:=AVERAGE([.B208:.B256])" office:value-type="float" office:value="27.6702040816327" calcext:value-type="float">
            <text:p>27.6702040816327</text:p>
          </table:table-cell>
          <table:table-cell table:formula="of:=AVERAGE([.B158:.B256])" office:value-type="float" office:value="28.0524141414141" calcext:value-type="float">
            <text:p>28.0524141414141</text:p>
          </table:table-cell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float" office:value="27.79" calcext:value-type="float">
            <text:p>27.79</text:p>
          </table:table-cell>
          <table:table-cell office:value-type="float" office:value="10062610" calcext:value-type="float">
            <text:p>10062610</text:p>
          </table:table-cell>
          <table:table-cell table:formula="of:=AVERAGE([.B209:.B257])" office:value-type="float" office:value="27.6767346938776" calcext:value-type="float">
            <text:p>27.6767346938776</text:p>
          </table:table-cell>
          <table:table-cell table:formula="of:=AVERAGE([.B159:.B257])" office:value-type="float" office:value="28.0437939393939" calcext:value-type="float">
            <text:p>28.0437939393939</text:p>
          </table:table-cell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float" office:value="27.79" calcext:value-type="float">
            <text:p>27.79</text:p>
          </table:table-cell>
          <table:table-cell office:value-type="float" office:value="10062610" calcext:value-type="float">
            <text:p>10062610</text:p>
          </table:table-cell>
          <table:table-cell table:formula="of:=AVERAGE([.B210:.B258])" office:value-type="float" office:value="27.6832653061225" calcext:value-type="float">
            <text:p>27.6832653061225</text:p>
          </table:table-cell>
          <table:table-cell table:formula="of:=AVERAGE([.B160:.B258])" office:value-type="float" office:value="28.0334727272727" calcext:value-type="float">
            <text:p>28.0334727272727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27.79" calcext:value-type="float">
            <text:p>27.79</text:p>
          </table:table-cell>
          <table:table-cell office:value-type="float" office:value="10062610" calcext:value-type="float">
            <text:p>10062610</text:p>
          </table:table-cell>
          <table:table-cell table:formula="of:=AVERAGE([.B211:.B259])" office:value-type="float" office:value="27.6897959183673" calcext:value-type="float">
            <text:p>27.6897959183673</text:p>
          </table:table-cell>
          <table:table-cell table:formula="of:=AVERAGE([.B161:.B259])" office:value-type="float" office:value="28.0231515151515" calcext:value-type="float">
            <text:p>28.0231515151515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27.99" calcext:value-type="float">
            <text:p>27.99</text:p>
          </table:table-cell>
          <table:table-cell office:value-type="float" office:value="15611477" calcext:value-type="float">
            <text:p>15611477</text:p>
          </table:table-cell>
          <table:table-cell table:formula="of:=AVERAGE([.B212:.B260])" office:value-type="float" office:value="27.7012244897959" calcext:value-type="float">
            <text:p>27.7012244897959</text:p>
          </table:table-cell>
          <table:table-cell table:formula="of:=AVERAGE([.B162:.B260])" office:value-type="float" office:value="28.0128303030303" calcext:value-type="float">
            <text:p>28.0128303030303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28.18" calcext:value-type="float">
            <text:p>28.18</text:p>
          </table:table-cell>
          <table:table-cell office:value-type="float" office:value="12266712" calcext:value-type="float">
            <text:p>12266712</text:p>
          </table:table-cell>
          <table:table-cell table:formula="of:=AVERAGE([.B213:.B261])" office:value-type="float" office:value="27.7148979591837" calcext:value-type="float">
            <text:p>27.7148979591837</text:p>
          </table:table-cell>
          <table:table-cell table:formula="of:=AVERAGE([.B163:.B261])" office:value-type="float" office:value="28.0037282828283" calcext:value-type="float">
            <text:p>28.0037282828283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28.32" calcext:value-type="float">
            <text:p>28.32</text:p>
          </table:table-cell>
          <table:table-cell office:value-type="float" office:value="12605443" calcext:value-type="float">
            <text:p>12605443</text:p>
          </table:table-cell>
          <table:table-cell table:formula="of:=AVERAGE([.B214:.B262])" office:value-type="float" office:value="27.7324489795918" calcext:value-type="float">
            <text:p>27.7324489795918</text:p>
          </table:table-cell>
          <table:table-cell table:formula="of:=AVERAGE([.B164:.B262])" office:value-type="float" office:value="27.9990474747475" calcext:value-type="float">
            <text:p>27.9990474747475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28.21" calcext:value-type="float">
            <text:p>28.21</text:p>
          </table:table-cell>
          <table:table-cell office:value-type="float" office:value="13856445" calcext:value-type="float">
            <text:p>13856445</text:p>
          </table:table-cell>
          <table:table-cell table:formula="of:=AVERAGE([.B215:.B263])" office:value-type="float" office:value="27.7540816326531" calcext:value-type="float">
            <text:p>27.7540816326531</text:p>
          </table:table-cell>
          <table:table-cell table:formula="of:=AVERAGE([.B165:.B263])" office:value-type="float" office:value="27.9947797979798" calcext:value-type="float">
            <text:p>27.9947797979798</text:p>
          </table:table-cell>
        </table:table-row>
        <table:table-row table:style-name="ro1">
          <table:table-cell office:value-type="date" office:date-value="2025-02-22" calcext:value-type="date">
            <text:p>2025-02-22</text:p>
          </table:table-cell>
          <table:table-cell office:value-type="float" office:value="28.21" calcext:value-type="float">
            <text:p>28.21</text:p>
          </table:table-cell>
          <table:table-cell office:value-type="float" office:value="13856445" calcext:value-type="float">
            <text:p>13856445</text:p>
          </table:table-cell>
          <table:table-cell table:formula="of:=AVERAGE([.B216:.B264])" office:value-type="float" office:value="27.7697959183673" calcext:value-type="float">
            <text:p>27.7697959183673</text:p>
          </table:table-cell>
          <table:table-cell table:formula="of:=AVERAGE([.B166:.B264])" office:value-type="float" office:value="27.990702020202" calcext:value-type="float">
            <text:p>27.990702020202</text:p>
          </table:table-cell>
        </table:table-row>
        <table:table-row table:style-name="ro1">
          <table:table-cell office:value-type="date" office:date-value="2025-02-23" calcext:value-type="date">
            <text:p>2025-02-23</text:p>
          </table:table-cell>
          <table:table-cell office:value-type="float" office:value="28.21" calcext:value-type="float">
            <text:p>28.21</text:p>
          </table:table-cell>
          <table:table-cell office:value-type="float" office:value="13856445" calcext:value-type="float">
            <text:p>13856445</text:p>
          </table:table-cell>
          <table:table-cell table:formula="of:=AVERAGE([.B217:.B265])" office:value-type="float" office:value="27.7855102040816" calcext:value-type="float">
            <text:p>27.7855102040816</text:p>
          </table:table-cell>
          <table:table-cell table:formula="of:=AVERAGE([.B167:.B265])" office:value-type="float" office:value="27.9891262626263" calcext:value-type="float">
            <text:p>27.9891262626263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28.26" calcext:value-type="float">
            <text:p>28.26</text:p>
          </table:table-cell>
          <table:table-cell office:value-type="float" office:value="13681763" calcext:value-type="float">
            <text:p>13681763</text:p>
          </table:table-cell>
          <table:table-cell table:formula="of:=AVERAGE([.B218:.B266])" office:value-type="float" office:value="27.8012244897959" calcext:value-type="float">
            <text:p>27.8012244897959</text:p>
          </table:table-cell>
          <table:table-cell table:formula="of:=AVERAGE([.B168:.B266])" office:value-type="float" office:value="27.9875505050505" calcext:value-type="float">
            <text:p>27.9875505050505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28.45" calcext:value-type="float">
            <text:p>28.45</text:p>
          </table:table-cell>
          <table:table-cell office:value-type="float" office:value="12774102" calcext:value-type="float">
            <text:p>12774102</text:p>
          </table:table-cell>
          <table:table-cell table:formula="of:=AVERAGE([.B219:.B267])" office:value-type="float" office:value="27.8214285714286" calcext:value-type="float">
            <text:p>27.8214285714286</text:p>
          </table:table-cell>
          <table:table-cell table:formula="of:=AVERAGE([.B169:.B267])" office:value-type="float" office:value="27.9864797979798" calcext:value-type="float">
            <text:p>27.9864797979798</text:p>
          </table:table-cell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28.15" calcext:value-type="float">
            <text:p>28.15</text:p>
          </table:table-cell>
          <table:table-cell office:value-type="float" office:value="12881960" calcext:value-type="float">
            <text:p>12881960</text:p>
          </table:table-cell>
          <table:table-cell table:formula="of:=AVERAGE([.B220:.B268])" office:value-type="float" office:value="27.8457142857143" calcext:value-type="float">
            <text:p>27.8457142857143</text:p>
          </table:table-cell>
          <table:table-cell table:formula="of:=AVERAGE([.B170:.B268])" office:value-type="float" office:value="27.9857272727273" calcext:value-type="float">
            <text:p>27.9857272727273</text:p>
          </table:table-cell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28.17" calcext:value-type="float">
            <text:p>28.17</text:p>
          </table:table-cell>
          <table:table-cell office:value-type="float" office:value="12408212" calcext:value-type="float">
            <text:p>12408212</text:p>
          </table:table-cell>
          <table:table-cell table:formula="of:=AVERAGE([.B221:.B269])" office:value-type="float" office:value="27.8626530612245" calcext:value-type="float">
            <text:p>27.8626530612245</text:p>
          </table:table-cell>
          <table:table-cell table:formula="of:=AVERAGE([.B171:.B269])" office:value-type="float" office:value="27.9834454545455" calcext:value-type="float">
            <text:p>27.9834454545455</text:p>
          </table:table-cell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28.54" calcext:value-type="float">
            <text:p>28.54</text:p>
          </table:table-cell>
          <table:table-cell office:value-type="float" office:value="16590259" calcext:value-type="float">
            <text:p>16590259</text:p>
          </table:table-cell>
          <table:table-cell table:formula="of:=AVERAGE([.B222:.B270])" office:value-type="float" office:value="27.88" calcext:value-type="float">
            <text:p>27.88</text:p>
          </table:table-cell>
          <table:table-cell table:formula="of:=AVERAGE([.B172:.B270])" office:value-type="float" office:value="27.9806656565657" calcext:value-type="float">
            <text:p>27.9806656565657</text:p>
          </table:table-cell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float" office:value="28.54" calcext:value-type="float">
            <text:p>28.54</text:p>
          </table:table-cell>
          <table:table-cell office:value-type="float" office:value="16590259" calcext:value-type="float">
            <text:p>16590259</text:p>
          </table:table-cell>
          <table:table-cell table:formula="of:=AVERAGE([.B223:.B271])" office:value-type="float" office:value="27.9112244897959" calcext:value-type="float">
            <text:p>27.9112244897959</text:p>
          </table:table-cell>
          <table:table-cell table:formula="of:=AVERAGE([.B173:.B271])" office:value-type="float" office:value="27.9789212121212" calcext:value-type="float">
            <text:p>27.9789212121212</text:p>
          </table:table-cell>
        </table:table-row>
        <table:table-row table:style-name="ro1">
          <table:table-cell office:value-type="date" office:date-value="2025-03-02" calcext:value-type="date">
            <text:p>2025-03-02</text:p>
          </table:table-cell>
          <table:table-cell office:value-type="float" office:value="28.54" calcext:value-type="float">
            <text:p>28.54</text:p>
          </table:table-cell>
          <table:table-cell office:value-type="float" office:value="16590259" calcext:value-type="float">
            <text:p>16590259</text:p>
          </table:table-cell>
          <table:table-cell table:formula="of:=AVERAGE([.B224:.B272])" office:value-type="float" office:value="27.9424489795918" calcext:value-type="float">
            <text:p>27.9424489795918</text:p>
          </table:table-cell>
          <table:table-cell table:formula="of:=AVERAGE([.B174:.B272])" office:value-type="float" office:value="27.9734737373737" calcext:value-type="float">
            <text:p>27.9734737373737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28.4" calcext:value-type="float">
            <text:p>28.4</text:p>
          </table:table-cell>
          <table:table-cell office:value-type="float" office:value="17881222" calcext:value-type="float">
            <text:p>17881222</text:p>
          </table:table-cell>
          <table:table-cell table:formula="of:=AVERAGE([.B225:.B273])" office:value-type="float" office:value="27.9736734693878" calcext:value-type="float">
            <text:p>27.9736734693878</text:p>
          </table:table-cell>
          <table:table-cell table:formula="of:=AVERAGE([.B175:.B273])" office:value-type="float" office:value="27.9680262626263" calcext:value-type="float">
            <text:p>27.9680262626263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float" office:value="27.92" calcext:value-type="float">
            <text:p>27.92</text:p>
          </table:table-cell>
          <table:table-cell office:value-type="float" office:value="20158093" calcext:value-type="float">
            <text:p>20158093</text:p>
          </table:table-cell>
          <table:table-cell table:formula="of:=AVERAGE([.B226:.B274])" office:value-type="float" office:value="27.9961224489796" calcext:value-type="float">
            <text:p>27.9961224489796</text:p>
          </table:table-cell>
          <table:table-cell table:formula="of:=AVERAGE([.B176:.B274])" office:value-type="float" office:value="27.9611646464646" calcext:value-type="float">
            <text:p>27.9611646464646</text:p>
          </table:table-cell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float" office:value="28.05" calcext:value-type="float">
            <text:p>28.05</text:p>
          </table:table-cell>
          <table:table-cell office:value-type="float" office:value="16031659" calcext:value-type="float">
            <text:p>16031659</text:p>
          </table:table-cell>
          <table:table-cell table:formula="of:=AVERAGE([.B227:.B275])" office:value-type="float" office:value="28.0042857142857" calcext:value-type="float">
            <text:p>28.0042857142857</text:p>
          </table:table-cell>
          <table:table-cell table:formula="of:=AVERAGE([.B177:.B275])" office:value-type="float" office:value="27.9478535353535" calcext:value-type="float">
            <text:p>27.9478535353535</text:p>
          </table:table-cell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float" office:value="28.07" calcext:value-type="float">
            <text:p>28.07</text:p>
          </table:table-cell>
          <table:table-cell office:value-type="float" office:value="14871813" calcext:value-type="float">
            <text:p>14871813</text:p>
          </table:table-cell>
          <table:table-cell table:formula="of:=AVERAGE([.B228:.B276])" office:value-type="float" office:value="28.0089795918367" calcext:value-type="float">
            <text:p>28.0089795918367</text:p>
          </table:table-cell>
          <table:table-cell table:formula="of:=AVERAGE([.B178:.B276])" office:value-type="float" office:value="27.9364555555556" calcext:value-type="float">
            <text:p>27.9364555555556</text:p>
          </table:table-cell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float" office:value="28.46" calcext:value-type="float">
            <text:p>28.46</text:p>
          </table:table-cell>
          <table:table-cell office:value-type="float" office:value="16558725" calcext:value-type="float">
            <text:p>16558725</text:p>
          </table:table-cell>
          <table:table-cell table:formula="of:=AVERAGE([.B229:.B277])" office:value-type="float" office:value="28.0138775510204" calcext:value-type="float">
            <text:p>28.0138775510204</text:p>
          </table:table-cell>
          <table:table-cell table:formula="of:=AVERAGE([.B179:.B277])" office:value-type="float" office:value="27.9253595959596" calcext:value-type="float">
            <text:p>27.9253595959596</text:p>
          </table:table-cell>
        </table:table-row>
        <table:table-row table:style-name="ro1">
          <table:table-cell office:value-type="date" office:date-value="2025-03-08" calcext:value-type="date">
            <text:p>2025-03-08</text:p>
          </table:table-cell>
          <table:table-cell office:value-type="float" office:value="28.46" calcext:value-type="float">
            <text:p>28.46</text:p>
          </table:table-cell>
          <table:table-cell office:value-type="float" office:value="16558725" calcext:value-type="float">
            <text:p>16558725</text:p>
          </table:table-cell>
          <table:table-cell table:formula="of:=AVERAGE([.B230:.B278])" office:value-type="float" office:value="28.0234693877551" calcext:value-type="float">
            <text:p>28.0234693877551</text:p>
          </table:table-cell>
          <table:table-cell table:formula="of:=AVERAGE([.B180:.B278])" office:value-type="float" office:value="27.918203030303" calcext:value-type="float">
            <text:p>27.918203030303</text:p>
          </table:table-cell>
        </table:table-row>
        <table:table-row table:style-name="ro1">
          <table:table-cell office:value-type="date" office:date-value="2025-03-09" calcext:value-type="date">
            <text:p>2025-03-09</text:p>
          </table:table-cell>
          <table:table-cell office:value-type="float" office:value="28.46" calcext:value-type="float">
            <text:p>28.46</text:p>
          </table:table-cell>
          <table:table-cell office:value-type="float" office:value="16558725" calcext:value-type="float">
            <text:p>16558725</text:p>
          </table:table-cell>
          <table:table-cell table:formula="of:=AVERAGE([.B231:.B279])" office:value-type="float" office:value="28.0330612244898" calcext:value-type="float">
            <text:p>28.0330612244898</text:p>
          </table:table-cell>
          <table:table-cell table:formula="of:=AVERAGE([.B181:.B279])" office:value-type="float" office:value="27.9101454545455" calcext:value-type="float">
            <text:p>27.9101454545455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28.38" calcext:value-type="float">
            <text:p>28.38</text:p>
          </table:table-cell>
          <table:table-cell office:value-type="float" office:value="23520540" calcext:value-type="float">
            <text:p>23520540</text:p>
          </table:table-cell>
          <table:table-cell table:formula="of:=AVERAGE([.B232:.B280])" office:value-type="float" office:value="28.0426530612245" calcext:value-type="float">
            <text:p>28.0426530612245</text:p>
          </table:table-cell>
          <table:table-cell table:formula="of:=AVERAGE([.B182:.B280])" office:value-type="float" office:value="27.9020878787879" calcext:value-type="float">
            <text:p>27.9020878787879</text:p>
          </table:table-cell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float" office:value="27.74" calcext:value-type="float">
            <text:p>27.74</text:p>
          </table:table-cell>
          <table:table-cell office:value-type="float" office:value="24564554" calcext:value-type="float">
            <text:p>24564554</text:p>
          </table:table-cell>
          <table:table-cell table:formula="of:=AVERAGE([.B233:.B281])" office:value-type="float" office:value="28.050612244898" calcext:value-type="float">
            <text:p>28.050612244898</text:p>
          </table:table-cell>
          <table:table-cell table:formula="of:=AVERAGE([.B183:.B281])" office:value-type="float" office:value="27.8932222222222" calcext:value-type="float">
            <text:p>27.8932222222222</text:p>
          </table:table-cell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float" office:value="27.44" calcext:value-type="float">
            <text:p>27.44</text:p>
          </table:table-cell>
          <table:table-cell office:value-type="float" office:value="26655231" calcext:value-type="float">
            <text:p>26655231</text:p>
          </table:table-cell>
          <table:table-cell table:formula="of:=AVERAGE([.B234:.B282])" office:value-type="float" office:value="28.0408163265306" calcext:value-type="float">
            <text:p>28.0408163265306</text:p>
          </table:table-cell>
          <table:table-cell table:formula="of:=AVERAGE([.B184:.B282])" office:value-type="float" office:value="27.8797939393939" calcext:value-type="float">
            <text:p>27.8797939393939</text:p>
          </table:table-cell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27.29" calcext:value-type="float">
            <text:p>27.29</text:p>
          </table:table-cell>
          <table:table-cell office:value-type="float" office:value="15121380" calcext:value-type="float">
            <text:p>15121380</text:p>
          </table:table-cell>
          <table:table-cell table:formula="of:=AVERAGE([.B235:.B283])" office:value-type="float" office:value="28.0310204081633" calcext:value-type="float">
            <text:p>28.0310204081633</text:p>
          </table:table-cell>
          <table:table-cell table:formula="of:=AVERAGE([.B185:.B283])" office:value-type="float" office:value="27.8649363636364" calcext:value-type="float">
            <text:p>27.8649363636364</text:p>
          </table:table-cell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27.64" calcext:value-type="float">
            <text:p>27.64</text:p>
          </table:table-cell>
          <table:table-cell office:value-type="float" office:value="15167190" calcext:value-type="float">
            <text:p>15167190</text:p>
          </table:table-cell>
          <table:table-cell table:formula="of:=AVERAGE([.B236:.B284])" office:value-type="float" office:value="28.014693877551" calcext:value-type="float">
            <text:p>28.014693877551</text:p>
          </table:table-cell>
          <table:table-cell table:formula="of:=AVERAGE([.B186:.B284])" office:value-type="float" office:value="27.8509656565657" calcext:value-type="float">
            <text:p>27.8509656565657</text:p>
          </table:table-cell>
        </table:table-row>
        <table:table-row table:style-name="ro1">
          <table:table-cell office:value-type="date" office:date-value="2025-03-15" calcext:value-type="date">
            <text:p>2025-03-15</text:p>
          </table:table-cell>
          <table:table-cell office:value-type="float" office:value="27.64" calcext:value-type="float">
            <text:p>27.64</text:p>
          </table:table-cell>
          <table:table-cell office:value-type="float" office:value="15167190" calcext:value-type="float">
            <text:p>15167190</text:p>
          </table:table-cell>
          <table:table-cell table:formula="of:=AVERAGE([.B237:.B285])" office:value-type="float" office:value="28.0059183673469" calcext:value-type="float">
            <text:p>28.0059183673469</text:p>
          </table:table-cell>
          <table:table-cell table:formula="of:=AVERAGE([.B187:.B285])" office:value-type="float" office:value="27.8404303030303" calcext:value-type="float">
            <text:p>27.8404303030303</text:p>
          </table:table-cell>
        </table:table-row>
        <table:table-row table:style-name="ro1">
          <table:table-cell office:value-type="date" office:date-value="2025-03-16" calcext:value-type="date">
            <text:p>2025-03-16</text:p>
          </table:table-cell>
          <table:table-cell office:value-type="float" office:value="27.64" calcext:value-type="float">
            <text:p>27.64</text:p>
          </table:table-cell>
          <table:table-cell office:value-type="float" office:value="15167190" calcext:value-type="float">
            <text:p>15167190</text:p>
          </table:table-cell>
          <table:table-cell table:formula="of:=AVERAGE([.B238:.B286])" office:value-type="float" office:value="27.9971428571429" calcext:value-type="float">
            <text:p>27.9971428571429</text:p>
          </table:table-cell>
          <table:table-cell table:formula="of:=AVERAGE([.B188:.B286])" office:value-type="float" office:value="27.831195959596" calcext:value-type="float">
            <text:p>27.831195959596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27.96" calcext:value-type="float">
            <text:p>27.96</text:p>
          </table:table-cell>
          <table:table-cell office:value-type="float" office:value="16046240" calcext:value-type="float">
            <text:p>16046240</text:p>
          </table:table-cell>
          <table:table-cell table:formula="of:=AVERAGE([.B239:.B287])" office:value-type="float" office:value="27.9883673469388" calcext:value-type="float">
            <text:p>27.9883673469388</text:p>
          </table:table-cell>
          <table:table-cell table:formula="of:=AVERAGE([.B189:.B287])" office:value-type="float" office:value="27.8219616161616" calcext:value-type="float">
            <text:p>27.8219616161616</text:p>
          </table:table-cell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float" office:value="27.92" calcext:value-type="float">
            <text:p>27.92</text:p>
          </table:table-cell>
          <table:table-cell office:value-type="float" office:value="12625264" calcext:value-type="float">
            <text:p>12625264</text:p>
          </table:table-cell>
          <table:table-cell table:formula="of:=AVERAGE([.B240:.B288])" office:value-type="float" office:value="27.9783673469388" calcext:value-type="float">
            <text:p>27.9783673469388</text:p>
          </table:table-cell>
          <table:table-cell table:formula="of:=AVERAGE([.B190:.B288])" office:value-type="float" office:value="27.8159595959596" calcext:value-type="float">
            <text:p>27.8159595959596</text:p>
          </table:table-cell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float" office:value="28.03" calcext:value-type="float">
            <text:p>28.03</text:p>
          </table:table-cell>
          <table:table-cell office:value-type="float" office:value="13079386" calcext:value-type="float">
            <text:p>13079386</text:p>
          </table:table-cell>
          <table:table-cell table:formula="of:=AVERAGE([.B241:.B289])" office:value-type="float" office:value="27.975306122449" calcext:value-type="float">
            <text:p>27.975306122449</text:p>
          </table:table-cell>
          <table:table-cell table:formula="of:=AVERAGE([.B191:.B289])" office:value-type="float" office:value="27.8098535353535" calcext:value-type="float">
            <text:p>27.8098535353535</text:p>
          </table:table-cell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float" office:value="27.95" calcext:value-type="float">
            <text:p>27.95</text:p>
          </table:table-cell>
          <table:table-cell office:value-type="float" office:value="11317434" calcext:value-type="float">
            <text:p>11317434</text:p>
          </table:table-cell>
          <table:table-cell table:formula="of:=AVERAGE([.B242:.B290])" office:value-type="float" office:value="27.9757142857143" calcext:value-type="float">
            <text:p>27.9757142857143</text:p>
          </table:table-cell>
          <table:table-cell table:formula="of:=AVERAGE([.B192:.B290])" office:value-type="float" office:value="27.8059595959596" calcext:value-type="float">
            <text:p>27.8059595959596</text:p>
          </table:table-cell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27.76" calcext:value-type="float">
            <text:p>27.76</text:p>
          </table:table-cell>
          <table:table-cell office:value-type="float" office:value="16883761" calcext:value-type="float">
            <text:p>16883761</text:p>
          </table:table-cell>
          <table:table-cell table:formula="of:=AVERAGE([.B243:.B291])" office:value-type="float" office:value="27.9751020408163" calcext:value-type="float">
            <text:p>27.9751020408163</text:p>
          </table:table-cell>
          <table:table-cell table:formula="of:=AVERAGE([.B193:.B291])" office:value-type="float" office:value="27.8029292929293" calcext:value-type="float">
            <text:p>27.8029292929293</text:p>
          </table:table-cell>
        </table:table-row>
        <table:table-row table:style-name="ro1">
          <table:table-cell office:value-type="date" office:date-value="2025-03-22" calcext:value-type="date">
            <text:p>2025-03-22</text:p>
          </table:table-cell>
          <table:table-cell office:value-type="float" office:value="27.76" calcext:value-type="float">
            <text:p>27.76</text:p>
          </table:table-cell>
          <table:table-cell office:value-type="float" office:value="16883761" calcext:value-type="float">
            <text:p>16883761</text:p>
          </table:table-cell>
          <table:table-cell table:formula="of:=AVERAGE([.B244:.B292])" office:value-type="float" office:value="27.9736734693878" calcext:value-type="float">
            <text:p>27.9736734693878</text:p>
          </table:table-cell>
          <table:table-cell table:formula="of:=AVERAGE([.B194:.B292])" office:value-type="float" office:value="27.7984848484849" calcext:value-type="float">
            <text:p>27.7984848484849</text:p>
          </table:table-cell>
        </table:table-row>
        <table:table-row table:style-name="ro1">
          <table:table-cell office:value-type="date" office:date-value="2025-03-23" calcext:value-type="date">
            <text:p>2025-03-23</text:p>
          </table:table-cell>
          <table:table-cell office:value-type="float" office:value="27.76" calcext:value-type="float">
            <text:p>27.76</text:p>
          </table:table-cell>
          <table:table-cell office:value-type="float" office:value="16883761" calcext:value-type="float">
            <text:p>16883761</text:p>
          </table:table-cell>
          <table:table-cell table:formula="of:=AVERAGE([.B245:.B293])" office:value-type="float" office:value="27.9722448979592" calcext:value-type="float">
            <text:p>27.9722448979592</text:p>
          </table:table-cell>
          <table:table-cell table:formula="of:=AVERAGE([.B195:.B293])" office:value-type="float" office:value="27.7947474747475" calcext:value-type="float">
            <text:p>27.7947474747475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28.09" calcext:value-type="float">
            <text:p>28.09</text:p>
          </table:table-cell>
          <table:table-cell office:value-type="float" office:value="15452487" calcext:value-type="float">
            <text:p>15452487</text:p>
          </table:table-cell>
          <table:table-cell table:formula="of:=AVERAGE([.B246:.B294])" office:value-type="float" office:value="27.9708163265306" calcext:value-type="float">
            <text:p>27.9708163265306</text:p>
          </table:table-cell>
          <table:table-cell table:formula="of:=AVERAGE([.B196:.B294])" office:value-type="float" office:value="27.7910101010101" calcext:value-type="float">
            <text:p>27.7910101010101</text:p>
          </table:table-cell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float" office:value="27.84" calcext:value-type="float">
            <text:p>27.84</text:p>
          </table:table-cell>
          <table:table-cell office:value-type="float" office:value="16456355" calcext:value-type="float">
            <text:p>16456355</text:p>
          </table:table-cell>
          <table:table-cell table:formula="of:=AVERAGE([.B247:.B295])" office:value-type="float" office:value="27.9783673469388" calcext:value-type="float">
            <text:p>27.9783673469388</text:p>
          </table:table-cell>
          <table:table-cell table:formula="of:=AVERAGE([.B197:.B295])" office:value-type="float" office:value="27.7906060606061" calcext:value-type="float">
            <text:p>27.7906060606061</text:p>
          </table:table-cell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float" office:value="27.8" calcext:value-type="float">
            <text:p>27.8</text:p>
          </table:table-cell>
          <table:table-cell office:value-type="float" office:value="17417360" calcext:value-type="float">
            <text:p>17417360</text:p>
          </table:table-cell>
          <table:table-cell table:formula="of:=AVERAGE([.B248:.B296])" office:value-type="float" office:value="27.98" calcext:value-type="float">
            <text:p>27.98</text:p>
          </table:table-cell>
          <table:table-cell table:formula="of:=AVERAGE([.B198:.B296])" office:value-type="float" office:value="27.790303030303" calcext:value-type="float">
            <text:p>27.790303030303</text:p>
          </table:table-cell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float" office:value="27.75" calcext:value-type="float">
            <text:p>27.75</text:p>
          </table:table-cell>
          <table:table-cell office:value-type="float" office:value="11448766" calcext:value-type="float">
            <text:p>11448766</text:p>
          </table:table-cell>
          <table:table-cell table:formula="of:=AVERAGE([.B249:.B297])" office:value-type="float" office:value="27.9769387755102" calcext:value-type="float">
            <text:p>27.9769387755102</text:p>
          </table:table-cell>
          <table:table-cell table:formula="of:=AVERAGE([.B199:.B297])" office:value-type="float" office:value="27.790202020202" calcext:value-type="float">
            <text:p>27.790202020202</text:p>
          </table:table-cell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27.58" calcext:value-type="float">
            <text:p>27.58</text:p>
          </table:table-cell>
          <table:table-cell office:value-type="float" office:value="15661060" calcext:value-type="float">
            <text:p>15661060</text:p>
          </table:table-cell>
          <table:table-cell table:formula="of:=AVERAGE([.B250:.B298])" office:value-type="float" office:value="27.9769387755102" calcext:value-type="float">
            <text:p>27.9769387755102</text:p>
          </table:table-cell>
          <table:table-cell table:formula="of:=AVERAGE([.B200:.B298])" office:value-type="float" office:value="27.7969696969697" calcext:value-type="float">
            <text:p>27.7969696969697</text:p>
          </table:table-cell>
        </table:table-row>
        <table:table-row table:style-name="ro1">
          <table:table-cell office:value-type="date" office:date-value="2025-03-29" calcext:value-type="date">
            <text:p>2025-03-29</text:p>
          </table:table-cell>
          <table:table-cell office:value-type="float" office:value="27.58" calcext:value-type="float">
            <text:p>27.58</text:p>
          </table:table-cell>
          <table:table-cell office:value-type="float" office:value="15661060" calcext:value-type="float">
            <text:p>15661060</text:p>
          </table:table-cell>
          <table:table-cell table:formula="of:=AVERAGE([.B251:.B299])" office:value-type="float" office:value="27.9773469387755" calcext:value-type="float">
            <text:p>27.9773469387755</text:p>
          </table:table-cell>
          <table:table-cell table:formula="of:=AVERAGE([.B201:.B299])" office:value-type="float" office:value="27.8035353535354" calcext:value-type="float">
            <text:p>27.8035353535354</text:p>
          </table:table-cell>
        </table:table-row>
        <table:table-row table:style-name="ro1">
          <table:table-cell office:value-type="date" office:date-value="2025-03-30" calcext:value-type="date">
            <text:p>2025-03-30</text:p>
          </table:table-cell>
          <table:table-cell office:value-type="float" office:value="27.58" calcext:value-type="float">
            <text:p>27.58</text:p>
          </table:table-cell>
          <table:table-cell office:value-type="float" office:value="15661060" calcext:value-type="float">
            <text:p>15661060</text:p>
          </table:table-cell>
          <table:table-cell table:formula="of:=AVERAGE([.B252:.B300])" office:value-type="float" office:value="27.9777551020408" calcext:value-type="float">
            <text:p>27.9777551020408</text:p>
          </table:table-cell>
          <table:table-cell table:formula="of:=AVERAGE([.B202:.B300])" office:value-type="float" office:value="27.8064646464646" calcext:value-type="float">
            <text:p>27.8064646464646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27.96" calcext:value-type="float">
            <text:p>27.96</text:p>
          </table:table-cell>
          <table:table-cell office:value-type="float" office:value="19019415" calcext:value-type="float">
            <text:p>19019415</text:p>
          </table:table-cell>
          <table:table-cell table:formula="of:=AVERAGE([.B253:.B301])" office:value-type="float" office:value="27.9781632653061" calcext:value-type="float">
            <text:p>27.9781632653061</text:p>
          </table:table-cell>
          <table:table-cell table:formula="of:=AVERAGE([.B203:.B301])" office:value-type="float" office:value="27.8093939393939" calcext:value-type="float">
            <text:p>27.8093939393939</text:p>
          </table:table-cell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27.87" calcext:value-type="float">
            <text:p>27.87</text:p>
          </table:table-cell>
          <table:table-cell office:value-type="float" office:value="14702166" calcext:value-type="float">
            <text:p>14702166</text:p>
          </table:table-cell>
          <table:table-cell table:formula="of:=AVERAGE([.B254:.B302])" office:value-type="float" office:value="27.9838775510204" calcext:value-type="float">
            <text:p>27.9838775510204</text:p>
          </table:table-cell>
          <table:table-cell table:formula="of:=AVERAGE([.B204:.B302])" office:value-type="float" office:value="27.8161616161616" calcext:value-type="float">
            <text:p>27.8161616161616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27.87" calcext:value-type="float">
            <text:p>27.87</text:p>
          </table:table-cell>
          <table:table-cell office:value-type="float" office:value="11923420" calcext:value-type="float">
            <text:p>11923420</text:p>
          </table:table-cell>
          <table:table-cell table:formula="of:=AVERAGE([.B255:.B303])" office:value-type="float" office:value="27.9838775510204" calcext:value-type="float">
            <text:p>27.9838775510204</text:p>
          </table:table-cell>
          <table:table-cell table:formula="of:=AVERAGE([.B205:.B303])" office:value-type="float" office:value="27.8212121212121" calcext:value-type="float">
            <text:p>27.8212121212121</text:p>
          </table:table-cell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float" office:value="26.73" calcext:value-type="float">
            <text:p>26.73</text:p>
          </table:table-cell>
          <table:table-cell office:value-type="float" office:value="30584909" calcext:value-type="float">
            <text:p>30584909</text:p>
          </table:table-cell>
          <table:table-cell table:formula="of:=AVERAGE([.B256:.B304])" office:value-type="float" office:value="27.9883673469388" calcext:value-type="float">
            <text:p>27.9883673469388</text:p>
          </table:table-cell>
          <table:table-cell table:formula="of:=AVERAGE([.B206:.B304])" office:value-type="float" office:value="27.8241414141414" calcext:value-type="float">
            <text:p>27.8241414141414</text:p>
          </table:table-cell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25.28" calcext:value-type="float">
            <text:p>25.28</text:p>
          </table:table-cell>
          <table:table-cell office:value-type="float" office:value="45530214" calcext:value-type="float">
            <text:p>45530214</text:p>
          </table:table-cell>
          <table:table-cell table:formula="of:=AVERAGE([.B257:.B305])" office:value-type="float" office:value="27.9655102040816" calcext:value-type="float">
            <text:p>27.9655102040816</text:p>
          </table:table-cell>
          <table:table-cell table:formula="of:=AVERAGE([.B207:.B305])" office:value-type="float" office:value="27.8155555555556" calcext:value-type="float">
            <text:p>27.8155555555556</text:p>
          </table:table-cell>
        </table:table-row>
        <table:table-row table:style-name="ro1">
          <table:table-cell office:value-type="date" office:date-value="2025-04-05" calcext:value-type="date">
            <text:p>2025-04-05</text:p>
          </table:table-cell>
          <table:table-cell office:value-type="float" office:value="25.28" calcext:value-type="float">
            <text:p>25.28</text:p>
          </table:table-cell>
          <table:table-cell office:value-type="float" office:value="45530214" calcext:value-type="float">
            <text:p>45530214</text:p>
          </table:table-cell>
          <table:table-cell table:formula="of:=AVERAGE([.B258:.B306])" office:value-type="float" office:value="27.9142857142857" calcext:value-type="float">
            <text:p>27.9142857142857</text:p>
          </table:table-cell>
          <table:table-cell table:formula="of:=AVERAGE([.B208:.B306])" office:value-type="float" office:value="27.7922222222222" calcext:value-type="float">
            <text:p>27.7922222222222</text:p>
          </table:table-cell>
        </table:table-row>
        <table:table-row table:style-name="ro1">
          <table:table-cell office:value-type="date" office:date-value="2025-04-06" calcext:value-type="date">
            <text:p>2025-04-06</text:p>
          </table:table-cell>
          <table:table-cell office:value-type="float" office:value="25.28" calcext:value-type="float">
            <text:p>25.28</text:p>
          </table:table-cell>
          <table:table-cell office:value-type="float" office:value="45530214" calcext:value-type="float">
            <text:p>45530214</text:p>
          </table:table-cell>
          <table:table-cell table:formula="of:=AVERAGE([.B259:.B307])" office:value-type="float" office:value="27.8630612244898" calcext:value-type="float">
            <text:p>27.8630612244898</text:p>
          </table:table-cell>
          <table:table-cell table:formula="of:=AVERAGE([.B209:.B307])" office:value-type="float" office:value="27.770101010101" calcext:value-type="float">
            <text:p>27.770101010101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24.94" calcext:value-type="float">
            <text:p>24.94</text:p>
          </table:table-cell>
          <table:table-cell office:value-type="float" office:value="50085218" calcext:value-type="float">
            <text:p>50085218</text:p>
          </table:table-cell>
          <table:table-cell table:formula="of:=AVERAGE([.B260:.B308])" office:value-type="float" office:value="27.8118367346939" calcext:value-type="float">
            <text:p>27.8118367346939</text:p>
          </table:table-cell>
          <table:table-cell table:formula="of:=AVERAGE([.B210:.B308])" office:value-type="float" office:value="27.7479797979798" calcext:value-type="float">
            <text:p>27.7479797979798</text:p>
          </table:table-cell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float" office:value="24.32" calcext:value-type="float">
            <text:p>24.32</text:p>
          </table:table-cell>
          <table:table-cell office:value-type="float" office:value="40098801" calcext:value-type="float">
            <text:p>40098801</text:p>
          </table:table-cell>
          <table:table-cell table:formula="of:=AVERAGE([.B261:.B309])" office:value-type="float" office:value="27.7536734693878" calcext:value-type="float">
            <text:p>27.7536734693878</text:p>
          </table:table-cell>
          <table:table-cell table:formula="of:=AVERAGE([.B211:.B309])" office:value-type="float" office:value="27.7224242424242" calcext:value-type="float">
            <text:p>27.7224242424242</text:p>
          </table:table-cell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25.87" calcext:value-type="float">
            <text:p>25.87</text:p>
          </table:table-cell>
          <table:table-cell office:value-type="float" office:value="46103820" calcext:value-type="float">
            <text:p>46103820</text:p>
          </table:table-cell>
          <table:table-cell table:formula="of:=AVERAGE([.B262:.B310])" office:value-type="float" office:value="27.6787755102041" calcext:value-type="float">
            <text:p>27.6787755102041</text:p>
          </table:table-cell>
          <table:table-cell table:formula="of:=AVERAGE([.B212:.B310])" office:value-type="float" office:value="27.6930303030303" calcext:value-type="float">
            <text:p>27.6930303030303</text:p>
          </table:table-cell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float" office:value="24.97" calcext:value-type="float">
            <text:p>24.97</text:p>
          </table:table-cell>
          <table:table-cell office:value-type="float" office:value="31358485" calcext:value-type="float">
            <text:p>31358485</text:p>
          </table:table-cell>
          <table:table-cell table:formula="of:=AVERAGE([.B263:.B311])" office:value-type="float" office:value="27.6316326530612" calcext:value-type="float">
            <text:p>27.6316326530612</text:p>
          </table:table-cell>
          <table:table-cell table:formula="of:=AVERAGE([.B213:.B311])" office:value-type="float" office:value="27.6783838383838" calcext:value-type="float">
            <text:p>27.6783838383838</text:p>
          </table:table-cell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25.3" calcext:value-type="float">
            <text:p>25.3</text:p>
          </table:table-cell>
          <table:table-cell office:value-type="float" office:value="21685858" calcext:value-type="float">
            <text:p>21685858</text:p>
          </table:table-cell>
          <table:table-cell table:formula="of:=AVERAGE([.B264:.B312])" office:value-type="float" office:value="27.5632653061224" calcext:value-type="float">
            <text:p>27.5632653061224</text:p>
          </table:table-cell>
          <table:table-cell table:formula="of:=AVERAGE([.B214:.B312])" office:value-type="float" office:value="27.6546464646465" calcext:value-type="float">
            <text:p>27.6546464646465</text:p>
          </table:table-cell>
        </table:table-row>
        <table:table-row table:style-name="ro1">
          <table:table-cell office:value-type="date" office:date-value="2025-04-12" calcext:value-type="date">
            <text:p>2025-04-12</text:p>
          </table:table-cell>
          <table:table-cell office:value-type="float" office:value="25.3" calcext:value-type="float">
            <text:p>25.3</text:p>
          </table:table-cell>
          <table:table-cell office:value-type="float" office:value="21685858" calcext:value-type="float">
            <text:p>21685858</text:p>
          </table:table-cell>
          <table:table-cell table:formula="of:=AVERAGE([.B265:.B313])" office:value-type="float" office:value="27.5038775510204" calcext:value-type="float">
            <text:p>27.5038775510204</text:p>
          </table:table-cell>
          <table:table-cell table:formula="of:=AVERAGE([.B215:.B313])" office:value-type="float" office:value="27.6348484848485" calcext:value-type="float">
            <text:p>27.6348484848485</text:p>
          </table:table-cell>
        </table:table-row>
        <table:table-row table:style-name="ro1">
          <table:table-cell office:value-type="date" office:date-value="2025-04-13" calcext:value-type="date">
            <text:p>2025-04-13</text:p>
          </table:table-cell>
          <table:table-cell office:value-type="float" office:value="25.3" calcext:value-type="float">
            <text:p>25.3</text:p>
          </table:table-cell>
          <table:table-cell office:value-type="float" office:value="21685858" calcext:value-type="float">
            <text:p>21685858</text:p>
          </table:table-cell>
          <table:table-cell table:formula="of:=AVERAGE([.B266:.B314])" office:value-type="float" office:value="27.4444897959184" calcext:value-type="float">
            <text:p>27.4444897959184</text:p>
          </table:table-cell>
          <table:table-cell table:formula="of:=AVERAGE([.B216:.B314])" office:value-type="float" office:value="27.6132323232323" calcext:value-type="float">
            <text:p>27.6132323232323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25.6" calcext:value-type="float">
            <text:p>25.6</text:p>
          </table:table-cell>
          <table:table-cell office:value-type="float" office:value="27320690" calcext:value-type="float">
            <text:p>27320690</text:p>
          </table:table-cell>
          <table:table-cell table:formula="of:=AVERAGE([.B267:.B315])" office:value-type="float" office:value="27.3851020408163" calcext:value-type="float">
            <text:p>27.3851020408163</text:p>
          </table:table-cell>
          <table:table-cell table:formula="of:=AVERAGE([.B217:.B315])" office:value-type="float" office:value="27.5916161616162" calcext:value-type="float">
            <text:p>27.5916161616162</text:p>
          </table:table-cell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25.43" calcext:value-type="float">
            <text:p>25.43</text:p>
          </table:table-cell>
          <table:table-cell office:value-type="float" office:value="17240841" calcext:value-type="float">
            <text:p>17240841</text:p>
          </table:table-cell>
          <table:table-cell table:formula="of:=AVERAGE([.B268:.B316])" office:value-type="float" office:value="27.3308163265306" calcext:value-type="float">
            <text:p>27.3308163265306</text:p>
          </table:table-cell>
          <table:table-cell table:formula="of:=AVERAGE([.B218:.B316])" office:value-type="float" office:value="27.5730303030303" calcext:value-type="float">
            <text:p>27.5730303030303</text:p>
          </table:table-cell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25.13" calcext:value-type="float">
            <text:p>25.13</text:p>
          </table:table-cell>
          <table:table-cell office:value-type="float" office:value="18600530" calcext:value-type="float">
            <text:p>18600530</text:p>
          </table:table-cell>
          <table:table-cell table:formula="of:=AVERAGE([.B269:.B317])" office:value-type="float" office:value="27.2691836734694" calcext:value-type="float">
            <text:p>27.2691836734694</text:p>
          </table:table-cell>
          <table:table-cell table:formula="of:=AVERAGE([.B219:.B317])" office:value-type="float" office:value="27.5544444444444" calcext:value-type="float">
            <text:p>27.5544444444444</text:p>
          </table:table-cell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25.42" calcext:value-type="float">
            <text:p>25.42</text:p>
          </table:table-cell>
          <table:table-cell office:value-type="float" office:value="15390575" calcext:value-type="float">
            <text:p>15390575</text:p>
          </table:table-cell>
          <table:table-cell table:formula="of:=AVERAGE([.B270:.B318])" office:value-type="float" office:value="27.2075510204082" calcext:value-type="float">
            <text:p>27.2075510204082</text:p>
          </table:table-cell>
          <table:table-cell table:formula="of:=AVERAGE([.B220:.B318])" office:value-type="float" office:value="27.5329292929293" calcext:value-type="float">
            <text:p>27.5329292929293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float" office:value="25.42" calcext:value-type="float">
            <text:p>25.42</text:p>
          </table:table-cell>
          <table:table-cell office:value-type="float" office:value="15390575" calcext:value-type="float">
            <text:p>15390575</text:p>
          </table:table-cell>
          <table:table-cell table:formula="of:=AVERAGE([.B271:.B319])" office:value-type="float" office:value="27.1514285714286" calcext:value-type="float">
            <text:p>27.1514285714286</text:p>
          </table:table-cell>
          <table:table-cell table:formula="of:=AVERAGE([.B221:.B319])" office:value-type="float" office:value="27.5137373737374" calcext:value-type="float">
            <text:p>27.5137373737374</text:p>
          </table:table-cell>
        </table:table-row>
        <table:table-row table:style-name="ro1">
          <table:table-cell office:value-type="date" office:date-value="2025-04-19" calcext:value-type="date">
            <text:p>2025-04-19</text:p>
          </table:table-cell>
          <table:table-cell office:value-type="float" office:value="25.42" calcext:value-type="float">
            <text:p>25.42</text:p>
          </table:table-cell>
          <table:table-cell office:value-type="float" office:value="15390575" calcext:value-type="float">
            <text:p>15390575</text:p>
          </table:table-cell>
          <table:table-cell table:formula="of:=AVERAGE([.B272:.B320])" office:value-type="float" office:value="27.0877551020408" calcext:value-type="float">
            <text:p>27.0877551020408</text:p>
          </table:table-cell>
          <table:table-cell table:formula="of:=AVERAGE([.B222:.B320])" office:value-type="float" office:value="27.4945454545455" calcext:value-type="float">
            <text:p>27.4945454545455</text:p>
          </table:table-cell>
        </table:table-row>
        <table:table-row table:style-name="ro1">
          <table:table-cell office:value-type="date" office:date-value="2025-04-20" calcext:value-type="date">
            <text:p>2025-04-20</text:p>
          </table:table-cell>
          <table:table-cell office:value-type="float" office:value="25.42" calcext:value-type="float">
            <text:p>25.42</text:p>
          </table:table-cell>
          <table:table-cell office:value-type="float" office:value="15390575" calcext:value-type="float">
            <text:p>15390575</text:p>
          </table:table-cell>
          <table:table-cell table:formula="of:=AVERAGE([.B273:.B321])" office:value-type="float" office:value="27.0240816326531" calcext:value-type="float">
            <text:p>27.0240816326531</text:p>
          </table:table-cell>
          <table:table-cell table:formula="of:=AVERAGE([.B223:.B321])" office:value-type="float" office:value="27.4784848484848" calcext:value-type="float">
            <text:p>27.4784848484848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25.03" calcext:value-type="float">
            <text:p>25.03</text:p>
          </table:table-cell>
          <table:table-cell office:value-type="float" office:value="21932859" calcext:value-type="float">
            <text:p>21932859</text:p>
          </table:table-cell>
          <table:table-cell table:formula="of:=AVERAGE([.B274:.B322])" office:value-type="float" office:value="26.9604081632653" calcext:value-type="float">
            <text:p>26.9604081632653</text:p>
          </table:table-cell>
          <table:table-cell table:formula="of:=AVERAGE([.B224:.B322])" office:value-type="float" office:value="27.4624242424242" calcext:value-type="float">
            <text:p>27.4624242424242</text:p>
          </table:table-cell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25.44" calcext:value-type="float">
            <text:p>25.44</text:p>
          </table:table-cell>
          <table:table-cell office:value-type="float" office:value="21483091" calcext:value-type="float">
            <text:p>21483091</text:p>
          </table:table-cell>
          <table:table-cell table:formula="of:=AVERAGE([.B275:.B323])" office:value-type="float" office:value="26.8916326530612" calcext:value-type="float">
            <text:p>26.8916326530612</text:p>
          </table:table-cell>
          <table:table-cell table:formula="of:=AVERAGE([.B225:.B323])" office:value-type="float" office:value="27.4424242424242" calcext:value-type="float">
            <text:p>27.4424242424242</text:p>
          </table:table-cell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25.42" calcext:value-type="float">
            <text:p>25.42</text:p>
          </table:table-cell>
          <table:table-cell office:value-type="float" office:value="27870357" calcext:value-type="float">
            <text:p>27870357</text:p>
          </table:table-cell>
          <table:table-cell table:formula="of:=AVERAGE([.B276:.B324])" office:value-type="float" office:value="26.8410204081633" calcext:value-type="float">
            <text:p>26.8410204081633</text:p>
          </table:table-cell>
          <table:table-cell table:formula="of:=AVERAGE([.B226:.B324])" office:value-type="float" office:value="27.4236363636364" calcext:value-type="float">
            <text:p>27.4236363636364</text:p>
          </table:table-cell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25.71" calcext:value-type="float">
            <text:p>25.71</text:p>
          </table:table-cell>
          <table:table-cell office:value-type="float" office:value="15485654" calcext:value-type="float">
            <text:p>15485654</text:p>
          </table:table-cell>
          <table:table-cell table:formula="of:=AVERAGE([.B277:.B325])" office:value-type="float" office:value="26.7873469387755" calcext:value-type="float">
            <text:p>26.7873469387755</text:p>
          </table:table-cell>
          <table:table-cell table:formula="of:=AVERAGE([.B227:.B325])" office:value-type="float" office:value="27.4024242424242" calcext:value-type="float">
            <text:p>27.4024242424242</text:p>
          </table:table-cell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25.67" calcext:value-type="float">
            <text:p>25.67</text:p>
          </table:table-cell>
          <table:table-cell office:value-type="float" office:value="14346155" calcext:value-type="float">
            <text:p>14346155</text:p>
          </table:table-cell>
          <table:table-cell table:formula="of:=AVERAGE([.B278:.B326])" office:value-type="float" office:value="26.7391836734694" calcext:value-type="float">
            <text:p>26.7391836734694</text:p>
          </table:table-cell>
          <table:table-cell table:formula="of:=AVERAGE([.B228:.B326])" office:value-type="float" office:value="27.3811111111111" calcext:value-type="float">
            <text:p>27.3811111111111</text:p>
          </table:table-cell>
        </table:table-row>
        <table:table-row table:style-name="ro1">
          <table:table-cell office:value-type="date" office:date-value="2025-04-26" calcext:value-type="date">
            <text:p>2025-04-26</text:p>
          </table:table-cell>
          <table:table-cell office:value-type="float" office:value="25.67" calcext:value-type="float">
            <text:p>25.67</text:p>
          </table:table-cell>
          <table:table-cell office:value-type="float" office:value="14346155" calcext:value-type="float">
            <text:p>14346155</text:p>
          </table:table-cell>
          <table:table-cell table:formula="of:=AVERAGE([.B279:.B327])" office:value-type="float" office:value="26.6822448979592" calcext:value-type="float">
            <text:p>26.6822448979592</text:p>
          </table:table-cell>
          <table:table-cell table:formula="of:=AVERAGE([.B229:.B327])" office:value-type="float" office:value="27.3592929292929" calcext:value-type="float">
            <text:p>27.3592929292929</text:p>
          </table:table-cell>
        </table:table-row>
        <table:table-row table:style-name="ro1">
          <table:table-cell office:value-type="date" office:date-value="2025-04-27" calcext:value-type="date">
            <text:p>2025-04-27</text:p>
          </table:table-cell>
          <table:table-cell office:value-type="float" office:value="25.67" calcext:value-type="float">
            <text:p>25.67</text:p>
          </table:table-cell>
          <table:table-cell office:value-type="float" office:value="14346155" calcext:value-type="float">
            <text:p>14346155</text:p>
          </table:table-cell>
          <table:table-cell table:formula="of:=AVERAGE([.B280:.B328])" office:value-type="float" office:value="26.625306122449" calcext:value-type="float">
            <text:p>26.625306122449</text:p>
          </table:table-cell>
          <table:table-cell table:formula="of:=AVERAGE([.B230:.B328])" office:value-type="float" office:value="27.3358585858586" calcext:value-type="float">
            <text:p>27.3358585858586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25.79" calcext:value-type="float">
            <text:p>25.79</text:p>
          </table:table-cell>
          <table:table-cell office:value-type="float" office:value="14821038" calcext:value-type="float">
            <text:p>14821038</text:p>
          </table:table-cell>
          <table:table-cell table:formula="of:=AVERAGE([.B281:.B329])" office:value-type="float" office:value="26.5683673469388" calcext:value-type="float">
            <text:p>26.5683673469388</text:p>
          </table:table-cell>
          <table:table-cell table:formula="of:=AVERAGE([.B231:.B329])" office:value-type="float" office:value="27.3124242424242" calcext:value-type="float">
            <text:p>27.3124242424242</text:p>
          </table:table-cell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25.89" calcext:value-type="float">
            <text:p>25.89</text:p>
          </table:table-cell>
          <table:table-cell office:value-type="float" office:value="12637724" calcext:value-type="float">
            <text:p>12637724</text:p>
          </table:table-cell>
          <table:table-cell table:formula="of:=AVERAGE([.B282:.B330])" office:value-type="float" office:value="26.5155102040816" calcext:value-type="float">
            <text:p>26.5155102040816</text:p>
          </table:table-cell>
          <table:table-cell table:formula="of:=AVERAGE([.B232:.B330])" office:value-type="float" office:value="27.290202020202" calcext:value-type="float">
            <text:p>27.290202020202</text:p>
          </table:table-cell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25.82" calcext:value-type="float">
            <text:p>25.82</text:p>
          </table:table-cell>
          <table:table-cell office:value-type="float" office:value="13636425" calcext:value-type="float">
            <text:p>13636425</text:p>
          </table:table-cell>
          <table:table-cell table:formula="of:=AVERAGE([.B283:.B331])" office:value-type="float" office:value="26.4777551020408" calcext:value-type="float">
            <text:p>26.4777551020408</text:p>
          </table:table-cell>
          <table:table-cell table:formula="of:=AVERAGE([.B233:.B331])" office:value-type="float" office:value="27.2689898989899" calcext:value-type="float">
            <text:p>27.2689898989899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25.71" calcext:value-type="float">
            <text:p>25.71</text:p>
          </table:table-cell>
          <table:table-cell office:value-type="float" office:value="15470561" calcext:value-type="float">
            <text:p>15470561</text:p>
          </table:table-cell>
          <table:table-cell table:formula="of:=AVERAGE([.B284:.B332])" office:value-type="float" office:value="26.444693877551" calcext:value-type="float">
            <text:p>26.444693877551</text:p>
          </table:table-cell>
          <table:table-cell table:formula="of:=AVERAGE([.B234:.B332])" office:value-type="float" office:value="27.2447474747475" calcext:value-type="float">
            <text:p>27.2447474747475</text:p>
          </table:table-cell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26.06" calcext:value-type="float">
            <text:p>26.06</text:p>
          </table:table-cell>
          <table:table-cell office:value-type="float" office:value="14242173" calcext:value-type="float">
            <text:p>14242173</text:p>
          </table:table-cell>
          <table:table-cell table:formula="of:=AVERAGE([.B285:.B333])" office:value-type="float" office:value="26.4124489795918" calcext:value-type="float">
            <text:p>26.4124489795918</text:p>
          </table:table-cell>
          <table:table-cell table:formula="of:=AVERAGE([.B235:.B333])" office:value-type="float" office:value="27.2224242424242" calcext:value-type="float">
            <text:p>27.2224242424242</text:p>
          </table:table-cell>
        </table:table-row>
        <table:table-row table:style-name="ro1">
          <table:table-cell office:value-type="date" office:date-value="2025-05-03" calcext:value-type="date">
            <text:p>2025-05-03</text:p>
          </table:table-cell>
          <table:table-cell office:value-type="float" office:value="26.06" calcext:value-type="float">
            <text:p>26.06</text:p>
          </table:table-cell>
          <table:table-cell office:value-type="float" office:value="14242173" calcext:value-type="float">
            <text:p>14242173</text:p>
          </table:table-cell>
          <table:table-cell table:formula="of:=AVERAGE([.B286:.B334])" office:value-type="float" office:value="26.3802040816327" calcext:value-type="float">
            <text:p>26.3802040816327</text:p>
          </table:table-cell>
          <table:table-cell table:formula="of:=AVERAGE([.B236:.B334])" office:value-type="float" office:value="27.2019191919192" calcext:value-type="float">
            <text:p>27.2019191919192</text:p>
          </table:table-cell>
        </table:table-row>
        <table:table-row table:style-name="ro1">
          <table:table-cell office:value-type="date" office:date-value="2025-05-04" calcext:value-type="date">
            <text:p>2025-05-04</text:p>
          </table:table-cell>
          <table:table-cell office:value-type="float" office:value="26.06" calcext:value-type="float">
            <text:p>26.06</text:p>
          </table:table-cell>
          <table:table-cell office:value-type="float" office:value="14242173" calcext:value-type="float">
            <text:p>14242173</text:p>
          </table:table-cell>
          <table:table-cell table:formula="of:=AVERAGE([.B287:.B335])" office:value-type="float" office:value="26.3479591836735" calcext:value-type="float">
            <text:p>26.3479591836735</text:p>
          </table:table-cell>
          <table:table-cell table:formula="of:=AVERAGE([.B237:.B335])" office:value-type="float" office:value="27.1816161616162" calcext:value-type="float">
            <text:p>27.1816161616162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25.8" calcext:value-type="float">
            <text:p>25.8</text:p>
          </table:table-cell>
          <table:table-cell office:value-type="float" office:value="14148829" calcext:value-type="float">
            <text:p>14148829</text:p>
          </table:table-cell>
          <table:table-cell table:formula="of:=AVERAGE([.B288:.B336])" office:value-type="float" office:value="26.3157142857143" calcext:value-type="float">
            <text:p>26.3157142857143</text:p>
          </table:table-cell>
          <table:table-cell table:formula="of:=AVERAGE([.B238:.B336])" office:value-type="float" office:value="27.1613131313131" calcext:value-type="float">
            <text:p>27.1613131313131</text:p>
          </table:table-cell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25.55" calcext:value-type="float">
            <text:p>25.55</text:p>
          </table:table-cell>
          <table:table-cell office:value-type="float" office:value="12092371" calcext:value-type="float">
            <text:p>12092371</text:p>
          </table:table-cell>
          <table:table-cell table:formula="of:=AVERAGE([.B289:.B337])" office:value-type="float" office:value="26.2716326530612" calcext:value-type="float">
            <text:p>26.2716326530612</text:p>
          </table:table-cell>
          <table:table-cell table:formula="of:=AVERAGE([.B239:.B337])" office:value-type="float" office:value="27.1383838383838" calcext:value-type="float">
            <text:p>27.1383838383838</text:p>
          </table:table-cell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25.64" calcext:value-type="float">
            <text:p>25.64</text:p>
          </table:table-cell>
          <table:table-cell office:value-type="float" office:value="12965527" calcext:value-type="float">
            <text:p>12965527</text:p>
          </table:table-cell>
          <table:table-cell table:formula="of:=AVERAGE([.B290:.B338])" office:value-type="float" office:value="26.2232653061225" calcext:value-type="float">
            <text:p>26.2232653061225</text:p>
          </table:table-cell>
          <table:table-cell table:formula="of:=AVERAGE([.B240:.B338])" office:value-type="float" office:value="27.1090909090909" calcext:value-type="float">
            <text:p>27.1090909090909</text:p>
          </table:table-cell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float" office:value="25.78" calcext:value-type="float">
            <text:p>25.78</text:p>
          </table:table-cell>
          <table:table-cell office:value-type="float" office:value="20045422" calcext:value-type="float">
            <text:p>20045422</text:p>
          </table:table-cell>
          <table:table-cell table:formula="of:=AVERAGE([.B291:.B339])" office:value-type="float" office:value="26.1744897959184" calcext:value-type="float">
            <text:p>26.1744897959184</text:p>
          </table:table-cell>
          <table:table-cell table:formula="of:=AVERAGE([.B241:.B339])" office:value-type="float" office:value="27.0845454545455" calcext:value-type="float">
            <text:p>27.0845454545455</text:p>
          </table:table-cell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25.73" calcext:value-type="float">
            <text:p>25.73</text:p>
          </table:table-cell>
          <table:table-cell office:value-type="float" office:value="14195230" calcext:value-type="float">
            <text:p>14195230</text:p>
          </table:table-cell>
          <table:table-cell table:formula="of:=AVERAGE([.B292:.B340])" office:value-type="float" office:value="26.1302040816327" calcext:value-type="float">
            <text:p>26.1302040816327</text:p>
          </table:table-cell>
          <table:table-cell table:formula="of:=AVERAGE([.B242:.B340])" office:value-type="float" office:value="27.0620202020202" calcext:value-type="float">
            <text:p>27.0620202020202</text:p>
          </table:table-cell>
        </table:table-row>
        <table:table-row table:style-name="ro1">
          <table:table-cell office:value-type="date" office:date-value="2025-05-10" calcext:value-type="date">
            <text:p>2025-05-10</text:p>
          </table:table-cell>
          <table:table-cell office:value-type="float" office:value="25.73" calcext:value-type="float">
            <text:p>25.73</text:p>
          </table:table-cell>
          <table:table-cell office:value-type="float" office:value="14195230" calcext:value-type="float">
            <text:p>14195230</text:p>
          </table:table-cell>
          <table:table-cell table:formula="of:=AVERAGE([.B293:.B341])" office:value-type="float" office:value="26.0887755102041" calcext:value-type="float">
            <text:p>26.0887755102041</text:p>
          </table:table-cell>
          <table:table-cell table:formula="of:=AVERAGE([.B243:.B341])" office:value-type="float" office:value="27.0392929292929" calcext:value-type="float">
            <text:p>27.0392929292929</text:p>
          </table:table-cell>
        </table:table-row>
        <table:table-row table:style-name="ro1">
          <table:table-cell office:value-type="date" office:date-value="2025-05-11" calcext:value-type="date">
            <text:p>2025-05-11</text:p>
          </table:table-cell>
          <table:table-cell office:value-type="float" office:value="25.73" calcext:value-type="float">
            <text:p>25.73</text:p>
          </table:table-cell>
          <table:table-cell office:value-type="float" office:value="14195230" calcext:value-type="float">
            <text:p>14195230</text:p>
          </table:table-cell>
          <table:table-cell table:formula="of:=AVERAGE([.B294:.B342])" office:value-type="float" office:value="26.0473469387755" calcext:value-type="float">
            <text:p>26.0473469387755</text:p>
          </table:table-cell>
          <table:table-cell table:formula="of:=AVERAGE([.B244:.B342])" office:value-type="float" office:value="27.0180808080808" calcext:value-type="float">
            <text:p>27.018080808080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26.43" calcext:value-type="float">
            <text:p>26.43</text:p>
          </table:table-cell>
          <table:table-cell office:value-type="float" office:value="18699915" calcext:value-type="float">
            <text:p>18699915</text:p>
          </table:table-cell>
          <table:table-cell table:formula="of:=AVERAGE([.B295:.B343])" office:value-type="float" office:value="26.0059183673469" calcext:value-type="float">
            <text:p>26.0059183673469</text:p>
          </table:table-cell>
          <table:table-cell table:formula="of:=AVERAGE([.B245:.B343])" office:value-type="float" office:value="26.9968686868687" calcext:value-type="float">
            <text:p>26.9968686868687</text:p>
          </table:table-cell>
        </table:table-row>
        <table:table-row table:style-name="ro1">
          <table:table-cell office:value-type="date" office:date-value="2025-05-13" calcext:value-type="date">
            <text:p>2025-05-13</text:p>
          </table:table-cell>
          <table:table-cell office:value-type="float" office:value="26.31" calcext:value-type="float">
            <text:p>26.31</text:p>
          </table:table-cell>
          <table:table-cell office:value-type="float" office:value="17389712" calcext:value-type="float">
            <text:p>17389712</text:p>
          </table:table-cell>
          <table:table-cell table:formula="of:=AVERAGE([.B296:.B344])" office:value-type="float" office:value="25.9720408163265" calcext:value-type="float">
            <text:p>25.9720408163265</text:p>
          </table:table-cell>
          <table:table-cell table:formula="of:=AVERAGE([.B246:.B344])" office:value-type="float" office:value="26.9827272727273" calcext:value-type="float">
            <text:p>26.9827272727273</text:p>
          </table:table-cell>
        </table:table-row>
        <table:table-row table:style-name="ro1">
          <table:table-cell office:value-type="date" office:date-value="2025-05-14" calcext:value-type="date">
            <text:p>2025-05-14</text:p>
          </table:table-cell>
          <table:table-cell office:value-type="float" office:value="26" calcext:value-type="float">
            <text:p>26</text:p>
          </table:table-cell>
          <table:table-cell office:value-type="float" office:value="17297228" calcext:value-type="float">
            <text:p>17297228</text:p>
          </table:table-cell>
          <table:table-cell table:formula="of:=AVERAGE([.B297:.B345])" office:value-type="float" office:value="25.9408163265306" calcext:value-type="float">
            <text:p>25.9408163265306</text:p>
          </table:table-cell>
          <table:table-cell table:formula="of:=AVERAGE([.B247:.B345])" office:value-type="float" office:value="26.9684848484849" calcext:value-type="float">
            <text:p>26.9684848484849</text:p>
          </table:table-cell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26.42" calcext:value-type="float">
            <text:p>26.42</text:p>
          </table:table-cell>
          <table:table-cell office:value-type="float" office:value="14411966" calcext:value-type="float">
            <text:p>14411966</text:p>
          </table:table-cell>
          <table:table-cell table:formula="of:=AVERAGE([.B298:.B346])" office:value-type="float" office:value="25.9040816326531" calcext:value-type="float">
            <text:p>25.9040816326531</text:p>
          </table:table-cell>
          <table:table-cell table:formula="of:=AVERAGE([.B248:.B346])" office:value-type="float" office:value="26.9507070707071" calcext:value-type="float">
            <text:p>26.9507070707071</text:p>
          </table:table-cell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26.6" calcext:value-type="float">
            <text:p>26.6</text:p>
          </table:table-cell>
          <table:table-cell office:value-type="float" office:value="11779613" calcext:value-type="float">
            <text:p>11779613</text:p>
          </table:table-cell>
          <table:table-cell table:formula="of:=AVERAGE([.B299:.B347])" office:value-type="float" office:value="25.8769387755102" calcext:value-type="float">
            <text:p>25.8769387755102</text:p>
          </table:table-cell>
          <table:table-cell table:formula="of:=AVERAGE([.B249:.B347])" office:value-type="float" office:value="26.9352525252525" calcext:value-type="float">
            <text:p>26.9352525252525</text:p>
          </table:table-cell>
        </table:table-row>
        <table:table-row table:style-name="ro1">
          <table:table-cell office:value-type="date" office:date-value="2025-05-17" calcext:value-type="date">
            <text:p>2025-05-17</text:p>
          </table:table-cell>
          <table:table-cell office:value-type="float" office:value="26.6" calcext:value-type="float">
            <text:p>26.6</text:p>
          </table:table-cell>
          <table:table-cell office:value-type="float" office:value="11779613" calcext:value-type="float">
            <text:p>11779613</text:p>
          </table:table-cell>
          <table:table-cell table:formula="of:=AVERAGE([.B300:.B348])" office:value-type="float" office:value="25.8569387755102" calcext:value-type="float">
            <text:p>25.8569387755102</text:p>
          </table:table-cell>
          <table:table-cell table:formula="of:=AVERAGE([.B250:.B348])" office:value-type="float" office:value="26.9236363636364" calcext:value-type="float">
            <text:p>26.9236363636364</text:p>
          </table:table-cell>
        </table:table-row>
        <table:table-row table:style-name="ro1">
          <table:table-cell office:value-type="date" office:date-value="2025-05-18" calcext:value-type="date">
            <text:p>2025-05-18</text:p>
          </table:table-cell>
          <table:table-cell office:value-type="float" office:value="26.6" calcext:value-type="float">
            <text:p>26.6</text:p>
          </table:table-cell>
          <table:table-cell office:value-type="float" office:value="11779613" calcext:value-type="float">
            <text:p>11779613</text:p>
          </table:table-cell>
          <table:table-cell table:formula="of:=AVERAGE([.B301:.B349])" office:value-type="float" office:value="25.8369387755102" calcext:value-type="float">
            <text:p>25.8369387755102</text:p>
          </table:table-cell>
          <table:table-cell table:formula="of:=AVERAGE([.B251:.B349])" office:value-type="float" office:value="26.9139393939394" calcext:value-type="float">
            <text:p>26.9139393939394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26.58" calcext:value-type="float">
            <text:p>26.58</text:p>
          </table:table-cell>
          <table:table-cell office:value-type="float" office:value="15067072" calcext:value-type="float">
            <text:p>15067072</text:p>
          </table:table-cell>
          <table:table-cell table:formula="of:=AVERAGE([.B302:.B350])" office:value-type="float" office:value="25.8169387755102" calcext:value-type="float">
            <text:p>25.8169387755102</text:p>
          </table:table-cell>
          <table:table-cell table:formula="of:=AVERAGE([.B252:.B350])" office:value-type="float" office:value="26.9042424242424" calcext:value-type="float">
            <text:p>26.9042424242424</text:p>
          </table:table-cell>
        </table:table-row>
        <table:table-row table:style-name="ro1">
          <table:table-cell office:value-type="date" office:date-value="2025-05-20" calcext:value-type="date">
            <text:p>2025-05-20</text:p>
          </table:table-cell>
          <table:table-cell office:value-type="float" office:value="26.48" calcext:value-type="float">
            <text:p>26.48</text:p>
          </table:table-cell>
          <table:table-cell office:value-type="float" office:value="12280793" calcext:value-type="float">
            <text:p>12280793</text:p>
          </table:table-cell>
          <table:table-cell table:formula="of:=AVERAGE([.B303:.B351])" office:value-type="float" office:value="25.7887755102041" calcext:value-type="float">
            <text:p>25.7887755102041</text:p>
          </table:table-cell>
          <table:table-cell table:formula="of:=AVERAGE([.B253:.B351])" office:value-type="float" office:value="26.8943434343434" calcext:value-type="float">
            <text:p>26.8943434343434</text:p>
          </table:table-cell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26.01" calcext:value-type="float">
            <text:p>26.01</text:p>
          </table:table-cell>
          <table:table-cell office:value-type="float" office:value="15842379" calcext:value-type="float">
            <text:p>15842379</text:p>
          </table:table-cell>
          <table:table-cell table:formula="of:=AVERAGE([.B304:.B352])" office:value-type="float" office:value="25.7604081632653" calcext:value-type="float">
            <text:p>25.7604081632653</text:p>
          </table:table-cell>
          <table:table-cell table:formula="of:=AVERAGE([.B254:.B352])" office:value-type="float" office:value="26.8822222222222" calcext:value-type="float">
            <text:p>26.8822222222222</text:p>
          </table:table-cell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25.96" calcext:value-type="float">
            <text:p>25.96</text:p>
          </table:table-cell>
          <table:table-cell office:value-type="float" office:value="16081280" calcext:value-type="float">
            <text:p>16081280</text:p>
          </table:table-cell>
          <table:table-cell table:formula="of:=AVERAGE([.B305:.B353])" office:value-type="float" office:value="25.7224489795918" calcext:value-type="float">
            <text:p>25.7224489795918</text:p>
          </table:table-cell>
          <table:table-cell table:formula="of:=AVERAGE([.B255:.B353])" office:value-type="float" office:value="26.8634343434343" calcext:value-type="float">
            <text:p>26.8634343434343</text:p>
          </table:table-cell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25.89" calcext:value-type="float">
            <text:p>25.89</text:p>
          </table:table-cell>
          <table:table-cell office:value-type="float" office:value="16065707" calcext:value-type="float">
            <text:p>16065707</text:p>
          </table:table-cell>
          <table:table-cell table:formula="of:=AVERAGE([.B306:.B354])" office:value-type="float" office:value="25.7067346938776" calcext:value-type="float">
            <text:p>25.7067346938776</text:p>
          </table:table-cell>
          <table:table-cell table:formula="of:=AVERAGE([.B256:.B354])" office:value-type="float" office:value="26.8463636363636" calcext:value-type="float">
            <text:p>26.8463636363636</text:p>
          </table:table-cell>
        </table:table-row>
        <table:table-row table:style-name="ro1">
          <table:table-cell office:value-type="date" office:date-value="2025-05-24" calcext:value-type="date">
            <text:p>2025-05-24</text:p>
          </table:table-cell>
          <table:table-cell office:value-type="float" office:value="25.89" calcext:value-type="float">
            <text:p>25.89</text:p>
          </table:table-cell>
          <table:table-cell office:value-type="float" office:value="16065707" calcext:value-type="float">
            <text:p>16065707</text:p>
          </table:table-cell>
          <table:table-cell table:formula="of:=AVERAGE([.B307:.B355])" office:value-type="float" office:value="25.7191836734694" calcext:value-type="float">
            <text:p>25.7191836734694</text:p>
          </table:table-cell>
          <table:table-cell table:formula="of:=AVERAGE([.B257:.B355])" office:value-type="float" office:value="26.8265656565657" calcext:value-type="float">
            <text:p>26.8265656565657</text:p>
          </table:table-cell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float" office:value="25.89" calcext:value-type="float">
            <text:p>25.89</text:p>
          </table:table-cell>
          <table:table-cell office:value-type="float" office:value="16065707" calcext:value-type="float">
            <text:p>16065707</text:p>
          </table:table-cell>
          <table:table-cell table:formula="of:=AVERAGE([.B308:.B356])" office:value-type="float" office:value="25.7316326530612" calcext:value-type="float">
            <text:p>25.7316326530612</text:p>
          </table:table-cell>
          <table:table-cell table:formula="of:=AVERAGE([.B258:.B356])" office:value-type="float" office:value="26.8073737373737" calcext:value-type="float">
            <text:p>26.8073737373737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25.89" calcext:value-type="float">
            <text:p>25.89</text:p>
          </table:table-cell>
          <table:table-cell office:value-type="float" office:value="16065707" calcext:value-type="float">
            <text:p>16065707</text:p>
          </table:table-cell>
          <table:table-cell table:formula="of:=AVERAGE([.B309:.B357])" office:value-type="float" office:value="25.7440816326531" calcext:value-type="float">
            <text:p>25.7440816326531</text:p>
          </table:table-cell>
          <table:table-cell table:formula="of:=AVERAGE([.B259:.B357])" office:value-type="float" office:value="26.7881818181818" calcext:value-type="float">
            <text:p>26.7881818181818</text:p>
          </table:table-cell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26.27" calcext:value-type="float">
            <text:p>26.27</text:p>
          </table:table-cell>
          <table:table-cell office:value-type="float" office:value="15919524" calcext:value-type="float">
            <text:p>15919524</text:p>
          </table:table-cell>
          <table:table-cell table:formula="of:=AVERAGE([.B310:.B358])" office:value-type="float" office:value="25.7634693877551" calcext:value-type="float">
            <text:p>25.7634693877551</text:p>
          </table:table-cell>
          <table:table-cell table:formula="of:=AVERAGE([.B260:.B358])" office:value-type="float" office:value="26.7689898989899" calcext:value-type="float">
            <text:p>26.7689898989899</text:p>
          </table:table-cell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26.04" calcext:value-type="float">
            <text:p>26.04</text:p>
          </table:table-cell>
          <table:table-cell office:value-type="float" office:value="13190598" calcext:value-type="float">
            <text:p>13190598</text:p>
          </table:table-cell>
          <table:table-cell table:formula="of:=AVERAGE([.B311:.B359])" office:value-type="float" office:value="25.8032653061225" calcext:value-type="float">
            <text:p>25.8032653061225</text:p>
          </table:table-cell>
          <table:table-cell table:formula="of:=AVERAGE([.B261:.B359])" office:value-type="float" office:value="26.7536363636364" calcext:value-type="float">
            <text:p>26.7536363636364</text:p>
          </table:table-cell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26.19" calcext:value-type="float">
            <text:p>26.19</text:p>
          </table:table-cell>
          <table:table-cell office:value-type="float" office:value="13897207" calcext:value-type="float">
            <text:p>13897207</text:p>
          </table:table-cell>
          <table:table-cell table:formula="of:=AVERAGE([.B312:.B360])" office:value-type="float" office:value="25.8067346938776" calcext:value-type="float">
            <text:p>25.8067346938776</text:p>
          </table:table-cell>
          <table:table-cell table:formula="of:=AVERAGE([.B262:.B360])" office:value-type="float" office:value="26.7339393939394" calcext:value-type="float">
            <text:p>26.7339393939394</text:p>
          </table:table-cell>
        </table:table-row>
        <table:table-row table:style-name="ro1">
          <table:table-cell office:value-type="date" office:date-value="2025-05-30" calcext:value-type="date">
            <text:p>2025-05-30</text:p>
          </table:table-cell>
          <table:table-cell office:value-type="float" office:value="26.17" calcext:value-type="float">
            <text:p>26.17</text:p>
          </table:table-cell>
          <table:table-cell office:value-type="float" office:value="14779897" calcext:value-type="float">
            <text:p>14779897</text:p>
          </table:table-cell>
          <table:table-cell table:formula="of:=AVERAGE([.B313:.B361])" office:value-type="float" office:value="25.8316326530612" calcext:value-type="float">
            <text:p>25.8316326530612</text:p>
          </table:table-cell>
          <table:table-cell table:formula="of:=AVERAGE([.B263:.B361])" office:value-type="float" office:value="26.7138383838384" calcext:value-type="float">
            <text:p>26.7138383838384</text:p>
          </table:table-cell>
        </table:table-row>
        <table:table-row table:style-name="ro1">
          <table:table-cell office:value-type="date" office:date-value="2025-05-31" calcext:value-type="date">
            <text:p>2025-05-31</text:p>
          </table:table-cell>
          <table:table-cell office:value-type="float" office:value="26.17" calcext:value-type="float">
            <text:p>26.17</text:p>
          </table:table-cell>
          <table:table-cell office:value-type="float" office:value="14779897" calcext:value-type="float">
            <text:p>14779897</text:p>
          </table:table-cell>
          <table:table-cell table:formula="of:=AVERAGE([.B314:.B362])" office:value-type="float" office:value="25.849387755102" calcext:value-type="float">
            <text:p>25.849387755102</text:p>
          </table:table-cell>
          <table:table-cell table:formula="of:=AVERAGE([.B264:.B362])" office:value-type="float" office:value="26.6921212121212" calcext:value-type="float">
            <text:p>26.6921212121212</text:p>
          </table:table-cell>
        </table:table-row>
        <table:table-row table:style-name="ro1">
          <table:table-cell office:value-type="date" office:date-value="2025-06-01" calcext:value-type="date">
            <text:p>2025-06-01</text:p>
          </table:table-cell>
          <table:table-cell office:value-type="float" office:value="26.17" calcext:value-type="float">
            <text:p>26.17</text:p>
          </table:table-cell>
          <table:table-cell office:value-type="float" office:value="14779897" calcext:value-type="float">
            <text:p>14779897</text:p>
          </table:table-cell>
          <table:table-cell table:formula="of:=AVERAGE([.B315:.B363])" office:value-type="float" office:value="25.8671428571429" calcext:value-type="float">
            <text:p>25.8671428571429</text:p>
          </table:table-cell>
          <table:table-cell table:formula="of:=AVERAGE([.B265:.B363])" office:value-type="float" office:value="26.6715151515152" calcext:value-type="float">
            <text:p>26.6715151515152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26.25" calcext:value-type="float">
            <text:p>26.25</text:p>
          </table:table-cell>
          <table:table-cell office:value-type="float" office:value="20610268" calcext:value-type="float">
            <text:p>20610268</text:p>
          </table:table-cell>
          <table:table-cell table:formula="of:=AVERAGE([.B316:.B364])" office:value-type="float" office:value="25.8848979591837" calcext:value-type="float">
            <text:p>25.8848979591837</text:p>
          </table:table-cell>
          <table:table-cell table:formula="of:=AVERAGE([.B266:.B364])" office:value-type="float" office:value="26.6509090909091" calcext:value-type="float">
            <text:p>26.6509090909091</text:p>
          </table:table-cell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26.44" calcext:value-type="float">
            <text:p>26.44</text:p>
          </table:table-cell>
          <table:table-cell office:value-type="float" office:value="12717005" calcext:value-type="float">
            <text:p>12717005</text:p>
          </table:table-cell>
          <table:table-cell table:formula="of:=AVERAGE([.B317:.B365])" office:value-type="float" office:value="25.8981632653061" calcext:value-type="float">
            <text:p>25.8981632653061</text:p>
          </table:table-cell>
          <table:table-cell table:formula="of:=AVERAGE([.B267:.B365])" office:value-type="float" office:value="26.6311111111111" calcext:value-type="float">
            <text:p>26.6311111111111</text:p>
          </table:table-cell>
        </table:table-row>
        <table:table-row table:style-name="ro1">
          <table:table-cell office:value-type="date" office:date-value="2025-06-04" calcext:value-type="date">
            <text:p>2025-06-04</text:p>
          </table:table-cell>
          <table:table-cell office:value-type="float" office:value="26.29" calcext:value-type="float">
            <text:p>26.29</text:p>
          </table:table-cell>
          <table:table-cell office:value-type="float" office:value="11733376" calcext:value-type="float">
            <text:p>11733376</text:p>
          </table:table-cell>
          <table:table-cell table:formula="of:=AVERAGE([.B318:.B366])" office:value-type="float" office:value="25.9187755102041" calcext:value-type="float">
            <text:p>25.9187755102041</text:p>
          </table:table-cell>
          <table:table-cell table:formula="of:=AVERAGE([.B268:.B366])" office:value-type="float" office:value="26.6127272727273" calcext:value-type="float">
            <text:p>26.6127272727273</text:p>
          </table:table-cell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26.23" calcext:value-type="float">
            <text:p>26.23</text:p>
          </table:table-cell>
          <table:table-cell office:value-type="float" office:value="18942060" calcext:value-type="float">
            <text:p>18942060</text:p>
          </table:table-cell>
          <table:table-cell table:formula="of:=AVERAGE([.B319:.B367])" office:value-type="float" office:value="25.9424489795918" calcext:value-type="float">
            <text:p>25.9424489795918</text:p>
          </table:table-cell>
          <table:table-cell table:formula="of:=AVERAGE([.B269:.B367])" office:value-type="float" office:value="26.5909090909091" calcext:value-type="float">
            <text:p>26.5909090909091</text:p>
          </table:table-cell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26.54" calcext:value-type="float">
            <text:p>26.54</text:p>
          </table:table-cell>
          <table:table-cell office:value-type="float" office:value="10658887" calcext:value-type="float">
            <text:p>10658887</text:p>
          </table:table-cell>
          <table:table-cell table:formula="of:=AVERAGE([.B320:.B368])" office:value-type="float" office:value="25.9589795918367" calcext:value-type="float">
            <text:p>25.9589795918367</text:p>
          </table:table-cell>
          <table:table-cell table:formula="of:=AVERAGE([.B270:.B368])" office:value-type="float" office:value="26.5715151515152" calcext:value-type="float">
            <text:p>26.5715151515152</text:p>
          </table:table-cell>
        </table:table-row>
        <table:table-row table:style-name="ro1">
          <table:table-cell office:value-type="date" office:date-value="2025-06-07" calcext:value-type="date">
            <text:p>2025-06-07</text:p>
          </table:table-cell>
          <table:table-cell office:value-type="float" office:value="26.54" calcext:value-type="float">
            <text:p>26.54</text:p>
          </table:table-cell>
          <table:table-cell office:value-type="float" office:value="10658887" calcext:value-type="float">
            <text:p>10658887</text:p>
          </table:table-cell>
          <table:table-cell table:formula="of:=AVERAGE([.B321:.B369])" office:value-type="float" office:value="25.9818367346939" calcext:value-type="float">
            <text:p>25.9818367346939</text:p>
          </table:table-cell>
          <table:table-cell table:formula="of:=AVERAGE([.B271:.B369])" office:value-type="float" office:value="26.5550505050505" calcext:value-type="float">
            <text:p>26.5550505050505</text:p>
          </table:table-cell>
        </table:table-row>
        <table:table-row table:style-name="ro1">
          <table:table-cell office:value-type="date" office:date-value="2025-06-08" calcext:value-type="date">
            <text:p>2025-06-08</text:p>
          </table:table-cell>
          <table:table-cell office:value-type="float" office:value="26.54" calcext:value-type="float">
            <text:p>26.54</text:p>
          </table:table-cell>
          <table:table-cell office:value-type="float" office:value="10658887" calcext:value-type="float">
            <text:p>10658887</text:p>
          </table:table-cell>
          <table:table-cell table:formula="of:=AVERAGE([.B322:.B370])" office:value-type="float" office:value="26.004693877551" calcext:value-type="float">
            <text:p>26.004693877551</text:p>
          </table:table-cell>
          <table:table-cell table:formula="of:=AVERAGE([.B272:.B370])" office:value-type="float" office:value="26.5348484848485" calcext:value-type="float">
            <text:p>26.5348484848485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26.65" calcext:value-type="float">
            <text:p>26.65</text:p>
          </table:table-cell>
          <table:table-cell office:value-type="float" office:value="13743043" calcext:value-type="float">
            <text:p>13743043</text:p>
          </table:table-cell>
          <table:table-cell table:formula="of:=AVERAGE([.B323:.B371])" office:value-type="float" office:value="26.0275510204082" calcext:value-type="float">
            <text:p>26.0275510204082</text:p>
          </table:table-cell>
          <table:table-cell table:formula="of:=AVERAGE([.B273:.B371])" office:value-type="float" office:value="26.5146464646465" calcext:value-type="float">
            <text:p>26.5146464646465</text:p>
          </table:table-cell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26.95" calcext:value-type="float">
            <text:p>26.95</text:p>
          </table:table-cell>
          <table:table-cell office:value-type="float" office:value="12688148" calcext:value-type="float">
            <text:p>12688148</text:p>
          </table:table-cell>
          <table:table-cell table:formula="of:=AVERAGE([.B324:.B372])" office:value-type="float" office:value="26.060612244898" calcext:value-type="float">
            <text:p>26.060612244898</text:p>
          </table:table-cell>
          <table:table-cell table:formula="of:=AVERAGE([.B274:.B372])" office:value-type="float" office:value="26.4955555555556" calcext:value-type="float">
            <text:p>26.4955555555556</text:p>
          </table:table-cell>
        </table:table-row>
        <table:table-row table:style-name="ro1">
          <table:table-cell office:value-type="date" office:date-value="2025-06-11" calcext:value-type="date">
            <text:p>2025-06-11</text:p>
          </table:table-cell>
          <table:table-cell office:value-type="float" office:value="26.86" calcext:value-type="float">
            <text:p>26.86</text:p>
          </table:table-cell>
          <table:table-cell office:value-type="float" office:value="13813014" calcext:value-type="float">
            <text:p>13813014</text:p>
          </table:table-cell>
          <table:table-cell table:formula="of:=AVERAGE([.B325:.B373])" office:value-type="float" office:value="26.0914285714286" calcext:value-type="float">
            <text:p>26.0914285714286</text:p>
          </table:table-cell>
          <table:table-cell table:formula="of:=AVERAGE([.B275:.B373])" office:value-type="float" office:value="26.4809090909091" calcext:value-type="float">
            <text:p>26.4809090909091</text:p>
          </table:table-cell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27.02" calcext:value-type="float">
            <text:p>27.02</text:p>
          </table:table-cell>
          <table:table-cell office:value-type="float" office:value="10552308" calcext:value-type="float">
            <text:p>10552308</text:p>
          </table:table-cell>
          <table:table-cell table:formula="of:=AVERAGE([.B326:.B374])" office:value-type="float" office:value="26.1208163265306" calcext:value-type="float">
            <text:p>26.1208163265306</text:p>
          </table:table-cell>
          <table:table-cell table:formula="of:=AVERAGE([.B276:.B374])" office:value-type="float" office:value="26.470202020202" calcext:value-type="float">
            <text:p>26.470202020202</text:p>
          </table:table-cell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26.9" calcext:value-type="float">
            <text:p>26.9</text:p>
          </table:table-cell>
          <table:table-cell office:value-type="float" office:value="21328350" calcext:value-type="float">
            <text:p>21328350</text:p>
          </table:table-cell>
          <table:table-cell table:formula="of:=AVERAGE([.B327:.B375])" office:value-type="float" office:value="26.1475510204082" calcext:value-type="float">
            <text:p>26.1475510204082</text:p>
          </table:table-cell>
          <table:table-cell table:formula="of:=AVERAGE([.B277:.B375])" office:value-type="float" office:value="26.459797979798" calcext:value-type="float">
            <text:p>26.459797979798</text:p>
          </table:table-cell>
        </table:table-row>
        <table:table-row table:style-name="ro1">
          <table:table-cell office:value-type="date" office:date-value="2025-06-14" calcext:value-type="date">
            <text:p>2025-06-14</text:p>
          </table:table-cell>
          <table:table-cell office:value-type="float" office:value="26.9" calcext:value-type="float">
            <text:p>26.9</text:p>
          </table:table-cell>
          <table:table-cell office:value-type="float" office:value="21328350" calcext:value-type="float">
            <text:p>21328350</text:p>
          </table:table-cell>
          <table:table-cell table:formula="of:=AVERAGE([.B328:.B376])" office:value-type="float" office:value="26.1726530612245" calcext:value-type="float">
            <text:p>26.1726530612245</text:p>
          </table:table-cell>
          <table:table-cell table:formula="of:=AVERAGE([.B278:.B376])" office:value-type="float" office:value="26.4479797979798" calcext:value-type="float">
            <text:p>26.4479797979798</text:p>
          </table:table-cell>
        </table:table-row>
        <table:table-row table:style-name="ro1">
          <table:table-cell office:value-type="date" office:date-value="2025-06-15" calcext:value-type="date">
            <text:p>2025-06-15</text:p>
          </table:table-cell>
          <table:table-cell office:value-type="float" office:value="26.9" calcext:value-type="float">
            <text:p>26.9</text:p>
          </table:table-cell>
          <table:table-cell office:value-type="float" office:value="21328350" calcext:value-type="float">
            <text:p>21328350</text:p>
          </table:table-cell>
          <table:table-cell table:formula="of:=AVERAGE([.B329:.B377])" office:value-type="float" office:value="26.1977551020408" calcext:value-type="float">
            <text:p>26.1977551020408</text:p>
          </table:table-cell>
          <table:table-cell table:formula="of:=AVERAGE([.B279:.B377])" office:value-type="float" office:value="26.4322222222222" calcext:value-type="float">
            <text:p>26.4322222222222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26.92" calcext:value-type="float">
            <text:p>26.92</text:p>
          </table:table-cell>
          <table:table-cell office:value-type="float" office:value="13918226" calcext:value-type="float">
            <text:p>13918226</text:p>
          </table:table-cell>
          <table:table-cell table:formula="of:=AVERAGE([.B330:.B378])" office:value-type="float" office:value="26.2228571428571" calcext:value-type="float">
            <text:p>26.2228571428571</text:p>
          </table:table-cell>
          <table:table-cell table:formula="of:=AVERAGE([.B280:.B378])" office:value-type="float" office:value="26.4164646464646" calcext:value-type="float">
            <text:p>26.4164646464646</text:p>
          </table:table-cell>
        </table:table-row>
        <table:table-row table:style-name="ro1">
          <table:table-cell office:value-type="date" office:date-value="2025-06-17" calcext:value-type="date">
            <text:p>2025-06-17</text:p>
          </table:table-cell>
          <table:table-cell office:value-type="float" office:value="26.72" calcext:value-type="float">
            <text:p>26.72</text:p>
          </table:table-cell>
          <table:table-cell office:value-type="float" office:value="12383746" calcext:value-type="float">
            <text:p>12383746</text:p>
          </table:table-cell>
          <table:table-cell table:formula="of:=AVERAGE([.B331:.B379])" office:value-type="float" office:value="26.2459183673469" calcext:value-type="float">
            <text:p>26.2459183673469</text:p>
          </table:table-cell>
          <table:table-cell table:formula="of:=AVERAGE([.B281:.B379])" office:value-type="float" office:value="26.4009090909091" calcext:value-type="float">
            <text:p>26.4009090909091</text:p>
          </table:table-cell>
        </table:table-row>
        <table:table-row table:style-name="ro1">
          <table:table-cell office:value-type="date" office:date-value="2025-06-18" calcext:value-type="date">
            <text:p>2025-06-18</text:p>
          </table:table-cell>
          <table:table-cell office:value-type="float" office:value="26.64" calcext:value-type="float">
            <text:p>26.64</text:p>
          </table:table-cell>
          <table:table-cell office:value-type="float" office:value="13837384" calcext:value-type="float">
            <text:p>13837384</text:p>
          </table:table-cell>
          <table:table-cell table:formula="of:=AVERAGE([.B332:.B380])" office:value-type="float" office:value="26.2628571428571" calcext:value-type="float">
            <text:p>26.2628571428571</text:p>
          </table:table-cell>
          <table:table-cell table:formula="of:=AVERAGE([.B282:.B380])" office:value-type="float" office:value="26.3841414141414" calcext:value-type="float">
            <text:p>26.3841414141414</text:p>
          </table:table-cell>
        </table:table-row>
        <table:table-row table:style-name="ro1">
          <table:table-cell office:value-type="date" office:date-value="2025-06-19" calcext:value-type="date">
            <text:p>2025-06-19</text:p>
          </table:table-cell>
          <table:table-cell office:value-type="float" office:value="26.64" calcext:value-type="float">
            <text:p>26.64</text:p>
          </table:table-cell>
          <table:table-cell office:value-type="float" office:value="13837384" calcext:value-type="float">
            <text:p>13837384</text:p>
          </table:table-cell>
          <table:table-cell table:formula="of:=AVERAGE([.B333:.B381])" office:value-type="float" office:value="26.2795918367347" calcext:value-type="float">
            <text:p>26.2795918367347</text:p>
          </table:table-cell>
          <table:table-cell table:formula="of:=AVERAGE([.B283:.B381])" office:value-type="float" office:value="26.3730303030303" calcext:value-type="float">
            <text:p>26.3730303030303</text:p>
          </table:table-cell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float" office:value="26.7" calcext:value-type="float">
            <text:p>26.7</text:p>
          </table:table-cell>
          <table:table-cell office:value-type="float" office:value="14262291" calcext:value-type="float">
            <text:p>14262291</text:p>
          </table:table-cell>
          <table:table-cell table:formula="of:=AVERAGE([.B334:.B382])" office:value-type="float" office:value="26.2985714285714" calcext:value-type="float">
            <text:p>26.2985714285714</text:p>
          </table:table-cell>
          <table:table-cell table:formula="of:=AVERAGE([.B284:.B382])" office:value-type="float" office:value="26.3649494949495" calcext:value-type="float">
            <text:p>26.3649494949495</text:p>
          </table:table-cell>
        </table:table-row>
        <table:table-row table:style-name="ro1">
          <table:table-cell office:value-type="date" office:date-value="2025-06-21" calcext:value-type="date">
            <text:p>2025-06-21</text:p>
          </table:table-cell>
          <table:table-cell office:value-type="float" office:value="26.7" calcext:value-type="float">
            <text:p>26.7</text:p>
          </table:table-cell>
          <table:table-cell office:value-type="float" office:value="14262291" calcext:value-type="float">
            <text:p>14262291</text:p>
          </table:table-cell>
          <table:table-cell table:formula="of:=AVERAGE([.B335:.B383])" office:value-type="float" office:value="26.3116326530612" calcext:value-type="float">
            <text:p>26.3116326530612</text:p>
          </table:table-cell>
          <table:table-cell table:formula="of:=AVERAGE([.B285:.B383])" office:value-type="float" office:value="26.3589898989899" calcext:value-type="float">
            <text:p>26.3589898989899</text:p>
          </table:table-cell>
        </table:table-row>
        <table:table-row table:style-name="ro1">
          <table:table-cell office:value-type="date" office:date-value="2025-06-22" calcext:value-type="date">
            <text:p>2025-06-22</text:p>
          </table:table-cell>
          <table:table-cell office:value-type="float" office:value="26.7" calcext:value-type="float">
            <text:p>26.7</text:p>
          </table:table-cell>
          <table:table-cell office:value-type="float" office:value="14262291" calcext:value-type="float">
            <text:p>14262291</text:p>
          </table:table-cell>
          <table:table-cell table:formula="of:=AVERAGE([.B336:.B384])" office:value-type="float" office:value="26.324693877551" calcext:value-type="float">
            <text:p>26.324693877551</text:p>
          </table:table-cell>
          <table:table-cell table:formula="of:=AVERAGE([.B286:.B384])" office:value-type="float" office:value="26.349494949495" calcext:value-type="float">
            <text:p>26.349494949495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26.7" calcext:value-type="float">
            <text:p>26.7</text:p>
          </table:table-cell>
          <table:table-cell office:value-type="float" office:value="18943815" calcext:value-type="float">
            <text:p>18943815</text:p>
          </table:table-cell>
          <table:table-cell table:formula="of:=AVERAGE([.B337:.B385])" office:value-type="float" office:value="26.3377551020408" calcext:value-type="float">
            <text:p>26.3377551020408</text:p>
          </table:table-cell>
          <table:table-cell table:formula="of:=AVERAGE([.B287:.B385])" office:value-type="float" office:value="26.34" calcext:value-type="float">
            <text:p>26.34</text:p>
          </table:table-cell>
        </table:table-row>
        <table:table-row table:style-name="ro1">
          <table:table-cell office:value-type="date" office:date-value="2025-06-24" calcext:value-type="date">
            <text:p>2025-06-24</text:p>
          </table:table-cell>
          <table:table-cell office:value-type="float" office:value="26.74" calcext:value-type="float">
            <text:p>26.74</text:p>
          </table:table-cell>
          <table:table-cell office:value-type="float" office:value="19845107" calcext:value-type="float">
            <text:p>19845107</text:p>
          </table:table-cell>
          <table:table-cell table:formula="of:=AVERAGE([.B338:.B386])" office:value-type="float" office:value="26.3561224489796" calcext:value-type="float">
            <text:p>26.3561224489796</text:p>
          </table:table-cell>
          <table:table-cell table:formula="of:=AVERAGE([.B288:.B386])" office:value-type="float" office:value="26.3305050505051" calcext:value-type="float">
            <text:p>26.3305050505051</text:p>
          </table:table-cell>
        </table:table-row>
        <table:table-row table:style-name="ro1">
          <table:table-cell office:value-type="date" office:date-value="2025-06-25" calcext:value-type="date">
            <text:p>2025-06-25</text:p>
          </table:table-cell>
          <table:table-cell office:value-type="float" office:value="26.2" calcext:value-type="float">
            <text:p>26.2</text:p>
          </table:table-cell>
          <table:table-cell office:value-type="float" office:value="20744073" calcext:value-type="float">
            <text:p>20744073</text:p>
          </table:table-cell>
          <table:table-cell table:formula="of:=AVERAGE([.B339:.B387])" office:value-type="float" office:value="26.3804081632653" calcext:value-type="float">
            <text:p>26.3804081632653</text:p>
          </table:table-cell>
          <table:table-cell table:formula="of:=AVERAGE([.B289:.B387])" office:value-type="float" office:value="26.3181818181818" calcext:value-type="float">
            <text:p>26.3181818181818</text:p>
          </table:table-cell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26.39" calcext:value-type="float">
            <text:p>26.39</text:p>
          </table:table-cell>
          <table:table-cell office:value-type="float" office:value="17013554" calcext:value-type="float">
            <text:p>17013554</text:p>
          </table:table-cell>
          <table:table-cell table:formula="of:=AVERAGE([.B340:.B388])" office:value-type="float" office:value="26.3918367346939" calcext:value-type="float">
            <text:p>26.3918367346939</text:p>
          </table:table-cell>
          <table:table-cell table:formula="of:=AVERAGE([.B290:.B388])" office:value-type="float" office:value="26.3008080808081" calcext:value-type="float">
            <text:p>26.3008080808081</text:p>
          </table:table-cell>
        </table:table-row>
        <table:table-row table:style-name="ro1">
          <table:table-cell office:value-type="date" office:date-value="2025-06-27" calcext:value-type="date">
            <text:p>2025-06-27</text:p>
          </table:table-cell>
          <table:table-cell office:value-type="float" office:value="26.39" calcext:value-type="float">
            <text:p>26.39</text:p>
          </table:table-cell>
          <table:table-cell office:value-type="float" office:value="20889891" calcext:value-type="float">
            <text:p>20889891</text:p>
          </table:table-cell>
          <table:table-cell table:formula="of:=AVERAGE([.B341:.B389])" office:value-type="float" office:value="26.4042857142857" calcext:value-type="float">
            <text:p>26.4042857142857</text:p>
          </table:table-cell>
          <table:table-cell table:formula="of:=AVERAGE([.B291:.B389])" office:value-type="float" office:value="26.2842424242424" calcext:value-type="float">
            <text:p>26.2842424242424</text:p>
          </table:table-cell>
        </table:table-row>
        <table:table-row table:style-name="ro1">
          <table:table-cell office:value-type="date" office:date-value="2025-06-28" calcext:value-type="date">
            <text:p>2025-06-28</text:p>
          </table:table-cell>
          <table:table-cell office:value-type="float" office:value="26.39" calcext:value-type="float">
            <text:p>26.39</text:p>
          </table:table-cell>
          <table:table-cell office:value-type="float" office:value="20889891" calcext:value-type="float">
            <text:p>20889891</text:p>
          </table:table-cell>
          <table:table-cell table:formula="of:=AVERAGE([.B342:.B390])" office:value-type="float" office:value="26.4177551020408" calcext:value-type="float">
            <text:p>26.4177551020408</text:p>
          </table:table-cell>
          <table:table-cell table:formula="of:=AVERAGE([.B292:.B390])" office:value-type="float" office:value="26.2684848484849" calcext:value-type="float">
            <text:p>26.2684848484849</text:p>
          </table:table-cell>
        </table:table-row>
        <table:table-row table:style-name="ro1">
          <table:table-cell office:value-type="date" office:date-value="2025-06-29" calcext:value-type="date">
            <text:p>2025-06-29</text:p>
          </table:table-cell>
          <table:table-cell office:value-type="float" office:value="26.39" calcext:value-type="float">
            <text:p>26.39</text:p>
          </table:table-cell>
          <table:table-cell office:value-type="float" office:value="20889891" calcext:value-type="float">
            <text:p>20889891</text:p>
          </table:table-cell>
          <table:table-cell table:formula="of:=AVERAGE([.B343:.B391])" office:value-type="float" office:value="26.4312244897959" calcext:value-type="float">
            <text:p>26.4312244897959</text:p>
          </table:table-cell>
          <table:table-cell table:formula="of:=AVERAGE([.B293:.B391])" office:value-type="float" office:value="26.2546464646465" calcext:value-type="float">
            <text:p>26.2546464646465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26.5" calcext:value-type="float">
            <text:p>26.5</text:p>
          </table:table-cell>
          <table:table-cell office:value-type="float" office:value="24163700" calcext:value-type="float">
            <text:p>24163700</text:p>
          </table:table-cell>
          <table:table-cell table:formula="of:=AVERAGE([.B344:.B392])" office:value-type="float" office:value="26.444693877551" calcext:value-type="float">
            <text:p>26.444693877551</text:p>
          </table:table-cell>
          <table:table-cell table:formula="of:=AVERAGE([.B294:.B392])" office:value-type="float" office:value="26.2408080808081" calcext:value-type="float">
            <text:p>26.2408080808081</text:p>
          </table:table-cell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27.05" calcext:value-type="float">
            <text:p>27.05</text:p>
          </table:table-cell>
          <table:table-cell office:value-type="float" office:value="25633372" calcext:value-type="float">
            <text:p>25633372</text:p>
          </table:table-cell>
          <table:table-cell table:formula="of:=AVERAGE([.B345:.B393])" office:value-type="float" office:value="26.4461224489796" calcext:value-type="float">
            <text:p>26.4461224489796</text:p>
          </table:table-cell>
          <table:table-cell table:formula="of:=AVERAGE([.B295:.B393])" office:value-type="float" office:value="26.2280808080808" calcext:value-type="float">
            <text:p>26.2280808080808</text:p>
          </table:table-cell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27.31" calcext:value-type="float">
            <text:p>27.31</text:p>
          </table:table-cell>
          <table:table-cell office:value-type="float" office:value="15531905" calcext:value-type="float">
            <text:p>15531905</text:p>
          </table:table-cell>
          <table:table-cell table:formula="of:=AVERAGE([.B346:.B394])" office:value-type="float" office:value="26.4612244897959" calcext:value-type="float">
            <text:p>26.4612244897959</text:p>
          </table:table-cell>
          <table:table-cell table:formula="of:=AVERAGE([.B296:.B394])" office:value-type="float" office:value="26.2175757575758" calcext:value-type="float">
            <text:p>26.2175757575758</text:p>
          </table:table-cell>
        </table:table-row>
        <table:table-row table:style-name="ro1">
          <table:table-cell office:value-type="date" office:date-value="2025-07-03" calcext:value-type="date">
            <text:p>2025-07-03</text:p>
          </table:table-cell>
          <table:table-cell office:value-type="float" office:value="27.35" calcext:value-type="float">
            <text:p>27.35</text:p>
          </table:table-cell>
          <table:table-cell office:value-type="float" office:value="8818656" calcext:value-type="float">
            <text:p>8818656</text:p>
          </table:table-cell>
          <table:table-cell table:formula="of:=AVERAGE([.B347:.B395])" office:value-type="float" office:value="26.4879591836735" calcext:value-type="float">
            <text:p>26.4879591836735</text:p>
          </table:table-cell>
          <table:table-cell table:formula="of:=AVERAGE([.B297:.B395])" office:value-type="float" office:value="26.2122222222222" calcext:value-type="float">
            <text:p>26.2122222222222</text:p>
          </table:table-cell>
        </table:table-row>
        <table:table-row table:style-name="ro1">
          <table:table-cell office:value-type="date" office:date-value="2025-07-04" calcext:value-type="date">
            <text:p>2025-07-04</text:p>
          </table:table-cell>
          <table:table-cell office:value-type="float" office:value="27.35" calcext:value-type="float">
            <text:p>27.35</text:p>
          </table:table-cell>
          <table:table-cell office:value-type="float" office:value="8818656" calcext:value-type="float">
            <text:p>8818656</text:p>
          </table:table-cell>
          <table:table-cell table:formula="of:=AVERAGE([.B348:.B396])" office:value-type="float" office:value="26.5069387755102" calcext:value-type="float">
            <text:p>26.5069387755102</text:p>
          </table:table-cell>
          <table:table-cell table:formula="of:=AVERAGE([.B298:.B396])" office:value-type="float" office:value="26.2076767676768" calcext:value-type="float">
            <text:p>26.2076767676768</text:p>
          </table:table-cell>
        </table:table-row>
        <table:table-row table:style-name="ro1">
          <table:table-cell office:value-type="date" office:date-value="2025-07-05" calcext:value-type="date">
            <text:p>2025-07-05</text:p>
          </table:table-cell>
          <table:table-cell office:value-type="float" office:value="27.35" calcext:value-type="float">
            <text:p>27.35</text:p>
          </table:table-cell>
          <table:table-cell office:value-type="float" office:value="8818656" calcext:value-type="float">
            <text:p>8818656</text:p>
          </table:table-cell>
          <table:table-cell table:formula="of:=AVERAGE([.B349:.B397])" office:value-type="float" office:value="26.5222448979592" calcext:value-type="float">
            <text:p>26.5222448979592</text:p>
          </table:table-cell>
          <table:table-cell table:formula="of:=AVERAGE([.B299:.B397])" office:value-type="float" office:value="26.2036363636364" calcext:value-type="float">
            <text:p>26.2036363636364</text:p>
          </table:table-cell>
        </table:table-row>
        <table:table-row table:style-name="ro1">
          <table:table-cell office:value-type="date" office:date-value="2025-07-06" calcext:value-type="date">
            <text:p>2025-07-06</text:p>
          </table:table-cell>
          <table:table-cell office:value-type="float" office:value="27.35" calcext:value-type="float">
            <text:p>27.35</text:p>
          </table:table-cell>
          <table:table-cell office:value-type="float" office:value="8818656" calcext:value-type="float">
            <text:p>8818656</text:p>
          </table:table-cell>
          <table:table-cell table:formula="of:=AVERAGE([.B350:.B398])" office:value-type="float" office:value="26.5375510204082" calcext:value-type="float">
            <text:p>26.5375510204082</text:p>
          </table:table-cell>
          <table:table-cell table:formula="of:=AVERAGE([.B300:.B398])" office:value-type="float" office:value="26.2013131313131" calcext:value-type="float">
            <text:p>26.2013131313131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27.06" calcext:value-type="float">
            <text:p>27.06</text:p>
          </table:table-cell>
          <table:table-cell office:value-type="float" office:value="15913262" calcext:value-type="float">
            <text:p>15913262</text:p>
          </table:table-cell>
          <table:table-cell table:formula="of:=AVERAGE([.B351:.B399])" office:value-type="float" office:value="26.5528571428571" calcext:value-type="float">
            <text:p>26.5528571428571</text:p>
          </table:table-cell>
          <table:table-cell table:formula="of:=AVERAGE([.B301:.B399])" office:value-type="float" office:value="26.1989898989899" calcext:value-type="float">
            <text:p>26.1989898989899</text:p>
          </table:table-cell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27.32" calcext:value-type="float">
            <text:p>27.32</text:p>
          </table:table-cell>
          <table:table-cell office:value-type="float" office:value="14732805" calcext:value-type="float">
            <text:p>14732805</text:p>
          </table:table-cell>
          <table:table-cell table:formula="of:=AVERAGE([.B352:.B400])" office:value-type="float" office:value="26.5626530612245" calcext:value-type="float">
            <text:p>26.5626530612245</text:p>
          </table:table-cell>
          <table:table-cell table:formula="of:=AVERAGE([.B302:.B400])" office:value-type="float" office:value="26.1937373737374" calcext:value-type="float">
            <text:p>26.1937373737374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27.29" calcext:value-type="float">
            <text:p>27.29</text:p>
          </table:table-cell>
          <table:table-cell office:value-type="float" office:value="14405259" calcext:value-type="float">
            <text:p>14405259</text:p>
          </table:table-cell>
          <table:table-cell table:formula="of:=AVERAGE([.B353:.B401])" office:value-type="float" office:value="26.5797959183674" calcext:value-type="float">
            <text:p>26.5797959183674</text:p>
          </table:table-cell>
          <table:table-cell table:formula="of:=AVERAGE([.B303:.B401])" office:value-type="float" office:value="26.1872727272727" calcext:value-type="float">
            <text:p>26.1872727272727</text:p>
          </table:table-cell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27.51" calcext:value-type="float">
            <text:p>27.51</text:p>
          </table:table-cell>
          <table:table-cell office:value-type="float" office:value="13643232" calcext:value-type="float">
            <text:p>13643232</text:p>
          </table:table-cell>
          <table:table-cell table:formula="of:=AVERAGE([.B354:.B402])" office:value-type="float" office:value="26.6059183673469" calcext:value-type="float">
            <text:p>26.6059183673469</text:p>
          </table:table-cell>
          <table:table-cell table:formula="of:=AVERAGE([.B304:.B402])" office:value-type="float" office:value="26.1814141414141" calcext:value-type="float">
            <text:p>26.1814141414141</text:p>
          </table:table-cell>
        </table:table-row>
        <table:table-row table:style-name="ro1">
          <table:table-cell office:value-type="date" office:date-value="2025-07-11" calcext:value-type="date">
            <text:p>2025-07-11</text:p>
          </table:table-cell>
          <table:table-cell office:value-type="float" office:value="27.33" calcext:value-type="float">
            <text:p>27.33</text:p>
          </table:table-cell>
          <table:table-cell office:value-type="float" office:value="14040444" calcext:value-type="float">
            <text:p>14040444</text:p>
          </table:table-cell>
          <table:table-cell table:formula="of:=AVERAGE([.B355:.B403])" office:value-type="float" office:value="26.6375510204082" calcext:value-type="float">
            <text:p>26.6375510204082</text:p>
          </table:table-cell>
          <table:table-cell table:formula="of:=AVERAGE([.B305:.B403])" office:value-type="float" office:value="26.1777777777778" calcext:value-type="float">
            <text:p>26.1777777777778</text:p>
          </table:table-cell>
        </table:table-row>
        <table:table-row table:style-name="ro1">
          <table:table-cell office:value-type="date" office:date-value="2025-07-12" calcext:value-type="date">
            <text:p>2025-07-12</text:p>
          </table:table-cell>
          <table:table-cell office:value-type="float" office:value="27.33" calcext:value-type="float">
            <text:p>27.33</text:p>
          </table:table-cell>
          <table:table-cell office:value-type="float" office:value="14040444" calcext:value-type="float">
            <text:p>14040444</text:p>
          </table:table-cell>
          <table:table-cell table:formula="of:=AVERAGE([.B356:.B404])" office:value-type="float" office:value="26.6669387755102" calcext:value-type="float">
            <text:p>26.6669387755102</text:p>
          </table:table-cell>
          <table:table-cell table:formula="of:=AVERAGE([.B306:.B404])" office:value-type="float" office:value="26.1838383838384" calcext:value-type="float">
            <text:p>26.1838383838384</text:p>
          </table:table-cell>
        </table:table-row>
        <table:table-row table:style-name="ro1">
          <table:table-cell office:value-type="date" office:date-value="2025-07-13" calcext:value-type="date">
            <text:p>2025-07-13</text:p>
          </table:table-cell>
          <table:table-cell office:value-type="float" office:value="27.33" calcext:value-type="float">
            <text:p>27.33</text:p>
          </table:table-cell>
          <table:table-cell office:value-type="float" office:value="14040444" calcext:value-type="float">
            <text:p>14040444</text:p>
          </table:table-cell>
          <table:table-cell table:formula="of:=AVERAGE([.B357:.B405])" office:value-type="float" office:value="26.6963265306122" calcext:value-type="float">
            <text:p>26.6963265306122</text:p>
          </table:table-cell>
          <table:table-cell table:formula="of:=AVERAGE([.B307:.B405])" office:value-type="float" office:value="26.2045454545455" calcext:value-type="float">
            <text:p>26.2045454545455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27.31" calcext:value-type="float">
            <text:p>27.31</text:p>
          </table:table-cell>
          <table:table-cell office:value-type="float" office:value="16559018" calcext:value-type="float">
            <text:p>16559018</text:p>
          </table:table-cell>
          <table:table-cell table:formula="of:=AVERAGE([.B358:.B406])" office:value-type="float" office:value="26.7257142857143" calcext:value-type="float">
            <text:p>26.7257142857143</text:p>
          </table:table-cell>
          <table:table-cell table:formula="of:=AVERAGE([.B308:.B406])" office:value-type="float" office:value="26.2252525252525" calcext:value-type="float">
            <text:p>26.2252525252525</text:p>
          </table:table-cell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26.87" calcext:value-type="float">
            <text:p>26.87</text:p>
          </table:table-cell>
          <table:table-cell office:value-type="float" office:value="16833365" calcext:value-type="float">
            <text:p>16833365</text:p>
          </table:table-cell>
          <table:table-cell table:formula="of:=AVERAGE([.B359:.B407])" office:value-type="float" office:value="26.754693877551" calcext:value-type="float">
            <text:p>26.754693877551</text:p>
          </table:table-cell>
          <table:table-cell table:formula="of:=AVERAGE([.B309:.B407])" office:value-type="float" office:value="26.2457575757576" calcext:value-type="float">
            <text:p>26.2457575757576</text:p>
          </table:table-cell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26.93" calcext:value-type="float">
            <text:p>26.93</text:p>
          </table:table-cell>
          <table:table-cell office:value-type="float" office:value="16183556" calcext:value-type="float">
            <text:p>16183556</text:p>
          </table:table-cell>
          <table:table-cell table:formula="of:=AVERAGE([.B360:.B408])" office:value-type="float" office:value="26.7669387755102" calcext:value-type="float">
            <text:p>26.7669387755102</text:p>
          </table:table-cell>
          <table:table-cell table:formula="of:=AVERAGE([.B310:.B408])" office:value-type="float" office:value="26.2652525252525" calcext:value-type="float">
            <text:p>26.2652525252525</text:p>
          </table:table-cell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27.14" calcext:value-type="float">
            <text:p>27.14</text:p>
          </table:table-cell>
          <table:table-cell office:value-type="float" office:value="14577968" calcext:value-type="float">
            <text:p>14577968</text:p>
          </table:table-cell>
          <table:table-cell table:formula="of:=AVERAGE([.B361:.B409])" office:value-type="float" office:value="26.7851020408163" calcext:value-type="float">
            <text:p>26.7851020408163</text:p>
          </table:table-cell>
          <table:table-cell table:formula="of:=AVERAGE([.B311:.B409])" office:value-type="float" office:value="26.2916161616162" calcext:value-type="float">
            <text:p>26.2916161616162</text:p>
          </table:table-cell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27.02" calcext:value-type="float">
            <text:p>27.02</text:p>
          </table:table-cell>
          <table:table-cell office:value-type="float" office:value="13196852" calcext:value-type="float">
            <text:p>13196852</text:p>
          </table:table-cell>
          <table:table-cell table:formula="of:=AVERAGE([.B362:.B410])" office:value-type="float" office:value="26.8044897959184" calcext:value-type="float">
            <text:p>26.8044897959184</text:p>
          </table:table-cell>
          <table:table-cell table:formula="of:=AVERAGE([.B312:.B410])" office:value-type="float" office:value="26.3044444444444" calcext:value-type="float">
            <text:p>26.3044444444444</text:p>
          </table:table-cell>
        </table:table-row>
        <table:table-row table:style-name="ro1">
          <table:table-cell office:value-type="date" office:date-value="2025-07-19" calcext:value-type="date">
            <text:p>2025-07-19</text:p>
          </table:table-cell>
          <table:table-cell office:value-type="float" office:value="27.02" calcext:value-type="float">
            <text:p>27.02</text:p>
          </table:table-cell>
          <table:table-cell office:value-type="float" office:value="13196852" calcext:value-type="float">
            <text:p>13196852</text:p>
          </table:table-cell>
          <table:table-cell table:formula="of:=AVERAGE([.B363:.B411])" office:value-type="float" office:value="26.8218367346939" calcext:value-type="float">
            <text:p>26.8218367346939</text:p>
          </table:table-cell>
          <table:table-cell table:formula="of:=AVERAGE([.B313:.B411])" office:value-type="float" office:value="26.3251515151515" calcext:value-type="float">
            <text:p>26.3251515151515</text:p>
          </table:table-cell>
        </table:table-row>
        <table:table-row table:style-name="ro1">
          <table:table-cell office:value-type="date" office:date-value="2025-07-20" calcext:value-type="date">
            <text:p>2025-07-20</text:p>
          </table:table-cell>
          <table:table-cell office:value-type="float" office:value="27.02" calcext:value-type="float">
            <text:p>27.02</text:p>
          </table:table-cell>
          <table:table-cell office:value-type="float" office:value="13196852" calcext:value-type="float">
            <text:p>13196852</text:p>
          </table:table-cell>
          <table:table-cell table:formula="of:=AVERAGE([.B364:.B412])" office:value-type="float" office:value="26.8391836734694" calcext:value-type="float">
            <text:p>26.8391836734694</text:p>
          </table:table-cell>
          <table:table-cell table:formula="of:=AVERAGE([.B314:.B412])" office:value-type="float" office:value="26.3425252525253" calcext:value-type="float">
            <text:p>26.3425252525253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26.95" calcext:value-type="float">
            <text:p>26.95</text:p>
          </table:table-cell>
          <table:table-cell office:value-type="float" office:value="13098554" calcext:value-type="float">
            <text:p>13098554</text:p>
          </table:table-cell>
          <table:table-cell table:formula="of:=AVERAGE([.B365:.B413])" office:value-type="float" office:value="26.8565306122449" calcext:value-type="float">
            <text:p>26.8565306122449</text:p>
          </table:table-cell>
          <table:table-cell table:formula="of:=AVERAGE([.B315:.B413])" office:value-type="float" office:value="26.359898989899" calcext:value-type="float">
            <text:p>26.359898989899</text:p>
          </table:table-cell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27.24" calcext:value-type="float">
            <text:p>27.24</text:p>
          </table:table-cell>
          <table:table-cell office:value-type="float" office:value="12718613" calcext:value-type="float">
            <text:p>12718613</text:p>
          </table:table-cell>
          <table:table-cell table:formula="of:=AVERAGE([.B366:.B414])" office:value-type="float" office:value="26.8708163265306" calcext:value-type="float">
            <text:p>26.8708163265306</text:p>
          </table:table-cell>
          <table:table-cell table:formula="of:=AVERAGE([.B316:.B414])" office:value-type="float" office:value="26.3765656565657" calcext:value-type="float">
            <text:p>26.3765656565657</text:p>
          </table:table-cell>
        </table:table-row>
        <table:table-row table:style-name="ro1">
          <table:table-cell office:value-type="date" office:date-value="2025-07-23" calcext:value-type="date">
            <text:p>2025-07-23</text:p>
          </table:table-cell>
          <table:table-cell office:value-type="float" office:value="27.38" calcext:value-type="float">
            <text:p>27.38</text:p>
          </table:table-cell>
          <table:table-cell office:value-type="float" office:value="16834899" calcext:value-type="float">
            <text:p>16834899</text:p>
          </table:table-cell>
          <table:table-cell table:formula="of:=AVERAGE([.B367:.B415])" office:value-type="float" office:value="26.8871428571429" calcext:value-type="float">
            <text:p>26.8871428571429</text:p>
          </table:table-cell>
          <table:table-cell table:formula="of:=AVERAGE([.B317:.B415])" office:value-type="float" office:value="26.3931313131313" calcext:value-type="float">
            <text:p>26.3931313131313</text:p>
          </table:table-cell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27.28" calcext:value-type="float">
            <text:p>27.28</text:p>
          </table:table-cell>
          <table:table-cell office:value-type="float" office:value="14200188" calcext:value-type="float">
            <text:p>14200188</text:p>
          </table:table-cell>
          <table:table-cell table:formula="of:=AVERAGE([.B368:.B416])" office:value-type="float" office:value="26.909387755102" calcext:value-type="float">
            <text:p>26.909387755102</text:p>
          </table:table-cell>
          <table:table-cell table:formula="of:=AVERAGE([.B318:.B416])" office:value-type="float" office:value="26.4128282828283" calcext:value-type="float">
            <text:p>26.4128282828283</text:p>
          </table:table-cell>
        </table:table-row>
        <table:table-row table:style-name="ro1">
          <table:table-cell office:value-type="date" office:date-value="2025-07-25" calcext:value-type="date">
            <text:p>2025-07-25</text:p>
          </table:table-cell>
          <table:table-cell office:value-type="float" office:value="27.32" calcext:value-type="float">
            <text:p>27.32</text:p>
          </table:table-cell>
          <table:table-cell office:value-type="float" office:value="16852690" calcext:value-type="float">
            <text:p>16852690</text:p>
          </table:table-cell>
          <table:table-cell table:formula="of:=AVERAGE([.B369:.B417])" office:value-type="float" office:value="26.9308163265306" calcext:value-type="float">
            <text:p>26.9308163265306</text:p>
          </table:table-cell>
          <table:table-cell table:formula="of:=AVERAGE([.B319:.B417])" office:value-type="float" office:value="26.4345454545455" calcext:value-type="float">
            <text:p>26.4345454545455</text:p>
          </table:table-cell>
        </table:table-row>
        <table:table-row table:style-name="ro1">
          <table:table-cell office:value-type="date" office:date-value="2025-07-26" calcext:value-type="date">
            <text:p>2025-07-26</text:p>
          </table:table-cell>
          <table:table-cell office:value-type="float" office:value="27.32" calcext:value-type="float">
            <text:p>27.32</text:p>
          </table:table-cell>
          <table:table-cell office:value-type="float" office:value="16852690" calcext:value-type="float">
            <text:p>16852690</text:p>
          </table:table-cell>
          <table:table-cell table:formula="of:=AVERAGE([.B370:.B418])" office:value-type="float" office:value="26.9467346938776" calcext:value-type="float">
            <text:p>26.9467346938776</text:p>
          </table:table-cell>
          <table:table-cell table:formula="of:=AVERAGE([.B320:.B418])" office:value-type="float" office:value="26.4537373737374" calcext:value-type="float">
            <text:p>26.4537373737374</text:p>
          </table:table-cell>
        </table:table-row>
        <table:table-row table:style-name="ro1">
          <table:table-cell office:value-type="date" office:date-value="2025-07-27" calcext:value-type="date">
            <text:p>2025-07-27</text:p>
          </table:table-cell>
          <table:table-cell office:value-type="float" office:value="27.32" calcext:value-type="float">
            <text:p>27.32</text:p>
          </table:table-cell>
          <table:table-cell office:value-type="float" office:value="16852690" calcext:value-type="float">
            <text:p>16852690</text:p>
          </table:table-cell>
          <table:table-cell table:formula="of:=AVERAGE([.B371:.B419])" office:value-type="float" office:value="26.9626530612245" calcext:value-type="float">
            <text:p>26.9626530612245</text:p>
          </table:table-cell>
          <table:table-cell table:formula="of:=AVERAGE([.B321:.B419])" office:value-type="float" office:value="26.4729292929293" calcext:value-type="float">
            <text:p>26.4729292929293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27.2" calcext:value-type="float">
            <text:p>27.2</text:p>
          </table:table-cell>
          <table:table-cell office:value-type="float" office:value="14874435" calcext:value-type="float">
            <text:p>14874435</text:p>
          </table:table-cell>
          <table:table-cell table:formula="of:=AVERAGE([.B372:.B420])" office:value-type="float" office:value="26.9785714285714" calcext:value-type="float">
            <text:p>26.9785714285714</text:p>
          </table:table-cell>
          <table:table-cell table:formula="of:=AVERAGE([.B322:.B420])" office:value-type="float" office:value="26.4921212121212" calcext:value-type="float">
            <text:p>26.4921212121212</text:p>
          </table:table-cell>
        </table:table-row>
        <table:table-row table:style-name="ro1">
          <table:table-cell office:value-type="date" office:date-value="2025-07-29" calcext:value-type="date">
            <text:p>2025-07-29</text:p>
          </table:table-cell>
          <table:table-cell office:value-type="float" office:value="27.17" calcext:value-type="float">
            <text:p>27.17</text:p>
          </table:table-cell>
          <table:table-cell office:value-type="float" office:value="13146972" calcext:value-type="float">
            <text:p>13146972</text:p>
          </table:table-cell>
          <table:table-cell table:formula="of:=AVERAGE([.B373:.B421])" office:value-type="float" office:value="26.9897959183673" calcext:value-type="float">
            <text:p>26.9897959183673</text:p>
          </table:table-cell>
          <table:table-cell table:formula="of:=AVERAGE([.B323:.B421])" office:value-type="float" office:value="26.510101010101" calcext:value-type="float">
            <text:p>26.510101010101</text:p>
          </table:table-cell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26.84" calcext:value-type="float">
            <text:p>26.84</text:p>
          </table:table-cell>
          <table:table-cell office:value-type="float" office:value="23968385" calcext:value-type="float">
            <text:p>23968385</text:p>
          </table:table-cell>
          <table:table-cell table:formula="of:=AVERAGE([.B374:.B422])" office:value-type="float" office:value="26.9942857142857" calcext:value-type="float">
            <text:p>26.9942857142857</text:p>
          </table:table-cell>
          <table:table-cell table:formula="of:=AVERAGE([.B324:.B422])" office:value-type="float" office:value="26.5317171717172" calcext:value-type="float">
            <text:p>26.5317171717172</text:p>
          </table:table-cell>
        </table:table-row>
        <table:table-row table:style-name="ro1">
          <table:table-cell office:value-type="date" office:date-value="2025-07-31" calcext:value-type="date">
            <text:p>2025-07-31</text:p>
          </table:table-cell>
          <table:table-cell office:value-type="float" office:value="26.5" calcext:value-type="float">
            <text:p>26.5</text:p>
          </table:table-cell>
          <table:table-cell office:value-type="float" office:value="19727463" calcext:value-type="float">
            <text:p>19727463</text:p>
          </table:table-cell>
          <table:table-cell table:formula="of:=AVERAGE([.B375:.B423])" office:value-type="float" office:value="26.9938775510204" calcext:value-type="float">
            <text:p>26.9938775510204</text:p>
          </table:table-cell>
          <table:table-cell table:formula="of:=AVERAGE([.B325:.B423])" office:value-type="float" office:value="26.5458585858586" calcext:value-type="float">
            <text:p>26.5458585858586</text:p>
          </table:table-cell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26.38" calcext:value-type="float">
            <text:p>26.38</text:p>
          </table:table-cell>
          <table:table-cell office:value-type="float" office:value="17759276" calcext:value-type="float">
            <text:p>17759276</text:p>
          </table:table-cell>
          <table:table-cell table:formula="of:=AVERAGE([.B376:.B424])" office:value-type="float" office:value="26.9832653061225" calcext:value-type="float">
            <text:p>26.9832653061225</text:p>
          </table:table-cell>
          <table:table-cell table:formula="of:=AVERAGE([.B326:.B424])" office:value-type="float" office:value="26.5567676767677" calcext:value-type="float">
            <text:p>26.5567676767677</text:p>
          </table:table-cell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float" office:value="26.38" calcext:value-type="float">
            <text:p>26.38</text:p>
          </table:table-cell>
          <table:table-cell office:value-type="float" office:value="17759276" calcext:value-type="float">
            <text:p>17759276</text:p>
          </table:table-cell>
          <table:table-cell table:formula="of:=AVERAGE([.B377:.B425])" office:value-type="float" office:value="26.9726530612245" calcext:value-type="float">
            <text:p>26.9726530612245</text:p>
          </table:table-cell>
          <table:table-cell table:formula="of:=AVERAGE([.B327:.B425])" office:value-type="float" office:value="26.5635353535354" calcext:value-type="float">
            <text:p>26.5635353535354</text:p>
          </table:table-cell>
        </table:table-row>
        <table:table-row table:style-name="ro1">
          <table:table-cell office:value-type="date" office:date-value="2025-08-03" calcext:value-type="date">
            <text:p>2025-08-03</text:p>
          </table:table-cell>
          <table:table-cell office:value-type="float" office:value="26.38" calcext:value-type="float">
            <text:p>26.38</text:p>
          </table:table-cell>
          <table:table-cell office:value-type="float" office:value="17759276" calcext:value-type="float">
            <text:p>17759276</text:p>
          </table:table-cell>
          <table:table-cell table:formula="of:=AVERAGE([.B378:.B426])" office:value-type="float" office:value="26.9620408163265" calcext:value-type="float">
            <text:p>26.9620408163265</text:p>
          </table:table-cell>
          <table:table-cell table:formula="of:=AVERAGE([.B328:.B426])" office:value-type="float" office:value="26.5707070707071" calcext:value-type="float">
            <text:p>26.5707070707071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26.61" calcext:value-type="float">
            <text:p>26.61</text:p>
          </table:table-cell>
          <table:table-cell office:value-type="float" office:value="20330456" calcext:value-type="float">
            <text:p>20330456</text:p>
          </table:table-cell>
          <table:table-cell table:formula="of:=AVERAGE([.B379:.B427])" office:value-type="float" office:value="26.9514285714286" calcext:value-type="float">
            <text:p>26.9514285714286</text:p>
          </table:table-cell>
          <table:table-cell table:formula="of:=AVERAGE([.B329:.B427])" office:value-type="float" office:value="26.5778787878788" calcext:value-type="float">
            <text:p>26.5778787878788</text:p>
          </table:table-cell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26.74" calcext:value-type="float">
            <text:p>26.74</text:p>
          </table:table-cell>
          <table:table-cell office:value-type="float" office:value="15668176" calcext:value-type="float">
            <text:p>15668176</text:p>
          </table:table-cell>
          <table:table-cell table:formula="of:=AVERAGE([.B380:.B428])" office:value-type="float" office:value="26.9451020408163" calcext:value-type="float">
            <text:p>26.9451020408163</text:p>
          </table:table-cell>
          <table:table-cell table:formula="of:=AVERAGE([.B330:.B428])" office:value-type="float" office:value="26.5873737373737" calcext:value-type="float">
            <text:p>26.5873737373737</text:p>
          </table:table-cell>
        </table:table-row>
        <table:table-row table:style-name="ro1">
          <table:table-cell office:value-type="date" office:date-value="2025-08-06" calcext:value-type="date">
            <text:p>2025-08-06</text:p>
          </table:table-cell>
          <table:table-cell office:value-type="float" office:value="26.68" calcext:value-type="float">
            <text:p>26.68</text:p>
          </table:table-cell>
          <table:table-cell office:value-type="float" office:value="16556083" calcext:value-type="float">
            <text:p>16556083</text:p>
          </table:table-cell>
          <table:table-cell table:formula="of:=AVERAGE([.B381:.B429])" office:value-type="float" office:value="26.9455102040816" calcext:value-type="float">
            <text:p>26.9455102040816</text:p>
          </table:table-cell>
          <table:table-cell table:formula="of:=AVERAGE([.B331:.B429])" office:value-type="float" office:value="26.5969696969697" calcext:value-type="float">
            <text:p>26.5969696969697</text:p>
          </table:table-cell>
        </table:table-row>
        <table:table-row table:style-name="ro1">
          <table:table-cell office:value-type="date" office:date-value="2025-08-07" calcext:value-type="date">
            <text:p>2025-08-07</text:p>
          </table:table-cell>
          <table:table-cell office:value-type="float" office:value="26.75" calcext:value-type="float">
            <text:p>26.75</text:p>
          </table:table-cell>
          <table:table-cell office:value-type="float" office:value="13395310" calcext:value-type="float">
            <text:p>13395310</text:p>
          </table:table-cell>
          <table:table-cell table:formula="of:=AVERAGE([.B382:.B430])" office:value-type="float" office:value="26.9463265306122" calcext:value-type="float">
            <text:p>26.9463265306122</text:p>
          </table:table-cell>
          <table:table-cell table:formula="of:=AVERAGE([.B332:.B430])" office:value-type="float" office:value="26.6049494949495" calcext:value-type="float">
            <text:p>26.6049494949495</text:p>
          </table:table-cell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26.88" calcext:value-type="float">
            <text:p>26.88</text:p>
          </table:table-cell>
          <table:table-cell office:value-type="float" office:value="13659955" calcext:value-type="float">
            <text:p>13659955</text:p>
          </table:table-cell>
          <table:table-cell table:formula="of:=AVERAGE([.B383:.B431])" office:value-type="float" office:value="26.9485714285714" calcext:value-type="float">
            <text:p>26.9485714285714</text:p>
          </table:table-cell>
          <table:table-cell table:formula="of:=AVERAGE([.B333:.B431])" office:value-type="float" office:value="26.6143434343434" calcext:value-type="float">
            <text:p>26.6143434343434</text:p>
          </table:table-cell>
        </table:table-row>
        <table:table-row table:style-name="ro1">
          <table:table-cell office:value-type="date" office:date-value="2025-08-09" calcext:value-type="date">
            <text:p>2025-08-09</text:p>
          </table:table-cell>
          <table:table-cell office:value-type="float" office:value="26.88" calcext:value-type="float">
            <text:p>26.88</text:p>
          </table:table-cell>
          <table:table-cell office:value-type="float" office:value="13659955" calcext:value-type="float">
            <text:p>13659955</text:p>
          </table:table-cell>
          <table:table-cell table:formula="of:=AVERAGE([.B384:.B432])" office:value-type="float" office:value="26.9522448979592" calcext:value-type="float">
            <text:p>26.9522448979592</text:p>
          </table:table-cell>
          <table:table-cell table:formula="of:=AVERAGE([.B334:.B432])" office:value-type="float" office:value="26.6261616161616" calcext:value-type="float">
            <text:p>26.6261616161616</text:p>
          </table:table-cell>
        </table:table-row>
        <table:table-row table:style-name="ro1">
          <table:table-cell office:value-type="date" office:date-value="2025-08-10" calcext:value-type="date">
            <text:p>2025-08-10</text:p>
          </table:table-cell>
          <table:table-cell office:value-type="float" office:value="26.88" calcext:value-type="float">
            <text:p>26.88</text:p>
          </table:table-cell>
          <table:table-cell office:value-type="float" office:value="13659955" calcext:value-type="float">
            <text:p>13659955</text:p>
          </table:table-cell>
          <table:table-cell table:formula="of:=AVERAGE([.B385:.B433])" office:value-type="float" office:value="26.9559183673469" calcext:value-type="float">
            <text:p>26.9559183673469</text:p>
          </table:table-cell>
          <table:table-cell table:formula="of:=AVERAGE([.B335:.B433])" office:value-type="float" office:value="26.6344444444444" calcext:value-type="float">
            <text:p>26.6344444444444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26.79" calcext:value-type="float">
            <text:p>26.79</text:p>
          </table:table-cell>
          <table:table-cell office:value-type="float" office:value="17458876" calcext:value-type="float">
            <text:p>17458876</text:p>
          </table:table-cell>
          <table:table-cell table:formula="of:=AVERAGE([.B386:.B434])" office:value-type="float" office:value="26.9595918367347" calcext:value-type="float">
            <text:p>26.9595918367347</text:p>
          </table:table-cell>
          <table:table-cell table:formula="of:=AVERAGE([.B336:.B434])" office:value-type="float" office:value="26.6427272727273" calcext:value-type="float">
            <text:p>26.6427272727273</text:p>
          </table:table-cell>
        </table:table-row>
        <table:table-row table:style-name="ro1">
          <table:table-cell office:value-type="date" office:date-value="2025-08-12" calcext:value-type="date">
            <text:p>2025-08-12</text:p>
          </table:table-cell>
          <table:table-cell office:value-type="float" office:value="27.1" calcext:value-type="float">
            <text:p>27.1</text:p>
          </table:table-cell>
          <table:table-cell office:value-type="float" office:value="13897523" calcext:value-type="float">
            <text:p>13897523</text:p>
          </table:table-cell>
          <table:table-cell table:formula="of:=AVERAGE([.B387:.B435])" office:value-type="float" office:value="26.9614285714286" calcext:value-type="float">
            <text:p>26.9614285714286</text:p>
          </table:table-cell>
          <table:table-cell table:formula="of:=AVERAGE([.B337:.B435])" office:value-type="float" office:value="26.650101010101" calcext:value-type="float">
            <text:p>26.650101010101</text:p>
          </table:table-cell>
        </table:table-row>
        <table:table-row table:style-name="ro1">
          <table:table-cell office:value-type="date" office:date-value="2025-08-13" calcext:value-type="date">
            <text:p>2025-08-13</text:p>
          </table:table-cell>
          <table:table-cell office:value-type="float" office:value="27.46" calcext:value-type="float">
            <text:p>27.46</text:p>
          </table:table-cell>
          <table:table-cell office:value-type="float" office:value="16076997" calcext:value-type="float">
            <text:p>16076997</text:p>
          </table:table-cell>
          <table:table-cell table:formula="of:=AVERAGE([.B388:.B436])" office:value-type="float" office:value="26.9687755102041" calcext:value-type="float">
            <text:p>26.9687755102041</text:p>
          </table:table-cell>
          <table:table-cell table:formula="of:=AVERAGE([.B338:.B436])" office:value-type="float" office:value="26.6632323232323" calcext:value-type="float">
            <text:p>26.6632323232323</text:p>
          </table:table-cell>
        </table:table-row>
        <table:table-row table:style-name="ro1">
          <table:table-cell office:value-type="date" office:date-value="2025-08-14" calcext:value-type="date">
            <text:p>2025-08-14</text:p>
          </table:table-cell>
          <table:table-cell office:value-type="float" office:value="27.34" calcext:value-type="float">
            <text:p>27.34</text:p>
          </table:table-cell>
          <table:table-cell office:value-type="float" office:value="14665842" calcext:value-type="float">
            <text:p>14665842</text:p>
          </table:table-cell>
          <table:table-cell table:formula="of:=AVERAGE([.B389:.B437])" office:value-type="float" office:value="26.9944897959184" calcext:value-type="float">
            <text:p>26.9944897959184</text:p>
          </table:table-cell>
          <table:table-cell table:formula="of:=AVERAGE([.B339:.B437])" office:value-type="float" office:value="26.6825252525253" calcext:value-type="float">
            <text:p>26.6825252525253</text:p>
          </table:table-cell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float" office:value="27.33" calcext:value-type="float">
            <text:p>27.33</text:p>
          </table:table-cell>
          <table:table-cell office:value-type="float" office:value="14205746" calcext:value-type="float">
            <text:p>14205746</text:p>
          </table:table-cell>
          <table:table-cell table:formula="of:=AVERAGE([.B390:.B438])" office:value-type="float" office:value="27.0138775510204" calcext:value-type="float">
            <text:p>27.0138775510204</text:p>
          </table:table-cell>
          <table:table-cell table:formula="of:=AVERAGE([.B340:.B438])" office:value-type="float" office:value="26.699696969697" calcext:value-type="float">
            <text:p>26.699696969697</text:p>
          </table:table-cell>
        </table:table-row>
        <table:table-row table:style-name="ro1">
          <table:table-cell office:value-type="date" office:date-value="2025-08-16" calcext:value-type="date">
            <text:p>2025-08-16</text:p>
          </table:table-cell>
          <table:table-cell office:value-type="float" office:value="27.33" calcext:value-type="float">
            <text:p>27.33</text:p>
          </table:table-cell>
          <table:table-cell office:value-type="float" office:value="14205746" calcext:value-type="float">
            <text:p>14205746</text:p>
          </table:table-cell>
          <table:table-cell table:formula="of:=AVERAGE([.B391:.B439])" office:value-type="float" office:value="27.0330612244898" calcext:value-type="float">
            <text:p>27.0330612244898</text:p>
          </table:table-cell>
          <table:table-cell table:formula="of:=AVERAGE([.B341:.B439])" office:value-type="float" office:value="26.7153535353535" calcext:value-type="float">
            <text:p>26.7153535353535</text:p>
          </table:table-cell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float" office:value="27.33" calcext:value-type="float">
            <text:p>27.33</text:p>
          </table:table-cell>
          <table:table-cell office:value-type="float" office:value="14205746" calcext:value-type="float">
            <text:p>14205746</text:p>
          </table:table-cell>
          <table:table-cell table:formula="of:=AVERAGE([.B392:.B440])" office:value-type="float" office:value="27.0522448979592" calcext:value-type="float">
            <text:p>27.0522448979592</text:p>
          </table:table-cell>
          <table:table-cell table:formula="of:=AVERAGE([.B342:.B440])" office:value-type="float" office:value="26.7315151515152" calcext:value-type="float">
            <text:p>26.7315151515152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27.26" calcext:value-type="float">
            <text:p>27.26</text:p>
          </table:table-cell>
          <table:table-cell office:value-type="float" office:value="12751597" calcext:value-type="float">
            <text:p>12751597</text:p>
          </table:table-cell>
          <table:table-cell table:formula="of:=AVERAGE([.B393:.B441])" office:value-type="float" office:value="27.0714285714286" calcext:value-type="float">
            <text:p>27.0714285714286</text:p>
          </table:table-cell>
          <table:table-cell table:formula="of:=AVERAGE([.B343:.B441])" office:value-type="float" office:value="26.7476767676768" calcext:value-type="float">
            <text:p>26.7476767676768</text:p>
          </table:table-cell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27.45" calcext:value-type="float">
            <text:p>27.45</text:p>
          </table:table-cell>
          <table:table-cell office:value-type="float" office:value="12997085" calcext:value-type="float">
            <text:p>12997085</text:p>
          </table:table-cell>
          <table:table-cell table:formula="of:=AVERAGE([.B394:.B442])" office:value-type="float" office:value="27.0869387755102" calcext:value-type="float">
            <text:p>27.0869387755102</text:p>
          </table:table-cell>
          <table:table-cell table:formula="of:=AVERAGE([.B344:.B442])" office:value-type="float" office:value="26.7631313131313" calcext:value-type="float">
            <text:p>26.7631313131313</text:p>
          </table:table-cell>
        </table:table-row>
        <table:table-row table:style-name="ro1">
          <table:table-cell office:value-type="date" office:date-value="2025-08-20" calcext:value-type="date">
            <text:p>2025-08-20</text:p>
          </table:table-cell>
          <table:table-cell office:value-type="float" office:value="27.51" calcext:value-type="float">
            <text:p>27.51</text:p>
          </table:table-cell>
          <table:table-cell office:value-type="float" office:value="16734864" calcext:value-type="float">
            <text:p>16734864</text:p>
          </table:table-cell>
          <table:table-cell table:formula="of:=AVERAGE([.B395:.B443])" office:value-type="float" office:value="27.0951020408163" calcext:value-type="float">
            <text:p>27.0951020408163</text:p>
          </table:table-cell>
          <table:table-cell table:formula="of:=AVERAGE([.B345:.B443])" office:value-type="float" office:value="26.7734343434343" calcext:value-type="float">
            <text:p>26.7734343434343</text:p>
          </table:table-cell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27.52" calcext:value-type="float">
            <text:p>27.52</text:p>
          </table:table-cell>
          <table:table-cell office:value-type="float" office:value="9865388" calcext:value-type="float">
            <text:p>9865388</text:p>
          </table:table-cell>
          <table:table-cell table:formula="of:=AVERAGE([.B396:.B444])" office:value-type="float" office:value="27.0991836734694" calcext:value-type="float">
            <text:p>27.0991836734694</text:p>
          </table:table-cell>
          <table:table-cell table:formula="of:=AVERAGE([.B346:.B444])" office:value-type="float" office:value="26.7855555555556" calcext:value-type="float">
            <text:p>26.7855555555556</text:p>
          </table:table-cell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27.95" calcext:value-type="float">
            <text:p>27.95</text:p>
          </table:table-cell>
          <table:table-cell office:value-type="float" office:value="15118583" calcext:value-type="float">
            <text:p>15118583</text:p>
          </table:table-cell>
          <table:table-cell table:formula="of:=AVERAGE([.B397:.B445])" office:value-type="float" office:value="27.1026530612245" calcext:value-type="float">
            <text:p>27.1026530612245</text:p>
          </table:table-cell>
          <table:table-cell table:formula="of:=AVERAGE([.B347:.B445])" office:value-type="float" office:value="26.8009090909091" calcext:value-type="float">
            <text:p>26.8009090909091</text:p>
          </table:table-cell>
        </table:table-row>
        <table:table-row table:style-name="ro1">
          <table:table-cell office:value-type="date" office:date-value="2025-08-23" calcext:value-type="date">
            <text:p>2025-08-23</text:p>
          </table:table-cell>
          <table:table-cell office:value-type="float" office:value="27.95" calcext:value-type="float">
            <text:p>27.95</text:p>
          </table:table-cell>
          <table:table-cell office:value-type="float" office:value="15118583" calcext:value-type="float">
            <text:p>15118583</text:p>
          </table:table-cell>
          <table:table-cell table:formula="of:=AVERAGE([.B398:.B446])" office:value-type="float" office:value="27.1148979591837" calcext:value-type="float">
            <text:p>27.1148979591837</text:p>
          </table:table-cell>
          <table:table-cell table:formula="of:=AVERAGE([.B348:.B446])" office:value-type="float" office:value="26.8163636363636" calcext:value-type="float">
            <text:p>26.8163636363636</text:p>
          </table:table-cell>
        </table:table-row>
        <table:table-row table:style-name="ro1">
          <table:table-cell office:value-type="date" office:date-value="2025-08-24" calcext:value-type="date">
            <text:p>2025-08-24</text:p>
          </table:table-cell>
          <table:table-cell office:value-type="float" office:value="27.95" calcext:value-type="float">
            <text:p>27.95</text:p>
          </table:table-cell>
          <table:table-cell office:value-type="float" office:value="15118583" calcext:value-type="float">
            <text:p>15118583</text:p>
          </table:table-cell>
          <table:table-cell table:formula="of:=AVERAGE([.B399:.B447])" office:value-type="float" office:value="27.1271428571429" calcext:value-type="float">
            <text:p>27.1271428571429</text:p>
          </table:table-cell>
          <table:table-cell table:formula="of:=AVERAGE([.B349:.B447])" office:value-type="float" office:value="26.83" calcext:value-type="float">
            <text:p>26.83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27.77" calcext:value-type="float">
            <text:p>27.77</text:p>
          </table:table-cell>
          <table:table-cell office:value-type="float" office:value="12613175" calcext:value-type="float">
            <text:p>12613175</text:p>
          </table:table-cell>
          <table:table-cell table:formula="of:=AVERAGE([.B400:.B448])" office:value-type="float" office:value="27.139387755102" calcext:value-type="float">
            <text:p>27.139387755102</text:p>
          </table:table-cell>
          <table:table-cell table:formula="of:=AVERAGE([.B350:.B448])" office:value-type="float" office:value="26.8436363636364" calcext:value-type="float">
            <text:p>26.8436363636364</text:p>
          </table:table-cell>
        </table:table-row>
        <table:table-row table:style-name="ro1">
          <table:table-cell office:value-type="date" office:date-value="2025-08-26" calcext:value-type="date">
            <text:p>2025-08-26</text:p>
          </table:table-cell>
          <table:table-cell office:value-type="float" office:value="27.75" calcext:value-type="float">
            <text:p>27.75</text:p>
          </table:table-cell>
          <table:table-cell office:value-type="float" office:value="16407556" calcext:value-type="float">
            <text:p>16407556</text:p>
          </table:table-cell>
          <table:table-cell table:formula="of:=AVERAGE([.B401:.B449])" office:value-type="float" office:value="27.1538775510204" calcext:value-type="float">
            <text:p>27.1538775510204</text:p>
          </table:table-cell>
          <table:table-cell table:formula="of:=AVERAGE([.B351:.B449])" office:value-type="float" office:value="26.8554545454545" calcext:value-type="float">
            <text:p>26.8554545454545</text:p>
          </table:table-cell>
        </table:table-row>
        <table:table-row table:style-name="ro1">
          <table:table-cell office:value-type="date" office:date-value="2025-08-27" calcext:value-type="date">
            <text:p>2025-08-27</text:p>
          </table:table-cell>
          <table:table-cell office:value-type="float" office:value="27.87" calcext:value-type="float">
            <text:p>27.87</text:p>
          </table:table-cell>
          <table:table-cell office:value-type="float" office:value="11516161" calcext:value-type="float">
            <text:p>11516161</text:p>
          </table:table-cell>
          <table:table-cell table:formula="of:=AVERAGE([.B402:.B450])" office:value-type="float" office:value="27.1626530612245" calcext:value-type="float">
            <text:p>27.1626530612245</text:p>
          </table:table-cell>
          <table:table-cell table:formula="of:=AVERAGE([.B352:.B450])" office:value-type="float" office:value="26.8672727272727" calcext:value-type="float">
            <text:p>26.8672727272727</text:p>
          </table:table-cell>
        </table:table-row>
        <table:table-row table:style-name="ro1">
          <table:table-cell office:value-type="date" office:date-value="2025-08-28" calcext:value-type="date">
            <text:p>2025-08-28</text:p>
          </table:table-cell>
          <table:table-cell office:value-type="float" office:value="27.82" calcext:value-type="float">
            <text:p>27.82</text:p>
          </table:table-cell>
          <table:table-cell office:value-type="float" office:value="11793916" calcext:value-type="float">
            <text:p>11793916</text:p>
          </table:table-cell>
          <table:table-cell table:formula="of:=AVERAGE([.B403:.B451])" office:value-type="float" office:value="27.1744897959184" calcext:value-type="float">
            <text:p>27.1744897959184</text:p>
          </table:table-cell>
          <table:table-cell table:formula="of:=AVERAGE([.B353:.B451])" office:value-type="float" office:value="26.8813131313131" calcext:value-type="float">
            <text:p>26.8813131313131</text:p>
          </table:table-cell>
        </table:table-row>
        <table:table-row table:style-name="ro1">
          <table:table-cell office:value-type="date" office:date-value="2025-08-29" calcext:value-type="date">
            <text:p>2025-08-29</text:p>
          </table:table-cell>
          <table:table-cell office:value-type="float" office:value="27.92" calcext:value-type="float">
            <text:p>27.92</text:p>
          </table:table-cell>
          <table:table-cell office:value-type="float" office:value="13211214" calcext:value-type="float">
            <text:p>13211214</text:p>
          </table:table-cell>
          <table:table-cell table:formula="of:=AVERAGE([.B404:.B452])" office:value-type="float" office:value="27.1808163265306" calcext:value-type="float">
            <text:p>27.1808163265306</text:p>
          </table:table-cell>
          <table:table-cell table:formula="of:=AVERAGE([.B354:.B452])" office:value-type="float" office:value="26.899595959596" calcext:value-type="float">
            <text:p>26.899595959596</text:p>
          </table:table-cell>
        </table:table-row>
        <table:table-row table:style-name="ro1">
          <table:table-cell office:value-type="date" office:date-value="2025-08-30" calcext:value-type="date">
            <text:p>2025-08-30</text:p>
          </table:table-cell>
          <table:table-cell office:value-type="float" office:value="27.92" calcext:value-type="float">
            <text:p>27.92</text:p>
          </table:table-cell>
          <table:table-cell office:value-type="float" office:value="13211214" calcext:value-type="float">
            <text:p>13211214</text:p>
          </table:table-cell>
          <table:table-cell table:formula="of:=AVERAGE([.B405:.B453])" office:value-type="float" office:value="27.1928571428571" calcext:value-type="float">
            <text:p>27.1928571428571</text:p>
          </table:table-cell>
          <table:table-cell table:formula="of:=AVERAGE([.B355:.B453])" office:value-type="float" office:value="26.9193939393939" calcext:value-type="float">
            <text:p>26.9193939393939</text:p>
          </table:table-cell>
        </table:table-row>
        <table:table-row table:style-name="ro1">
          <table:table-cell office:value-type="date" office:date-value="2025-08-31" calcext:value-type="date">
            <text:p>2025-08-31</text:p>
          </table:table-cell>
          <table:table-cell office:value-type="float" office:value="27.92" calcext:value-type="float">
            <text:p>27.92</text:p>
          </table:table-cell>
          <table:table-cell office:value-type="float" office:value="13211214" calcext:value-type="float">
            <text:p>13211214</text:p>
          </table:table-cell>
          <table:table-cell table:formula="of:=AVERAGE([.B406:.B454])" office:value-type="float" office:value="27.2048979591837" calcext:value-type="float">
            <text:p>27.2048979591837</text:p>
          </table:table-cell>
          <table:table-cell table:formula="of:=AVERAGE([.B356:.B454])" office:value-type="float" office:value="26.939898989899" calcext:value-type="float">
            <text:p>26.939898989899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27.92" calcext:value-type="float">
            <text:p>27.92</text:p>
          </table:table-cell>
          <table:table-cell office:value-type="float" office:value="13211214" calcext:value-type="float">
            <text:p>13211214</text:p>
          </table:table-cell>
          <table:table-cell table:formula="of:=AVERAGE([.B407:.B455])" office:value-type="float" office:value="27.2169387755102" calcext:value-type="float">
            <text:p>27.2169387755102</text:p>
          </table:table-cell>
          <table:table-cell table:formula="of:=AVERAGE([.B357:.B455])" office:value-type="float" office:value="26.960404040404" calcext:value-type="float">
            <text:p>26.960404040404</text:p>
          </table:table-cell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float" office:value="27.84" calcext:value-type="float">
            <text:p>27.84</text:p>
          </table:table-cell>
          <table:table-cell office:value-type="float" office:value="18420582" calcext:value-type="float">
            <text:p>18420582</text:p>
          </table:table-cell>
          <table:table-cell table:formula="of:=AVERAGE([.B408:.B456])" office:value-type="float" office:value="27.229387755102" calcext:value-type="float">
            <text:p>27.229387755102</text:p>
          </table:table-cell>
          <table:table-cell table:formula="of:=AVERAGE([.B358:.B456])" office:value-type="float" office:value="26.9809090909091" calcext:value-type="float">
            <text:p>26.9809090909091</text:p>
          </table:table-cell>
        </table:table-row>
        <table:table-row table:style-name="ro1">
          <table:table-cell office:value-type="date" office:date-value="2025-09-03" calcext:value-type="date">
            <text:p>2025-09-03</text:p>
          </table:table-cell>
          <table:table-cell office:value-type="float" office:value="27.6" calcext:value-type="float">
            <text:p>27.6</text:p>
          </table:table-cell>
          <table:table-cell office:value-type="float" office:value="19873325" calcext:value-type="float">
            <text:p>19873325</text:p>
          </table:table-cell>
          <table:table-cell table:formula="of:=AVERAGE([.B409:.B457])" office:value-type="float" office:value="27.2491836734694" calcext:value-type="float">
            <text:p>27.2491836734694</text:p>
          </table:table-cell>
          <table:table-cell table:formula="of:=AVERAGE([.B359:.B457])" office:value-type="float" office:value="27.0006060606061" calcext:value-type="float">
            <text:p>27.0006060606061</text:p>
          </table:table-cell>
        </table:table-row>
        <table:table-row table:style-name="ro1">
          <table:table-cell office:value-type="date" office:date-value="2025-09-04" calcext:value-type="date">
            <text:p>2025-09-04</text:p>
          </table:table-cell>
          <table:table-cell office:value-type="float" office:value="27.69" calcext:value-type="float">
            <text:p>27.69</text:p>
          </table:table-cell>
          <table:table-cell office:value-type="float" office:value="13419731" calcext:value-type="float">
            <text:p>13419731</text:p>
          </table:table-cell>
          <table:table-cell table:formula="of:=AVERAGE([.B410:.B458])" office:value-type="float" office:value="27.2628571428571" calcext:value-type="float">
            <text:p>27.2628571428571</text:p>
          </table:table-cell>
          <table:table-cell table:formula="of:=AVERAGE([.B360:.B458])" office:value-type="float" office:value="27.0140404040404" calcext:value-type="float">
            <text:p>27.0140404040404</text:p>
          </table:table-cell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float" office:value="27.64" calcext:value-type="float">
            <text:p>27.64</text:p>
          </table:table-cell>
          <table:table-cell office:value-type="float" office:value="15327793" calcext:value-type="float">
            <text:p>15327793</text:p>
          </table:table-cell>
          <table:table-cell table:formula="of:=AVERAGE([.B411:.B459])" office:value-type="float" office:value="27.2740816326531" calcext:value-type="float">
            <text:p>27.2740816326531</text:p>
          </table:table-cell>
          <table:table-cell table:formula="of:=AVERAGE([.B361:.B459])" office:value-type="float" office:value="27.0307070707071" calcext:value-type="float">
            <text:p>27.0307070707071</text:p>
          </table:table-cell>
        </table:table-row>
        <table:table-row table:style-name="ro1">
          <table:table-cell office:value-type="date" office:date-value="2025-09-06" calcext:value-type="date">
            <text:p>2025-09-06</text:p>
          </table:table-cell>
          <table:table-cell office:value-type="float" office:value="27.64" calcext:value-type="float">
            <text:p>27.64</text:p>
          </table:table-cell>
          <table:table-cell office:value-type="float" office:value="15327793" calcext:value-type="float">
            <text:p>15327793</text:p>
          </table:table-cell>
          <table:table-cell table:formula="of:=AVERAGE([.B412:.B460])" office:value-type="float" office:value="27.2867346938776" calcext:value-type="float">
            <text:p>27.2867346938776</text:p>
          </table:table-cell>
          <table:table-cell table:formula="of:=AVERAGE([.B362:.B460])" office:value-type="float" office:value="27.0453535353535" calcext:value-type="float">
            <text:p>27.0453535353535</text:p>
          </table:table-cell>
        </table:table-row>
        <table:table-row table:style-name="ro1">
          <table:table-cell office:value-type="date" office:date-value="2025-09-07" calcext:value-type="date">
            <text:p>2025-09-07</text:p>
          </table:table-cell>
          <table:table-cell office:value-type="float" office:value="27.64" calcext:value-type="float">
            <text:p>27.64</text:p>
          </table:table-cell>
          <table:table-cell office:value-type="float" office:value="15327793" calcext:value-type="float">
            <text:p>15327793</text:p>
          </table:table-cell>
          <table:table-cell table:formula="of:=AVERAGE([.B413:.B461])" office:value-type="float" office:value="27.299387755102" calcext:value-type="float">
            <text:p>27.299387755102</text:p>
          </table:table-cell>
          <table:table-cell table:formula="of:=AVERAGE([.B363:.B461])" office:value-type="float" office:value="27.060202020202" calcext:value-type="float">
            <text:p>27.060202020202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27.44" calcext:value-type="float">
            <text:p>27.44</text:p>
          </table:table-cell>
          <table:table-cell office:value-type="float" office:value="18249743" calcext:value-type="float">
            <text:p>18249743</text:p>
          </table:table-cell>
          <table:table-cell table:formula="of:=AVERAGE([.B414:.B462])" office:value-type="float" office:value="27.3120408163265" calcext:value-type="float">
            <text:p>27.3120408163265</text:p>
          </table:table-cell>
          <table:table-cell table:formula="of:=AVERAGE([.B364:.B462])" office:value-type="float" office:value="27.0750505050505" calcext:value-type="float">
            <text:p>27.0750505050505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7.45" calcext:value-type="float">
            <text:p>27.45</text:p>
          </table:table-cell>
          <table:table-cell office:value-type="float" office:value="18576609" calcext:value-type="float">
            <text:p>18576609</text:p>
          </table:table-cell>
          <table:table-cell table:formula="of:=AVERAGE([.B415:.B463])" office:value-type="float" office:value="27.3220408163265" calcext:value-type="float">
            <text:p>27.3220408163265</text:p>
          </table:table-cell>
          <table:table-cell table:formula="of:=AVERAGE([.B365:.B463])" office:value-type="float" office:value="27.0878787878788" calcext:value-type="float">
            <text:p>27.0878787878788</text:p>
          </table:table-cell>
        </table:table-row>
        <table:table-row table:style-name="ro1">
          <table:table-cell office:value-type="date" office:date-value="2025-09-10" calcext:value-type="date">
            <text:p>2025-09-10</text:p>
          </table:table-cell>
          <table:table-cell office:value-type="float" office:value="27.5" calcext:value-type="float">
            <text:p>27.5</text:p>
          </table:table-cell>
          <table:table-cell office:value-type="float" office:value="16572077" calcext:value-type="float">
            <text:p>16572077</text:p>
          </table:table-cell>
          <table:table-cell table:formula="of:=AVERAGE([.B416:.B464])" office:value-type="float" office:value="27.3263265306122" calcext:value-type="float">
            <text:p>27.3263265306122</text:p>
          </table:table-cell>
          <table:table-cell table:formula="of:=AVERAGE([.B366:.B464])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7.72" calcext:value-type="float">
            <text:p>27.72</text:p>
          </table:table-cell>
          <table:table-cell office:value-type="float" office:value="13521539" calcext:value-type="float">
            <text:p>13521539</text:p>
          </table:table-cell>
          <table:table-cell table:formula="of:=AVERAGE([.B417:.B465])" office:value-type="float" office:value="27.3287755102041" calcext:value-type="float">
            <text:p>27.3287755102041</text:p>
          </table:table-cell>
          <table:table-cell table:formula="of:=AVERAGE([.B367:.B465])" office:value-type="float" office:value="27.1107070707071" calcext:value-type="float">
            <text:p>27.1107070707071</text:p>
          </table:table-cell>
        </table:table-row>
        <table:table-row table:style-name="ro1">
          <table:table-cell office:value-type="date" office:date-value="2025-09-12" calcext:value-type="date">
            <text:p>2025-09-12</text:p>
          </table:table-cell>
          <table:table-cell office:value-type="float" office:value="27.48" calcext:value-type="float">
            <text:p>27.48</text:p>
          </table:table-cell>
          <table:table-cell office:value-type="float" office:value="14967602" calcext:value-type="float">
            <text:p>14967602</text:p>
          </table:table-cell>
          <table:table-cell table:formula="of:=AVERAGE([.B418:.B466])" office:value-type="float" office:value="27.3377551020408" calcext:value-type="float">
            <text:p>27.3377551020408</text:p>
          </table:table-cell>
          <table:table-cell table:formula="of:=AVERAGE([.B368:.B466])" office:value-type="float" office:value="27.1251515151515" calcext:value-type="float">
            <text:p>27.1251515151515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7.48" calcext:value-type="float">
            <text:p>27.48</text:p>
          </table:table-cell>
          <table:table-cell office:value-type="float" office:value="14967602" calcext:value-type="float">
            <text:p>14967602</text:p>
          </table:table-cell>
          <table:table-cell table:formula="of:=AVERAGE([.B419:.B467])" office:value-type="float" office:value="27.3410204081633" calcext:value-type="float">
            <text:p>27.3410204081633</text:p>
          </table:table-cell>
          <table:table-cell table:formula="of:=AVERAGE([.B369:.B467])" office:value-type="float" office:value="27.1377777777778" calcext:value-type="float">
            <text:p>27.1377777777778</text:p>
          </table:table-cell>
        </table:table-row>
        <table:table-row table:style-name="ro1">
          <table:table-cell office:value-type="date" office:date-value="2025-09-14" calcext:value-type="date">
            <text:p>2025-09-14</text:p>
          </table:table-cell>
          <table:table-cell office:value-type="float" office:value="27.48" calcext:value-type="float">
            <text:p>27.48</text:p>
          </table:table-cell>
          <table:table-cell office:value-type="float" office:value="14967602" calcext:value-type="float">
            <text:p>14967602</text:p>
          </table:table-cell>
          <table:table-cell table:formula="of:=AVERAGE([.B420:.B468])" office:value-type="float" office:value="27.3442857142857" calcext:value-type="float">
            <text:p>27.3442857142857</text:p>
          </table:table-cell>
          <table:table-cell table:formula="of:=AVERAGE([.B370:.B468])" office:value-type="float" office:value="27.1472727272727" calcext:value-type="float">
            <text:p>27.1472727272727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27.34" calcext:value-type="float">
            <text:p>27.34</text:p>
          </table:table-cell>
          <table:table-cell office:value-type="float" office:value="18547616" calcext:value-type="float">
            <text:p>18547616</text:p>
          </table:table-cell>
          <table:table-cell table:formula="of:=AVERAGE([.B421:.B469])" office:value-type="float" office:value="27.3475510204082" calcext:value-type="float">
            <text:p>27.3475510204082</text:p>
          </table:table-cell>
          <table:table-cell table:formula="of:=AVERAGE([.B371:.B469])" office:value-type="float" office:value="27.1567676767677" calcext:value-type="float">
            <text:p>27.1567676767677</text:p>
          </table:table-cell>
        </table:table-row>
        <table:table-row table:style-name="ro1">
          <table:table-cell office:value-type="date" office:date-value="2025-09-16" calcext:value-type="date">
            <text:p>2025-09-16</text:p>
          </table:table-cell>
          <table:table-cell office:value-type="float" office:value="27.42" calcext:value-type="float">
            <text:p>27.42</text:p>
          </table:table-cell>
          <table:table-cell office:value-type="float" office:value="19907661" calcext:value-type="float">
            <text:p>19907661</text:p>
          </table:table-cell>
          <table:table-cell table:formula="of:=AVERAGE([.B422:.B470])" office:value-type="float" office:value="27.3504081632653" calcext:value-type="float">
            <text:p>27.3504081632653</text:p>
          </table:table-cell>
          <table:table-cell table:formula="of:=AVERAGE([.B372:.B470])" office:value-type="float" office:value="27.1648484848485" calcext:value-type="float">
            <text:p>27.1648484848485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7.47" calcext:value-type="float">
            <text:p>27.47</text:p>
          </table:table-cell>
          <table:table-cell office:value-type="float" office:value="21748082" calcext:value-type="float">
            <text:p>21748082</text:p>
          </table:table-cell>
          <table:table-cell table:formula="of:=AVERAGE([.B423:.B471])" office:value-type="float" office:value="27.3555102040816" calcext:value-type="float">
            <text:p>27.3555102040816</text:p>
          </table:table-cell>
          <table:table-cell table:formula="of:=AVERAGE([.B373:.B471])" office:value-type="float" office:value="27.1726262626263" calcext:value-type="float">
            <text:p>27.1726262626263</text:p>
          </table:table-cell>
        </table:table-row>
        <table:table-row table:style-name="ro1">
          <table:table-cell office:value-type="date" office:date-value="2025-09-18" calcext:value-type="date">
            <text:p>2025-09-18</text:p>
          </table:table-cell>
          <table:table-cell office:value-type="float" office:value="27.45" calcext:value-type="float">
            <text:p>27.45</text:p>
          </table:table-cell>
          <table:table-cell office:value-type="float" office:value="17238342" calcext:value-type="float">
            <text:p>17238342</text:p>
          </table:table-cell>
          <table:table-cell table:formula="of:=AVERAGE([.B424:.B472])" office:value-type="float" office:value="27.3683673469388" calcext:value-type="float">
            <text:p>27.3683673469388</text:p>
          </table:table-cell>
          <table:table-cell table:formula="of:=AVERAGE([.B374:.B472])" office:value-type="float" office:value="27.1778787878788" calcext:value-type="float">
            <text:p>27.1778787878788</text:p>
          </table:table-cell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float" office:value="27.33" calcext:value-type="float">
            <text:p>27.33</text:p>
          </table:table-cell>
          <table:table-cell office:value-type="float" office:value="17610922" calcext:value-type="float">
            <text:p>17610922</text:p>
          </table:table-cell>
          <table:table-cell table:formula="of:=AVERAGE([.B425:.B473])" office:value-type="float" office:value="27.3877551020408" calcext:value-type="float">
            <text:p>27.3877551020408</text:p>
          </table:table-cell>
          <table:table-cell table:formula="of:=AVERAGE([.B375:.B473])" office:value-type="float" office:value="27.1838383838384" calcext:value-type="float">
            <text:p>27.1838383838384</text:p>
          </table:table-cell>
        </table:table-row>
        <table:table-row table:style-name="ro1">
          <table:table-cell office:value-type="date" office:date-value="2025-09-20" calcext:value-type="date">
            <text:p>2025-09-20</text:p>
          </table:table-cell>
          <table:table-cell office:value-type="float" office:value="27.33" calcext:value-type="float">
            <text:p>27.33</text:p>
          </table:table-cell>
          <table:table-cell office:value-type="float" office:value="17610922" calcext:value-type="float">
            <text:p>17610922</text:p>
          </table:table-cell>
          <table:table-cell table:formula="of:=AVERAGE([.B426:.B474])" office:value-type="float" office:value="27.4071428571429" calcext:value-type="float">
            <text:p>27.4071428571429</text:p>
          </table:table-cell>
          <table:table-cell table:formula="of:=AVERAGE([.B376:.B474])" office:value-type="float" office:value="27.1869696969697" calcext:value-type="float">
            <text:p>27.1869696969697</text:p>
          </table:table-cell>
        </table:table-row>
        <table:table-row table:style-name="ro1">
          <table:table-cell office:value-type="date" office:date-value="2025-09-21" calcext:value-type="date">
            <text:p>2025-09-21</text:p>
          </table:table-cell>
          <table:table-cell office:value-type="float" office:value="27.33" calcext:value-type="float">
            <text:p>27.33</text:p>
          </table:table-cell>
          <table:table-cell office:value-type="float" office:value="17610922" calcext:value-type="float">
            <text:p>17610922</text:p>
          </table:table-cell>
          <table:table-cell table:formula="of:=AVERAGE([.B427:.B475])" office:value-type="float" office:value="27.4265306122449" calcext:value-type="float">
            <text:p>27.4265306122449</text:p>
          </table:table-cell>
          <table:table-cell table:formula="of:=AVERAGE([.B377:.B475])" office:value-type="float" office:value="27.1913131313131" calcext:value-type="float">
            <text:p>27.1913131313131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27.25" calcext:value-type="float">
            <text:p>27.25</text:p>
          </table:table-cell>
          <table:table-cell office:value-type="float" office:value="17463722" calcext:value-type="float">
            <text:p>17463722</text:p>
          </table:table-cell>
          <table:table-cell table:formula="of:=AVERAGE([.B428:.B476])" office:value-type="float" office:value="27.4459183673469" calcext:value-type="float">
            <text:p>27.4459183673469</text:p>
          </table:table-cell>
          <table:table-cell table:formula="of:=AVERAGE([.B378:.B476])" office:value-type="float" office:value="27.1956565656566" calcext:value-type="float">
            <text:p>27.1956565656566</text:p>
          </table:table-cell>
        </table:table-row>
        <table:table-row table:style-name="ro1">
          <table:table-cell office:value-type="date" office:date-value="2025-09-23" calcext:value-type="date">
            <text:p>2025-09-23</text:p>
          </table:table-cell>
          <table:table-cell office:value-type="float" office:value="27.4" calcext:value-type="float">
            <text:p>27.4</text:p>
          </table:table-cell>
          <table:table-cell office:value-type="float" office:value="16862882" calcext:value-type="float">
            <text:p>16862882</text:p>
          </table:table-cell>
          <table:table-cell table:formula="of:=AVERAGE([.B429:.B477])" office:value-type="float" office:value="27.4589795918367" calcext:value-type="float">
            <text:p>27.4589795918367</text:p>
          </table:table-cell>
          <table:table-cell table:formula="of:=AVERAGE([.B379:.B477])" office:value-type="float" office:value="27.1991919191919" calcext:value-type="float">
            <text:p>27.1991919191919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float" office:value="27.16" calcext:value-type="float">
            <text:p>27.16</text:p>
          </table:table-cell>
          <table:table-cell office:value-type="float" office:value="19469327" calcext:value-type="float">
            <text:p>19469327</text:p>
          </table:table-cell>
          <table:table-cell table:formula="of:=AVERAGE([.B430:.B478])" office:value-type="float" office:value="27.4724489795918" calcext:value-type="float">
            <text:p>27.4724489795918</text:p>
          </table:table-cell>
          <table:table-cell table:formula="of:=AVERAGE([.B380:.B478])" office:value-type="float" office:value="27.2040404040404" calcext:value-type="float">
            <text:p>27.2040404040404</text:p>
          </table:table-cell>
        </table:table-row>
        <table:table-row table:style-name="ro1">
          <table:table-cell office:value-type="date" office:date-value="2025-09-25" calcext:value-type="date">
            <text:p>2025-09-25</text:p>
          </table:table-cell>
          <table:table-cell office:value-type="float" office:value="26.99" calcext:value-type="float">
            <text:p>26.99</text:p>
          </table:table-cell>
          <table:table-cell office:value-type="float" office:value="20335234" calcext:value-type="float">
            <text:p>20335234</text:p>
          </table:table-cell>
          <table:table-cell table:formula="of:=AVERAGE([.B431:.B479])" office:value-type="float" office:value="27.4822448979592" calcext:value-type="float">
            <text:p>27.4822448979592</text:p>
          </table:table-cell>
          <table:table-cell table:formula="of:=AVERAGE([.B381:.B479])" office:value-type="float" office:value="27.2084848484848" calcext:value-type="float">
            <text:p>27.2084848484848</text:p>
          </table:table-cell>
        </table:table-row>
        <table:table-row table:style-name="ro1">
          <table:table-cell office:value-type="date" office:date-value="2025-09-26" calcext:value-type="date">
            <text:p>2025-09-26</text:p>
          </table:table-cell>
          <table:table-cell office:value-type="float" office:value="27.21" calcext:value-type="float">
            <text:p>27.21</text:p>
          </table:table-cell>
          <table:table-cell office:value-type="float" office:value="16482810" calcext:value-type="float">
            <text:p>16482810</text:p>
          </table:table-cell>
          <table:table-cell table:formula="of:=AVERAGE([.B432:.B480])" office:value-type="float" office:value="27.4871428571429" calcext:value-type="float">
            <text:p>27.4871428571429</text:p>
          </table:table-cell>
          <table:table-cell table:formula="of:=AVERAGE([.B382:.B480])" office:value-type="float" office:value="27.2120202020202" calcext:value-type="float">
            <text:p>27.2120202020202</text:p>
          </table:table-cell>
        </table:table-row>
        <table:table-row table:style-name="ro1">
          <table:table-cell office:value-type="date" office:date-value="2025-09-27" calcext:value-type="date">
            <text:p>2025-09-27</text:p>
          </table:table-cell>
          <table:table-cell office:value-type="float" office:value="27.21" calcext:value-type="float">
            <text:p>27.21</text:p>
          </table:table-cell>
          <table:table-cell office:value-type="float" office:value="16482810" calcext:value-type="float">
            <text:p>16482810</text:p>
          </table:table-cell>
          <table:table-cell table:formula="of:=AVERAGE([.B433:.B481])" office:value-type="float" office:value="27.4938775510204" calcext:value-type="float">
            <text:p>27.4938775510204</text:p>
          </table:table-cell>
          <table:table-cell table:formula="of:=AVERAGE([.B383:.B481])" office:value-type="float" office:value="27.2177777777778" calcext:value-type="float">
            <text:p>27.2177777777778</text:p>
          </table:table-cell>
        </table:table-row>
        <table:table-row table:style-name="ro1">
          <table:table-cell office:value-type="date" office:date-value="2025-09-28" calcext:value-type="date">
            <text:p>2025-09-28</text:p>
          </table:table-cell>
          <table:table-cell office:value-type="float" office:value="27.21" calcext:value-type="float">
            <text:p>27.21</text:p>
          </table:table-cell>
          <table:table-cell office:value-type="float" office:value="16482810" calcext:value-type="float">
            <text:p>16482810</text:p>
          </table:table-cell>
          <table:table-cell table:formula="of:=AVERAGE([.B434:.B482])" office:value-type="float" office:value="27.500612244898" calcext:value-type="float">
            <text:p>27.500612244898</text:p>
          </table:table-cell>
          <table:table-cell table:formula="of:=AVERAGE([.B384:.B482])" office:value-type="float" office:value="27.2229292929293" calcext:value-type="float">
            <text:p>27.2229292929293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27.1" calcext:value-type="float">
            <text:p>27.1</text:p>
          </table:table-cell>
          <table:table-cell office:value-type="float" office:value="25833146" calcext:value-type="float">
            <text:p>25833146</text:p>
          </table:table-cell>
          <table:table-cell table:formula="of:=AVERAGE([.B435:.B483])" office:value-type="float" office:value="27.5073469387755" calcext:value-type="float">
            <text:p>27.5073469387755</text:p>
          </table:table-cell>
          <table:table-cell table:formula="of:=AVERAGE([.B385:.B483])" office:value-type="float" office:value="27.2280808080808" calcext:value-type="float">
            <text:p>27.2280808080808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float" office:value="27.3" calcext:value-type="float">
            <text:p>27.3</text:p>
          </table:table-cell>
          <table:table-cell office:value-type="float" office:value="18115055" calcext:value-type="float">
            <text:p>18115055</text:p>
          </table:table-cell>
          <table:table-cell table:formula="of:=AVERAGE([.B436:.B484])" office:value-type="float" office:value="27.5136734693878" calcext:value-type="float">
            <text:p>27.5136734693878</text:p>
          </table:table-cell>
          <table:table-cell table:formula="of:=AVERAGE([.B386:.B484])" office:value-type="float" office:value="27.2321212121212" calcext:value-type="float">
            <text:p>27.232121212121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27.53" calcext:value-type="float">
            <text:p>27.53</text:p>
          </table:table-cell>
          <table:table-cell office:value-type="float" office:value="18618067" calcext:value-type="float">
            <text:p>18618067</text:p>
          </table:table-cell>
          <table:table-cell table:formula="of:=AVERAGE([.B437:.B485])" office:value-type="float" office:value="27.5177551020408" calcext:value-type="float">
            <text:p>27.5177551020408</text:p>
          </table:table-cell>
          <table:table-cell table:formula="of:=AVERAGE([.B387:.B485])" office:value-type="float" office:value="27.2381818181818" calcext:value-type="float">
            <text:p>27.2381818181818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float" office:value="27.34" calcext:value-type="float">
            <text:p>27.34</text:p>
          </table:table-cell>
          <table:table-cell office:value-type="float" office:value="15690743" calcext:value-type="float">
            <text:p>15690743</text:p>
          </table:table-cell>
          <table:table-cell table:formula="of:=AVERAGE([.B438:.B486])" office:value-type="float" office:value="27.5191836734694" calcext:value-type="float">
            <text:p>27.5191836734694</text:p>
          </table:table-cell>
          <table:table-cell table:formula="of:=AVERAGE([.B388:.B486])" office:value-type="float" office:value="27.2461616161616" calcext:value-type="float">
            <text:p>27.2461616161616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float" office:value="27.41" calcext:value-type="float">
            <text:p>27.41</text:p>
          </table:table-cell>
          <table:table-cell office:value-type="float" office:value="15309529" calcext:value-type="float">
            <text:p>15309529</text:p>
          </table:table-cell>
          <table:table-cell table:formula="of:=AVERAGE([.B439:.B487])" office:value-type="float" office:value="27.5191836734694" calcext:value-type="float">
            <text:p>27.5191836734694</text:p>
          </table:table-cell>
          <table:table-cell table:formula="of:=AVERAGE([.B389:.B487])" office:value-type="float" office:value="27.2576767676768" calcext:value-type="float">
            <text:p>27.2576767676768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float" office:value="27.41" calcext:value-type="float">
            <text:p>27.41</text:p>
          </table:table-cell>
          <table:table-cell office:value-type="float" office:value="15309529" calcext:value-type="float">
            <text:p>15309529</text:p>
          </table:table-cell>
          <table:table-cell table:formula="of:=AVERAGE([.B440:.B488])" office:value-type="float" office:value="27.5208163265306" calcext:value-type="float">
            <text:p>27.5208163265306</text:p>
          </table:table-cell>
          <table:table-cell table:formula="of:=AVERAGE([.B390:.B488])" office:value-type="float" office:value="27.2679797979798" calcext:value-type="float">
            <text:p>27.2679797979798</text:p>
          </table:table-cell>
        </table:table-row>
        <table:table-row table:style-name="ro1">
          <table:table-cell office:value-type="date" office:date-value="2025-10-05" calcext:value-type="date">
            <text:p>2025-10-05</text:p>
          </table:table-cell>
          <table:table-cell office:value-type="float" office:value="27.41" calcext:value-type="float">
            <text:p>27.41</text:p>
          </table:table-cell>
          <table:table-cell office:value-type="float" office:value="15309529" calcext:value-type="float">
            <text:p>15309529</text:p>
          </table:table-cell>
          <table:table-cell table:formula="of:=AVERAGE([.B441:.B489])" office:value-type="float" office:value="27.5224489795918" calcext:value-type="float">
            <text:p>27.5224489795918</text:p>
          </table:table-cell>
          <table:table-cell table:formula="of:=AVERAGE([.B391:.B489])" office:value-type="float" office:value="27.2782828282828" calcext:value-type="float">
            <text:p>27.2782828282828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27.34" calcext:value-type="float">
            <text:p>27.34</text:p>
          </table:table-cell>
          <table:table-cell office:value-type="float" office:value="16315073" calcext:value-type="float">
            <text:p>16315073</text:p>
          </table:table-cell>
          <table:table-cell table:formula="of:=AVERAGE([.B442:.B490])" office:value-type="float" office:value="27.5240816326531" calcext:value-type="float">
            <text:p>27.5240816326531</text:p>
          </table:table-cell>
          <table:table-cell table:formula="of:=AVERAGE([.B392:.B490])" office:value-type="float" office:value="27.2885858585859" calcext:value-type="float">
            <text:p>27.288585858585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float" office:value="27.28" calcext:value-type="float">
            <text:p>27.28</text:p>
          </table:table-cell>
          <table:table-cell office:value-type="float" office:value="17220222" calcext:value-type="float">
            <text:p>17220222</text:p>
          </table:table-cell>
          <table:table-cell table:formula="of:=AVERAGE([.B443:.B491])" office:value-type="float" office:value="27.5257142857143" calcext:value-type="float">
            <text:p>27.5257142857143</text:p>
          </table:table-cell>
          <table:table-cell table:formula="of:=AVERAGE([.B393:.B491])" office:value-type="float" office:value="27.2981818181818" calcext:value-type="float">
            <text:p>27.2981818181818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float" office:value="27.18" calcext:value-type="float">
            <text:p>27.18</text:p>
          </table:table-cell>
          <table:table-cell office:value-type="float" office:value="15899846" calcext:value-type="float">
            <text:p>15899846</text:p>
          </table:table-cell>
          <table:table-cell table:formula="of:=AVERAGE([.B444:.B492])" office:value-type="float" office:value="27.5222448979592" calcext:value-type="float">
            <text:p>27.5222448979592</text:p>
          </table:table-cell>
          <table:table-cell table:formula="of:=AVERAGE([.B394:.B492])" office:value-type="float" office:value="27.3060606060606" calcext:value-type="float">
            <text:p>27.3060606060606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float" office:value="27" calcext:value-type="float">
            <text:p>27</text:p>
          </table:table-cell>
          <table:table-cell office:value-type="float" office:value="19054271" calcext:value-type="float">
            <text:p>19054271</text:p>
          </table:table-cell>
          <table:table-cell table:formula="of:=AVERAGE([.B445:.B493])" office:value-type="float" office:value="27.5155102040816" calcext:value-type="float">
            <text:p>27.5155102040816</text:p>
          </table:table-cell>
          <table:table-cell table:formula="of:=AVERAGE([.B395:.B493])" office:value-type="float" office:value="27.3073737373737" calcext:value-type="float">
            <text:p>27.307373737373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float" office:value="26.54" calcext:value-type="float">
            <text:p>26.54</text:p>
          </table:table-cell>
          <table:table-cell office:value-type="float" office:value="24258335" calcext:value-type="float">
            <text:p>24258335</text:p>
          </table:table-cell>
          <table:table-cell table:formula="of:=AVERAGE([.B446:.B494])" office:value-type="float" office:value="27.5048979591837" calcext:value-type="float">
            <text:p>27.5048979591837</text:p>
          </table:table-cell>
          <table:table-cell table:formula="of:=AVERAGE([.B396:.B494])" office:value-type="float" office:value="27.3042424242424" calcext:value-type="float">
            <text:p>27.3042424242424</text:p>
          </table:table-cell>
        </table:table-row>
        <table:table-row table:style-name="ro1">
          <table:table-cell office:value-type="date" office:date-value="2025-10-11" calcext:value-type="date">
            <text:p>2025-10-11</text:p>
          </table:table-cell>
          <table:table-cell office:value-type="float" office:value="26.54" calcext:value-type="float">
            <text:p>26.54</text:p>
          </table:table-cell>
          <table:table-cell office:value-type="float" office:value="24258335" calcext:value-type="float">
            <text:p>24258335</text:p>
          </table:table-cell>
          <table:table-cell table:formula="of:=AVERAGE([.B447:.B495])" office:value-type="float" office:value="27.4761224489796" calcext:value-type="float">
            <text:p>27.4761224489796</text:p>
          </table:table-cell>
          <table:table-cell table:formula="of:=AVERAGE([.B397:.B495])" office:value-type="float" office:value="27.2960606060606" calcext:value-type="float">
            <text:p>27.2960606060606</text:p>
          </table:table-cell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float" office:value="26.54" calcext:value-type="float">
            <text:p>26.54</text:p>
          </table:table-cell>
          <table:table-cell office:value-type="float" office:value="24258335" calcext:value-type="float">
            <text:p>24258335</text:p>
          </table:table-cell>
          <table:table-cell table:formula="of:=AVERAGE([.B448:.B496])" office:value-type="float" office:value="27.4473469387755" calcext:value-type="float">
            <text:p>27.4473469387755</text:p>
          </table:table-cell>
          <table:table-cell table:formula="of:=AVERAGE([.B398:.B496])" office:value-type="float" office:value="27.2878787878788" calcext:value-type="float">
            <text:p>27.2878787878788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26.63" calcext:value-type="float">
            <text:p>26.63</text:p>
          </table:table-cell>
          <table:table-cell office:value-type="float" office:value="20634887" calcext:value-type="float">
            <text:p>20634887</text:p>
          </table:table-cell>
          <table:table-cell table:formula="of:=AVERAGE([.B449:.B497])" office:value-type="float" office:value="27.4185714285714" calcext:value-type="float">
            <text:p>27.4185714285714</text:p>
          </table:table-cell>
          <table:table-cell table:formula="of:=AVERAGE([.B399:.B497])" office:value-type="float" office:value="27.279696969697" calcext:value-type="float">
            <text:p>27.279696969697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float" office:value="26.87" calcext:value-type="float">
            <text:p>26.87</text:p>
          </table:table-cell>
          <table:table-cell office:value-type="float" office:value="18735117" calcext:value-type="float">
            <text:p>18735117</text:p>
          </table:table-cell>
          <table:table-cell table:formula="of:=AVERAGE([.B450:.B498])" office:value-type="float" office:value="27.395306122449" calcext:value-type="float">
            <text:p>27.395306122449</text:p>
          </table:table-cell>
          <table:table-cell table:formula="of:=AVERAGE([.B400:.B498])" office:value-type="float" office:value="27.2724242424242" calcext:value-type="float">
            <text:p>27.2724242424242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float" office:value="26.78" calcext:value-type="float">
            <text:p>26.78</text:p>
          </table:table-cell>
          <table:table-cell office:value-type="float" office:value="15036861" calcext:value-type="float">
            <text:p>15036861</text:p>
          </table:table-cell>
          <table:table-cell table:formula="of:=AVERAGE([.B451:.B499])" office:value-type="float" office:value="27.3773469387755" calcext:value-type="float">
            <text:p>27.3773469387755</text:p>
          </table:table-cell>
          <table:table-cell table:formula="of:=AVERAGE([.B401:.B499])" office:value-type="float" office:value="27.2705050505051" calcext:value-type="float">
            <text:p>27.2705050505051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float" office:value="26.57" calcext:value-type="float">
            <text:p>26.57</text:p>
          </table:table-cell>
          <table:table-cell office:value-type="float" office:value="18983235" calcext:value-type="float">
            <text:p>18983235</text:p>
          </table:table-cell>
          <table:table-cell table:formula="of:=AVERAGE([.B452:.B500])" office:value-type="float" office:value="27.3551020408163" calcext:value-type="float">
            <text:p>27.3551020408163</text:p>
          </table:table-cell>
          <table:table-cell table:formula="of:=AVERAGE([.B402:.B500])" office:value-type="float" office:value="27.2650505050505" calcext:value-type="float">
            <text:p>27.2650505050505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float" office:value="26.79" calcext:value-type="float">
            <text:p>26.79</text:p>
          </table:table-cell>
          <table:table-cell office:value-type="float" office:value="14043826" calcext:value-type="float">
            <text:p>14043826</text:p>
          </table:table-cell>
          <table:table-cell table:formula="of:=AVERAGE([.B453:.B501])" office:value-type="float" office:value="27.3295918367347" calcext:value-type="float">
            <text:p>27.3295918367347</text:p>
          </table:table-cell>
          <table:table-cell table:formula="of:=AVERAGE([.B403:.B501])" office:value-type="float" office:value="27.2577777777778" calcext:value-type="float">
            <text:p>27.2577777777778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float" office:value="26.79" calcext:value-type="float">
            <text:p>26.79</text:p>
          </table:table-cell>
          <table:table-cell office:value-type="float" office:value="14043826" calcext:value-type="float">
            <text:p>14043826</text:p>
          </table:table-cell>
          <table:table-cell table:formula="of:=AVERAGE([.B454:.B502])" office:value-type="float" office:value="27.3065306122449" calcext:value-type="float">
            <text:p>27.3065306122449</text:p>
          </table:table-cell>
          <table:table-cell table:formula="of:=AVERAGE([.B404:.B502])" office:value-type="float" office:value="27.2505050505051" calcext:value-type="float">
            <text:p>27.250505050505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float" office:value="26.79" calcext:value-type="float">
            <text:p>26.79</text:p>
          </table:table-cell>
          <table:table-cell office:value-type="float" office:value="14043826" calcext:value-type="float">
            <text:p>14043826</text:p>
          </table:table-cell>
          <table:table-cell table:formula="of:=AVERAGE([.B455:.B503])" office:value-type="float" office:value="27.2834693877551" calcext:value-type="float">
            <text:p>27.2834693877551</text:p>
          </table:table-cell>
          <table:table-cell table:formula="of:=AVERAGE([.B405:.B503])" office:value-type="float" office:value="27.2450505050505" calcext:value-type="float">
            <text:p>27.245050505050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26.99" calcext:value-type="float">
            <text:p>26.99</text:p>
          </table:table-cell>
          <table:table-cell office:value-type="float" office:value="13374267" calcext:value-type="float">
            <text:p>13374267</text:p>
          </table:table-cell>
          <table:table-cell table:formula="of:=AVERAGE([.B456:.B504])" office:value-type="float" office:value="27.2604081632653" calcext:value-type="float">
            <text:p>27.2604081632653</text:p>
          </table:table-cell>
          <table:table-cell table:formula="of:=AVERAGE([.B406:.B504])" office:value-type="float" office:value="27.239595959596" calcext:value-type="float">
            <text:p>27.239595959596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float" office:value="27.07" calcext:value-type="float">
            <text:p>27.07</text:p>
          </table:table-cell>
          <table:table-cell office:value-type="float" office:value="14782547" calcext:value-type="float">
            <text:p>14782547</text:p>
          </table:table-cell>
          <table:table-cell table:formula="of:=AVERAGE([.B457:.B505])" office:value-type="float" office:value="27.2414285714286" calcext:value-type="float">
            <text:p>27.2414285714286</text:p>
          </table:table-cell>
          <table:table-cell table:formula="of:=AVERAGE([.B407:.B505])" office:value-type="float" office:value="27.2361616161616" calcext:value-type="float">
            <text:p>27.2361616161616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float" office:value="26.99" calcext:value-type="float">
            <text:p>26.99</text:p>
          </table:table-cell>
          <table:table-cell office:value-type="float" office:value="13644799" calcext:value-type="float">
            <text:p>13644799</text:p>
          </table:table-cell>
          <table:table-cell table:formula="of:=AVERAGE([.B458:.B506])" office:value-type="float" office:value="27.2257142857143" calcext:value-type="float">
            <text:p>27.2257142857143</text:p>
          </table:table-cell>
          <table:table-cell table:formula="of:=AVERAGE([.B408:.B506])" office:value-type="float" office:value="27.2337373737374" calcext:value-type="float">
            <text:p>27.2337373737374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float" office:value="27.03" calcext:value-type="float">
            <text:p>27.03</text:p>
          </table:table-cell>
          <table:table-cell office:value-type="float" office:value="13653788" calcext:value-type="float">
            <text:p>13653788</text:p>
          </table:table-cell>
          <table:table-cell table:formula="of:=AVERAGE([.B459:.B507])" office:value-type="float" office:value="27.2132653061225" calcext:value-type="float">
            <text:p>27.2132653061225</text:p>
          </table:table-cell>
          <table:table-cell table:formula="of:=AVERAGE([.B409:.B507])" office:value-type="float" office:value="27.2349494949495" calcext:value-type="float">
            <text:p>27.2349494949495</text:p>
          </table:table-cell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float" office:value="27.03" calcext:value-type="float">
            <text:p>27.03</text:p>
          </table:table-cell>
          <table:table-cell office:value-type="float" office:value="14054950" calcext:value-type="float">
            <text:p>14054950</text:p>
          </table:table-cell>
          <table:table-cell table:formula="of:=AVERAGE([.B460:.B508])" office:value-type="float" office:value="27.1997959183673" calcext:value-type="float">
            <text:p>27.1997959183673</text:p>
          </table:table-cell>
          <table:table-cell table:formula="of:=AVERAGE([.B410:.B508])" office:value-type="float" office:value="27.2359595959596" calcext:value-type="float">
            <text:p>27.2359595959596</text:p>
          </table:table-cell>
        </table:table-row>
        <table:table-row table:style-name="ro1">
          <table:table-cell office:value-type="date" office:date-value="2025-10-25" calcext:value-type="date">
            <text:p>2025-10-25</text:p>
          </table:table-cell>
          <table:table-cell office:value-type="float" office:value="27.03" calcext:value-type="float">
            <text:p>27.03</text:p>
          </table:table-cell>
          <table:table-cell office:value-type="float" office:value="14054950" calcext:value-type="float">
            <text:p>14054950</text:p>
          </table:table-cell>
          <table:table-cell table:formula="of:=AVERAGE([.B461:.B509])" office:value-type="float" office:value="27.1873469387755" calcext:value-type="float">
            <text:p>27.1873469387755</text:p>
          </table:table-cell>
          <table:table-cell table:formula="of:=AVERAGE([.B411:.B509])" office:value-type="float" office:value="27.2348484848485" calcext:value-type="float">
            <text:p>27.2348484848485</text:p>
          </table:table-cell>
        </table:table-row>
        <table:table-row table:style-name="ro1">
          <table:table-cell office:value-type="date" office:date-value="2025-10-26" calcext:value-type="date">
            <text:p>2025-10-26</text:p>
          </table:table-cell>
          <table:table-cell office:value-type="float" office:value="27.03" calcext:value-type="float">
            <text:p>27.03</text:p>
          </table:table-cell>
          <table:table-cell office:value-type="float" office:value="14054950" calcext:value-type="float">
            <text:p>14054950</text:p>
          </table:table-cell>
          <table:table-cell table:formula="of:=AVERAGE([.B462:.B510])" office:value-type="float" office:value="27.1748979591837" calcext:value-type="float">
            <text:p>27.1748979591837</text:p>
          </table:table-cell>
          <table:table-cell table:formula="of:=AVERAGE([.B412:.B510])" office:value-type="float" office:value="27.2349494949495" calcext:value-type="float">
            <text:p>27.2349494949495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27.12" calcext:value-type="float">
            <text:p>27.12</text:p>
          </table:table-cell>
          <table:table-cell office:value-type="float" office:value="17308046" calcext:value-type="float">
            <text:p>17308046</text:p>
          </table:table-cell>
          <table:table-cell table:formula="of:=AVERAGE([.B463:.B511])" office:value-type="float" office:value="27.1624489795918" calcext:value-type="float">
            <text:p>27.1624489795918</text:p>
          </table:table-cell>
          <table:table-cell table:formula="of:=AVERAGE([.B413:.B511])" office:value-type="float" office:value="27.2350505050505" calcext:value-type="float">
            <text:p>27.2350505050505</text:p>
          </table:table-cell>
        </table:table-row>
        <table:table-row table:style-name="ro1">
          <table:table-cell office:value-type="date" office:date-value="2025-10-28" calcext:value-type="date">
            <text:p>2025-10-28</text:p>
          </table:table-cell>
          <table:table-cell office:value-type="float" office:value="27" calcext:value-type="float">
            <text:p>27</text:p>
          </table:table-cell>
          <table:table-cell office:value-type="float" office:value="19879812" calcext:value-type="float">
            <text:p>19879812</text:p>
          </table:table-cell>
          <table:table-cell table:formula="of:=AVERAGE([.B464:.B512])" office:value-type="float" office:value="27.1559183673469" calcext:value-type="float">
            <text:p>27.1559183673469</text:p>
          </table:table-cell>
          <table:table-cell table:formula="of:=AVERAGE([.B414:.B512])" office:value-type="float" office:value="27.2360606060606" calcext:value-type="float">
            <text:p>27.2360606060606</text:p>
          </table:table-cell>
        </table:table-row>
        <table:table-row table:style-name="ro1">
          <table:table-cell office:value-type="date" office:date-value="2025-10-29" calcext:value-type="date">
            <text:p>2025-10-29</text:p>
          </table:table-cell>
          <table:table-cell office:value-type="float" office:value="26.74" calcext:value-type="float">
            <text:p>26.74</text:p>
          </table:table-cell>
          <table:table-cell office:value-type="float" office:value="22899094" calcext:value-type="float">
            <text:p>22899094</text:p>
          </table:table-cell>
          <table:table-cell table:formula="of:=AVERAGE([.B465:.B513])" office:value-type="float" office:value="27.1467346938776" calcext:value-type="float">
            <text:p>27.1467346938776</text:p>
          </table:table-cell>
          <table:table-cell table:formula="of:=AVERAGE([.B415:.B513])" office:value-type="float" office:value="27.2365656565657" calcext:value-type="float">
            <text:p>27.2365656565657</text:p>
          </table:table-cell>
        </table:table-row>
        <table:table-row table:style-name="ro1">
          <table:table-cell office:value-type="date" office:date-value="2025-10-30" calcext:value-type="date">
            <text:p>2025-10-30</text:p>
          </table:table-cell>
          <table:table-cell office:value-type="float" office:value="26.68" calcext:value-type="float">
            <text:p>26.68</text:p>
          </table:table-cell>
          <table:table-cell office:value-type="float" office:value="18030272" calcext:value-type="float">
            <text:p>18030272</text:p>
          </table:table-cell>
          <table:table-cell table:formula="of:=AVERAGE([.B466:.B514])" office:value-type="float" office:value="27.1312244897959" calcext:value-type="float">
            <text:p>27.1312244897959</text:p>
          </table:table-cell>
          <table:table-cell table:formula="of:=AVERAGE([.B416:.B514])" office:value-type="float" office:value="27.2315151515152" calcext:value-type="float">
            <text:p>27.2315151515152</text:p>
          </table:table-cell>
        </table:table-row>
        <table:table-row table:style-name="ro1">
          <table:table-cell office:value-type="date" office:date-value="2025-10-31" calcext:value-type="date">
            <text:p>2025-10-31</text:p>
          </table:table-cell>
          <table:table-cell office:value-type="float" office:value="26.75" calcext:value-type="float">
            <text:p>26.75</text:p>
          </table:table-cell>
          <table:table-cell office:value-type="float" office:value="16174389" calcext:value-type="float">
            <text:p>16174389</text:p>
          </table:table-cell>
          <table:table-cell table:formula="of:=AVERAGE([.B467:.B515])" office:value-type="float" office:value="27.11" calcext:value-type="float">
            <text:p>27.11</text:p>
          </table:table-cell>
          <table:table-cell table:formula="of:=AVERAGE([.B417:.B515])" office:value-type="float" office:value="27.2244444444444" calcext:value-type="float">
            <text:p>27.2244444444444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float" office:value="26.75" calcext:value-type="float">
            <text:p>26.75</text:p>
          </table:table-cell>
          <table:table-cell office:value-type="float" office:value="16174389" calcext:value-type="float">
            <text:p>16174389</text:p>
          </table:table-cell>
          <table:table-cell table:formula="of:=AVERAGE([.B468:.B516])" office:value-type="float" office:value="27.0951020408163" calcext:value-type="float">
            <text:p>27.0951020408163</text:p>
          </table:table-cell>
          <table:table-cell table:formula="of:=AVERAGE([.B418:.B516])" office:value-type="float" office:value="27.2190909090909" calcext:value-type="float">
            <text:p>27.2190909090909</text:p>
          </table:table-cell>
        </table:table-row>
        <table:table-row table:style-name="ro1">
          <table:table-cell office:value-type="date" office:date-value="2025-11-02" calcext:value-type="date">
            <text:p>2025-11-02</text:p>
          </table:table-cell>
          <table:table-cell office:value-type="float" office:value="26.75" calcext:value-type="float">
            <text:p>26.75</text:p>
          </table:table-cell>
          <table:table-cell office:value-type="float" office:value="16174389" calcext:value-type="float">
            <text:p>16174389</text:p>
          </table:table-cell>
          <table:table-cell table:formula="of:=AVERAGE([.B469:.B517])" office:value-type="float" office:value="27.0802040816327" calcext:value-type="float">
            <text:p>27.0802040816327</text:p>
          </table:table-cell>
          <table:table-cell table:formula="of:=AVERAGE([.B419:.B517])" office:value-type="float" office:value="27.2133333333333" calcext:value-type="float">
            <text:p>27.2133333333333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26.47" calcext:value-type="float">
            <text:p>26.47</text:p>
          </table:table-cell>
          <table:table-cell office:value-type="float" office:value="20525264" calcext:value-type="float">
            <text:p>20525264</text:p>
          </table:table-cell>
          <table:table-cell table:formula="of:=AVERAGE([.B470:.B518])" office:value-type="float" office:value="27.065306122449" calcext:value-type="float">
            <text:p>27.065306122449</text:p>
          </table:table-cell>
          <table:table-cell table:formula="of:=AVERAGE([.B420:.B518])" office:value-type="float" office:value="27.2075757575758" calcext:value-type="float">
            <text:p>27.2075757575758</text:p>
          </table:table-cell>
        </table:table-row>
        <table:table-row table:style-name="ro1">
          <table:table-cell office:value-type="date" office:date-value="2025-11-04" calcext:value-type="date">
            <text:p>2025-11-04</text:p>
          </table:table-cell>
          <table:table-cell office:value-type="float" office:value="26.44" calcext:value-type="float">
            <text:p>26.44</text:p>
          </table:table-cell>
          <table:table-cell office:value-type="float" office:value="18189410" calcext:value-type="float">
            <text:p>18189410</text:p>
          </table:table-cell>
          <table:table-cell table:formula="of:=AVERAGE([.B471:.B519])" office:value-type="float" office:value="27.0475510204082" calcext:value-type="float">
            <text:p>27.0475510204082</text:p>
          </table:table-cell>
          <table:table-cell table:formula="of:=AVERAGE([.B421:.B519])" office:value-type="float" office:value="27.1989898989899" calcext:value-type="float">
            <text:p>27.1989898989899</text:p>
          </table:table-cell>
        </table:table-row>
        <table:table-row table:style-name="ro1">
          <table:table-cell office:value-type="date" office:date-value="2025-11-05" calcext:value-type="date">
            <text:p>2025-11-05</text:p>
          </table:table-cell>
          <table:table-cell office:value-type="float" office:value="26.57" calcext:value-type="float">
            <text:p>26.57</text:p>
          </table:table-cell>
          <table:table-cell office:value-type="float" office:value="16559888" calcext:value-type="float">
            <text:p>16559888</text:p>
          </table:table-cell>
          <table:table-cell table:formula="of:=AVERAGE([.B472:.B520])" office:value-type="float" office:value="27.0275510204082" calcext:value-type="float">
            <text:p>27.0275510204082</text:p>
          </table:table-cell>
          <table:table-cell table:formula="of:=AVERAGE([.B422:.B520])" office:value-type="float" office:value="27.1913131313131" calcext:value-type="float">
            <text:p>27.191313131313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float" office:value="26.52" calcext:value-type="float">
            <text:p>26.52</text:p>
          </table:table-cell>
          <table:table-cell office:value-type="float" office:value="15867799" calcext:value-type="float">
            <text:p>15867799</text:p>
          </table:table-cell>
          <table:table-cell table:formula="of:=AVERAGE([.B473:.B521])" office:value-type="float" office:value="27.0091836734694" calcext:value-type="float">
            <text:p>27.0091836734694</text:p>
          </table:table-cell>
          <table:table-cell table:formula="of:=AVERAGE([.B423:.B521])" office:value-type="float" office:value="27.1852525252525" calcext:value-type="float">
            <text:p>27.1852525252525</text:p>
          </table:table-cell>
        </table:table-row>
        <table:table-row table:style-name="ro1">
          <table:table-cell office:value-type="date" office:date-value="2025-11-07" calcext:value-type="date">
            <text:p>2025-11-07</text:p>
          </table:table-cell>
          <table:table-cell office:value-type="float" office:value="26.72" calcext:value-type="float">
            <text:p>26.72</text:p>
          </table:table-cell>
          <table:table-cell office:value-type="float" office:value="18818821" calcext:value-type="float">
            <text:p>18818821</text:p>
          </table:table-cell>
          <table:table-cell table:formula="of:=AVERAGE([.B474:.B522])" office:value-type="float" office:value="26.9902040816327" calcext:value-type="float">
            <text:p>26.9902040816327</text:p>
          </table:table-cell>
          <table:table-cell table:formula="of:=AVERAGE([.B424:.B522])" office:value-type="float" office:value="27.1820202020202" calcext:value-type="float">
            <text:p>27.1820202020202</text:p>
          </table:table-cell>
        </table:table-row>
        <table:table-row table:style-name="ro1">
          <table:table-cell office:value-type="date" office:date-value="2025-11-08" calcext:value-type="date">
            <text:p>2025-11-08</text:p>
          </table:table-cell>
          <table:table-cell office:value-type="float" office:value="26.72" calcext:value-type="float">
            <text:p>26.72</text:p>
          </table:table-cell>
          <table:table-cell office:value-type="float" office:value="18818821" calcext:value-type="float">
            <text:p>18818821</text:p>
          </table:table-cell>
          <table:table-cell table:formula="of:=AVERAGE([.B475:.B523])" office:value-type="float" office:value="26.9777551020408" calcext:value-type="float">
            <text:p>26.9777551020408</text:p>
          </table:table-cell>
          <table:table-cell table:formula="of:=AVERAGE([.B425:.B523])" office:value-type="float" office:value="27.1842424242424" calcext:value-type="float">
            <text:p>27.1842424242424</text:p>
          </table:table-cell>
        </table:table-row>
        <table:table-row table:style-name="ro1">
          <table:table-cell office:value-type="date" office:date-value="2025-11-09" calcext:value-type="date">
            <text:p>2025-11-09</text:p>
          </table:table-cell>
          <table:table-cell office:value-type="float" office:value="26.72" calcext:value-type="float">
            <text:p>26.72</text:p>
          </table:table-cell>
          <table:table-cell office:value-type="float" office:value="18818821" calcext:value-type="float">
            <text:p>18818821</text:p>
          </table:table-cell>
          <table:table-cell table:formula="of:=AVERAGE([.B476:.B524])" office:value-type="float" office:value="26.965306122449" calcext:value-type="float">
            <text:p>26.965306122449</text:p>
          </table:table-cell>
          <table:table-cell table:formula="of:=AVERAGE([.B426:.B524])" office:value-type="float" office:value="27.1876767676768" calcext:value-type="float">
            <text:p>27.1876767676768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26.77" calcext:value-type="float">
            <text:p>26.77</text:p>
          </table:table-cell>
          <table:table-cell office:value-type="float" office:value="19396891" calcext:value-type="float">
            <text:p>19396891</text:p>
          </table:table-cell>
          <table:table-cell table:formula="of:=AVERAGE([.B477:.B525])" office:value-type="float" office:value="26.9528571428571" calcext:value-type="float">
            <text:p>26.9528571428571</text:p>
          </table:table-cell>
          <table:table-cell table:formula="of:=AVERAGE([.B427:.B525])" office:value-type="float" office:value="27.1911111111111" calcext:value-type="float">
            <text:p>27.191111111111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float" office:value="27.18" calcext:value-type="float">
            <text:p>27.18</text:p>
          </table:table-cell>
          <table:table-cell office:value-type="float" office:value="16948892" calcext:value-type="float">
            <text:p>16948892</text:p>
          </table:table-cell>
          <table:table-cell table:formula="of:=AVERAGE([.B478:.B526])" office:value-type="float" office:value="26.9430612244898" calcext:value-type="float">
            <text:p>26.9430612244898</text:p>
          </table:table-cell>
          <table:table-cell table:formula="of:=AVERAGE([.B428:.B526])" office:value-type="float" office:value="27.1950505050505" calcext:value-type="float">
            <text:p>27.1950505050505</text:p>
          </table:table-cell>
        </table:table-row>
        <table:table-row table:style-name="ro1">
          <table:table-cell office:value-type="date" office:date-value="2025-11-12" calcext:value-type="date">
            <text:p>2025-11-12</text:p>
          </table:table-cell>
          <table:table-cell office:value-type="float" office:value="27.19" calcext:value-type="float">
            <text:p>27.19</text:p>
          </table:table-cell>
          <table:table-cell office:value-type="float" office:value="15034327" calcext:value-type="float">
            <text:p>15034327</text:p>
          </table:table-cell>
          <table:table-cell table:formula="of:=AVERAGE([.B479:.B527])" office:value-type="float" office:value="26.9385714285714" calcext:value-type="float">
            <text:p>26.9385714285714</text:p>
          </table:table-cell>
          <table:table-cell table:formula="of:=AVERAGE([.B429:.B527])" office:value-type="float" office:value="27.2008080808081" calcext:value-type="float">
            <text:p>27.2008080808081</text:p>
          </table:table-cell>
        </table:table-row>
        <table:table-row table:style-name="ro1">
          <table:table-cell office:value-type="date" office:date-value="2025-11-13" calcext:value-type="date">
            <text:p>2025-11-13</text:p>
          </table:table-cell>
          <table:table-cell office:value-type="float" office:value="27.22" calcext:value-type="float">
            <text:p>27.22</text:p>
          </table:table-cell>
          <table:table-cell office:value-type="float" office:value="21714949" calcext:value-type="float">
            <text:p>21714949</text:p>
          </table:table-cell>
          <table:table-cell table:formula="of:=AVERAGE([.B480:.B528])" office:value-type="float" office:value="26.9391836734694" calcext:value-type="float">
            <text:p>26.9391836734694</text:p>
          </table:table-cell>
          <table:table-cell table:formula="of:=AVERAGE([.B430:.B528])" office:value-type="float" office:value="27.2053535353535" calcext:value-type="float">
            <text:p>27.2053535353535</text:p>
          </table:table-cell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float" office:value="27.24" calcext:value-type="float">
            <text:p>27.24</text:p>
          </table:table-cell>
          <table:table-cell office:value-type="float" office:value="19840778" calcext:value-type="float">
            <text:p>19840778</text:p>
          </table:table-cell>
          <table:table-cell table:formula="of:=AVERAGE([.B481:.B529])" office:value-type="float" office:value="26.9438775510204" calcext:value-type="float">
            <text:p>26.9438775510204</text:p>
          </table:table-cell>
          <table:table-cell table:formula="of:=AVERAGE([.B431:.B529])" office:value-type="float" office:value="27.2108080808081" calcext:value-type="float">
            <text:p>27.2108080808081</text:p>
          </table:table-cell>
        </table:table-row>
        <table:table-row table:style-name="ro1">
          <table:table-cell office:value-type="date" office:date-value="2025-11-15" calcext:value-type="date">
            <text:p>2025-11-15</text:p>
          </table:table-cell>
          <table:table-cell office:value-type="float" office:value="27.24" calcext:value-type="float">
            <text:p>27.24</text:p>
          </table:table-cell>
          <table:table-cell office:value-type="float" office:value="19840778" calcext:value-type="float">
            <text:p>19840778</text:p>
          </table:table-cell>
          <table:table-cell table:formula="of:=AVERAGE([.B482:.B530])" office:value-type="float" office:value="26.9444897959184" calcext:value-type="float">
            <text:p>26.9444897959184</text:p>
          </table:table-cell>
          <table:table-cell table:formula="of:=AVERAGE([.B432:.B530])" office:value-type="float" office:value="27.2157575757576" calcext:value-type="float">
            <text:p>27.2157575757576</text:p>
          </table:table-cell>
        </table:table-row>
        <table:table-row table:style-name="ro1">
          <table:table-cell office:value-type="date" office:date-value="2025-11-16" calcext:value-type="date">
            <text:p>2025-11-16</text:p>
          </table:table-cell>
          <table:table-cell office:value-type="float" office:value="27.24" calcext:value-type="float">
            <text:p>27.24</text:p>
          </table:table-cell>
          <table:table-cell office:value-type="float" office:value="19840778" calcext:value-type="float">
            <text:p>19840778</text:p>
          </table:table-cell>
          <table:table-cell table:formula="of:=AVERAGE([.B483:.B531])" office:value-type="float" office:value="26.9451020408163" calcext:value-type="float">
            <text:p>26.9451020408163</text:p>
          </table:table-cell>
          <table:table-cell table:formula="of:=AVERAGE([.B433:.B531])" office:value-type="float" office:value="27.2193939393939" calcext:value-type="float">
            <text:p>27.2193939393939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27" calcext:value-type="float">
            <text:p>27</text:p>
          </table:table-cell>
          <table:table-cell office:value-type="float" office:value="17416737" calcext:value-type="float">
            <text:p>17416737</text:p>
          </table:table-cell>
          <table:table-cell table:formula="of:=AVERAGE([.B484:.B532])" office:value-type="float" office:value="26.9457142857143" calcext:value-type="float">
            <text:p>26.9457142857143</text:p>
          </table:table-cell>
          <table:table-cell table:formula="of:=AVERAGE([.B434:.B532])" office:value-type="float" office:value="27.2230303030303" calcext:value-type="float">
            <text:p>27.2230303030303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float" office:value="27.16" calcext:value-type="float">
            <text:p>27.16</text:p>
          </table:table-cell>
          <table:table-cell office:value-type="float" office:value="17175136" calcext:value-type="float">
            <text:p>17175136</text:p>
          </table:table-cell>
          <table:table-cell table:formula="of:=AVERAGE([.B485:.B533])" office:value-type="float" office:value="26.9436734693878" calcext:value-type="float">
            <text:p>26.9436734693878</text:p>
          </table:table-cell>
          <table:table-cell table:formula="of:=AVERAGE([.B435:.B533])" office:value-type="float" office:value="27.2242424242424" calcext:value-type="float">
            <text:p>27.2242424242424</text:p>
          </table:table-cell>
        </table:table-row>
        <table:table-row table:style-name="ro1">
          <table:table-cell office:value-type="date" office:date-value="2025-11-19" calcext:value-type="date">
            <text:p>2025-11-19</text:p>
          </table:table-cell>
          <table:table-cell office:value-type="float" office:value="26.93" calcext:value-type="float">
            <text:p>26.93</text:p>
          </table:table-cell>
          <table:table-cell office:value-type="float" office:value="17996519" calcext:value-type="float">
            <text:p>17996519</text:p>
          </table:table-cell>
          <table:table-cell table:formula="of:=AVERAGE([.B486:.B534])" office:value-type="float" office:value="26.9408163265306" calcext:value-type="float">
            <text:p>26.9408163265306</text:p>
          </table:table-cell>
          <table:table-cell table:formula="of:=AVERAGE([.B436:.B534])" office:value-type="float" office:value="27.2279797979798" calcext:value-type="float">
            <text:p>27.2279797979798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float" office:value="26.62" calcext:value-type="float">
            <text:p>26.62</text:p>
          </table:table-cell>
          <table:table-cell office:value-type="float" office:value="21664080" calcext:value-type="float">
            <text:p>21664080</text:p>
          </table:table-cell>
          <table:table-cell table:formula="of:=AVERAGE([.B487:.B535])" office:value-type="float" office:value="26.9285714285714" calcext:value-type="float">
            <text:p>26.9285714285714</text:p>
          </table:table-cell>
          <table:table-cell table:formula="of:=AVERAGE([.B437:.B535])" office:value-type="float" office:value="27.2262626262626" calcext:value-type="float">
            <text:p>27.2262626262626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float" office:value="27.1" calcext:value-type="float">
            <text:p>27.1</text:p>
          </table:table-cell>
          <table:table-cell office:value-type="float" office:value="21087164" calcext:value-type="float">
            <text:p>21087164</text:p>
          </table:table-cell>
          <table:table-cell table:formula="of:=AVERAGE([.B488:.B536])" office:value-type="float" office:value="26.9138775510204" calcext:value-type="float">
            <text:p>26.9138775510204</text:p>
          </table:table-cell>
          <table:table-cell table:formula="of:=AVERAGE([.B438:.B536])" office:value-type="float" office:value="27.2177777777778" calcext:value-type="float">
            <text:p>27.2177777777778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float" office:value="27.1" calcext:value-type="float">
            <text:p>27.1</text:p>
          </table:table-cell>
          <table:table-cell office:value-type="float" office:value="21087164" calcext:value-type="float">
            <text:p>21087164</text:p>
          </table:table-cell>
          <table:table-cell table:formula="of:=AVERAGE([.B489:.B537])" office:value-type="float" office:value="26.9075510204082" calcext:value-type="float">
            <text:p>26.9075510204082</text:p>
          </table:table-cell>
          <table:table-cell table:formula="of:=AVERAGE([.B439:.B537])" office:value-type="float" office:value="27.2153535353535" calcext:value-type="float">
            <text:p>27.2153535353535</text:p>
          </table:table-cell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float" office:value="27.1" calcext:value-type="float">
            <text:p>27.1</text:p>
          </table:table-cell>
          <table:table-cell office:value-type="float" office:value="21087164" calcext:value-type="float">
            <text:p>21087164</text:p>
          </table:table-cell>
          <table:table-cell table:formula="of:=AVERAGE([.B490:.B538])" office:value-type="float" office:value="26.9012244897959" calcext:value-type="float">
            <text:p>26.9012244897959</text:p>
          </table:table-cell>
          <table:table-cell table:formula="of:=AVERAGE([.B440:.B538])" office:value-type="float" office:value="27.2130303030303" calcext:value-type="float">
            <text:p>27.2130303030303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26.95" calcext:value-type="float">
            <text:p>26.95</text:p>
          </table:table-cell>
          <table:table-cell office:value-type="float" office:value="22398290" calcext:value-type="float">
            <text:p>22398290</text:p>
          </table:table-cell>
          <table:table-cell table:formula="of:=AVERAGE([.B491:.B539])" office:value-type="float" office:value="26.8948979591837" calcext:value-type="float">
            <text:p>26.8948979591837</text:p>
          </table:table-cell>
          <table:table-cell table:formula="of:=AVERAGE([.B441:.B539])" office:value-type="float" office:value="27.2107070707071" calcext:value-type="float">
            <text:p>27.2107070707071</text:p>
          </table:table-cell>
        </table:table-row>
        <table:table-row table:style-name="ro1">
          <table:table-cell office:value-type="date" office:date-value="2025-11-25" calcext:value-type="date">
            <text:p>2025-11-25</text:p>
          </table:table-cell>
          <table:table-cell office:value-type="float" office:value="27.32" calcext:value-type="float">
            <text:p>27.32</text:p>
          </table:table-cell>
          <table:table-cell office:value-type="float" office:value="17863731" calcext:value-type="float">
            <text:p>17863731</text:p>
          </table:table-cell>
          <table:table-cell table:formula="of:=AVERAGE([.B492:.B540])" office:value-type="float" office:value="26.8869387755102" calcext:value-type="float">
            <text:p>26.8869387755102</text:p>
          </table:table-cell>
          <table:table-cell table:formula="of:=AVERAGE([.B442:.B540])" office:value-type="float" office:value="27.2068686868687" calcext:value-type="float">
            <text:p>27.2068686868687</text:p>
          </table:table-cell>
        </table:table-row>
        <table:table-row table:style-name="ro1">
          <table:table-cell office:value-type="date" office:date-value="2025-11-26" calcext:value-type="date">
            <text:p>2025-11-26</text:p>
          </table:table-cell>
          <table:table-cell office:value-type="float" office:value="27.45" calcext:value-type="float">
            <text:p>27.45</text:p>
          </table:table-cell>
          <table:table-cell office:value-type="float" office:value="14495943" calcext:value-type="float">
            <text:p>14495943</text:p>
          </table:table-cell>
          <table:table-cell table:formula="of:=AVERAGE([.B493:.B541])" office:value-type="float" office:value="26.8877551020408" calcext:value-type="float">
            <text:p>26.8877551020408</text:p>
          </table:table-cell>
          <table:table-cell table:formula="of:=AVERAGE([.B443:.B541])" office:value-type="float" office:value="27.2074747474748" calcext:value-type="float">
            <text:p>27.2074747474748</text:p>
          </table:table-cell>
        </table:table-row>
        <table:table-row table:style-name="ro1">
          <table:table-cell office:value-type="date" office:date-value="2025-11-27" calcext:value-type="date">
            <text:p>2025-11-27</text:p>
          </table:table-cell>
          <table:table-cell office:value-type="float" office:value="27.45" calcext:value-type="float">
            <text:p>27.45</text:p>
          </table:table-cell>
          <table:table-cell office:value-type="float" office:value="14495943" calcext:value-type="float">
            <text:p>14495943</text:p>
          </table:table-cell>
          <table:table-cell table:formula="of:=AVERAGE([.B494:.B542])" office:value-type="float" office:value="26.8932653061224" calcext:value-type="float">
            <text:p>26.8932653061224</text:p>
          </table:table-cell>
          <table:table-cell table:formula="of:=AVERAGE([.B444:.B542])" office:value-type="float" office:value="27.2074747474748" calcext:value-type="float">
            <text:p>27.2074747474748</text:p>
          </table:table-cell>
        </table:table-row>
        <table:table-row table:style-name="ro1">
          <table:table-cell office:value-type="date" office:date-value="2025-11-28" calcext:value-type="date">
            <text:p>2025-11-28</text:p>
          </table:table-cell>
          <table:table-cell office:value-type="float" office:value="27.59" calcext:value-type="float">
            <text:p>27.59</text:p>
          </table:table-cell>
          <table:table-cell office:value-type="float" office:value="8406039" calcext:value-type="float">
            <text:p>8406039</text:p>
          </table:table-cell>
          <table:table-cell table:formula="of:=AVERAGE([.B495:.B543])" office:value-type="float" office:value="26.9024489795918" calcext:value-type="float">
            <text:p>26.9024489795918</text:p>
          </table:table-cell>
          <table:table-cell table:formula="of:=AVERAGE([.B445:.B543])" office:value-type="float" office:value="27.2068686868687" calcext:value-type="float">
            <text:p>27.2068686868687</text:p>
          </table:table-cell>
        </table:table-row>
        <table:table-row table:style-name="ro1">
          <table:table-cell office:value-type="date" office:date-value="2025-11-29" calcext:value-type="date">
            <text:p>2025-11-29</text:p>
          </table:table-cell>
          <table:table-cell office:value-type="float" office:value="27.59" calcext:value-type="float">
            <text:p>27.59</text:p>
          </table:table-cell>
          <table:table-cell office:value-type="float" office:value="8406039" calcext:value-type="float">
            <text:p>8406039</text:p>
          </table:table-cell>
          <table:table-cell table:formula="of:=AVERAGE([.B496:.B544])" office:value-type="float" office:value="26.9238775510204" calcext:value-type="float">
            <text:p>26.9238775510204</text:p>
          </table:table-cell>
          <table:table-cell table:formula="of:=AVERAGE([.B446:.B544])" office:value-type="float" office:value="27.2075757575758" calcext:value-type="float">
            <text:p>27.2075757575758</text:p>
          </table:table-cell>
        </table:table-row>
        <table:table-row table:style-name="ro1">
          <table:table-cell office:value-type="date" office:date-value="2025-11-30" calcext:value-type="date">
            <text:p>2025-11-30</text:p>
          </table:table-cell>
          <table:table-cell office:value-type="float" office:value="27.59" calcext:value-type="float">
            <text:p>27.59</text:p>
          </table:table-cell>
          <table:table-cell office:value-type="float" office:value="8406039" calcext:value-type="float">
            <text:p>8406039</text:p>
          </table:table-cell>
          <table:table-cell table:formula="of:=AVERAGE([.B497:.B545])" office:value-type="float" office:value="26.945306122449" calcext:value-type="float">
            <text:p>26.945306122449</text:p>
          </table:table-cell>
          <table:table-cell table:formula="of:=AVERAGE([.B447:.B545])" office:value-type="float" office:value="27.2039393939394" calcext:value-type="float">
            <text:p>27.203939393939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27.53" calcext:value-type="float">
            <text:p>27.53</text:p>
          </table:table-cell>
          <table:table-cell office:value-type="float" office:value="20224233" calcext:value-type="float">
            <text:p>20224233</text:p>
          </table:table-cell>
          <table:table-cell table:formula="of:=AVERAGE([.B498:.B546])" office:value-type="float" office:value="26.9667346938775" calcext:value-type="float">
            <text:p>26.9667346938775</text:p>
          </table:table-cell>
          <table:table-cell table:formula="of:=AVERAGE([.B448:.B546])" office:value-type="float" office:value="27.200303030303" calcext:value-type="float">
            <text:p>27.200303030303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float" office:value="27.4" calcext:value-type="float">
            <text:p>27.4</text:p>
          </table:table-cell>
          <table:table-cell office:value-type="float" office:value="17595846" calcext:value-type="float">
            <text:p>17595846</text:p>
          </table:table-cell>
          <table:table-cell table:formula="of:=AVERAGE([.B499:.B547])" office:value-type="float" office:value="26.9851020408163" calcext:value-type="float">
            <text:p>26.9851020408163</text:p>
          </table:table-cell>
          <table:table-cell table:formula="of:=AVERAGE([.B449:.B547])" office:value-type="float" office:value="27.1960606060606" calcext:value-type="float">
            <text:p>27.1960606060606</text:p>
          </table:table-cell>
        </table:table-row>
        <table:table-row table:style-name="ro1">
          <table:table-cell office:value-type="date" office:date-value="2025-12-03" calcext:value-type="date">
            <text:p>2025-12-03</text:p>
          </table:table-cell>
          <table:table-cell office:value-type="float" office:value="27.8" calcext:value-type="float">
            <text:p>27.8</text:p>
          </table:table-cell>
          <table:table-cell office:value-type="float" office:value="16300522" calcext:value-type="float">
            <text:p>16300522</text:p>
          </table:table-cell>
          <table:table-cell table:formula="of:=AVERAGE([.B500:.B548])" office:value-type="float" office:value="26.9959183673469" calcext:value-type="float">
            <text:p>26.9959183673469</text:p>
          </table:table-cell>
          <table:table-cell table:formula="of:=AVERAGE([.B450:.B548])" office:value-type="float" office:value="27.1923232323232" calcext:value-type="float">
            <text:p>27.1923232323232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float" office:value="27.75" calcext:value-type="float">
            <text:p>27.75</text:p>
          </table:table-cell>
          <table:table-cell office:value-type="float" office:value="15934886" calcext:value-type="float">
            <text:p>15934886</text:p>
          </table:table-cell>
          <table:table-cell table:formula="of:=AVERAGE([.B501:.B549])" office:value-type="float" office:value="27.0167346938776" calcext:value-type="float">
            <text:p>27.0167346938776</text:p>
          </table:table-cell>
          <table:table-cell table:formula="of:=AVERAGE([.B451:.B549])" office:value-type="float" office:value="27.1928282828283" calcext:value-type="float">
            <text:p>27.1928282828283</text:p>
          </table:table-cell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float" office:value="27.71" calcext:value-type="float">
            <text:p>27.71</text:p>
          </table:table-cell>
          <table:table-cell office:value-type="float" office:value="14265812" calcext:value-type="float">
            <text:p>14265812</text:p>
          </table:table-cell>
          <table:table-cell table:formula="of:=AVERAGE([.B502:.B550])" office:value-type="float" office:value="27.0408163265306" calcext:value-type="float">
            <text:p>27.0408163265306</text:p>
          </table:table-cell>
          <table:table-cell table:formula="of:=AVERAGE([.B452:.B550])" office:value-type="float" office:value="27.1916161616162" calcext:value-type="float">
            <text:p>27.1916161616162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float" office:value="27.71" calcext:value-type="float">
            <text:p>27.71</text:p>
          </table:table-cell>
          <table:table-cell office:value-type="float" office:value="14265812" calcext:value-type="float">
            <text:p>14265812</text:p>
          </table:table-cell>
          <table:table-cell table:formula="of:=AVERAGE([.B503:.B551])" office:value-type="float" office:value="27.0595918367347" calcext:value-type="float">
            <text:p>27.0595918367347</text:p>
          </table:table-cell>
          <table:table-cell table:formula="of:=AVERAGE([.B453:.B551])" office:value-type="float" office:value="27.1905050505051" calcext:value-type="float">
            <text:p>27.190505050505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float" office:value="27.71" calcext:value-type="float">
            <text:p>27.71</text:p>
          </table:table-cell>
          <table:table-cell office:value-type="float" office:value="14265812" calcext:value-type="float">
            <text:p>14265812</text:p>
          </table:table-cell>
          <table:table-cell table:formula="of:=AVERAGE([.B504:.B552])" office:value-type="float" office:value="27.0783673469388" calcext:value-type="float">
            <text:p>27.0783673469388</text:p>
          </table:table-cell>
          <table:table-cell table:formula="of:=AVERAGE([.B454:.B552])" office:value-type="float" office:value="27.1883838383838" calcext:value-type="float">
            <text:p>27.1883838383838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27.58" calcext:value-type="float">
            <text:p>27.58</text:p>
          </table:table-cell>
          <table:table-cell office:value-type="float" office:value="20370893" calcext:value-type="float">
            <text:p>20370893</text:p>
          </table:table-cell>
          <table:table-cell table:formula="of:=AVERAGE([.B505:.B553])" office:value-type="float" office:value="27.0971428571429" calcext:value-type="float">
            <text:p>27.0971428571429</text:p>
          </table:table-cell>
          <table:table-cell table:formula="of:=AVERAGE([.B455:.B553])" office:value-type="float" office:value="27.1862626262626" calcext:value-type="float">
            <text:p>27.1862626262626</text:p>
          </table:table-cell>
        </table:table-row>
        <table:table-row table:style-name="ro1">
          <table:table-cell office:value-type="date" office:date-value="2025-12-09" calcext:value-type="date">
            <text:p>2025-12-09</text:p>
          </table:table-cell>
          <table:table-cell office:value-type="float" office:value="27.46" calcext:value-type="float">
            <text:p>27.46</text:p>
          </table:table-cell>
          <table:table-cell office:value-type="float" office:value="19475969" calcext:value-type="float">
            <text:p>19475969</text:p>
          </table:table-cell>
          <table:table-cell table:formula="of:=AVERAGE([.B506:.B554])" office:value-type="float" office:value="27.1091836734694" calcext:value-type="float">
            <text:p>27.1091836734694</text:p>
          </table:table-cell>
          <table:table-cell table:formula="of:=AVERAGE([.B456:.B554])" office:value-type="float" office:value="27.1828282828283" calcext:value-type="float">
            <text:p>27.1828282828283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float" office:value="27.57" calcext:value-type="float">
            <text:p>27.57</text:p>
          </table:table-cell>
          <table:table-cell office:value-type="float" office:value="16499540" calcext:value-type="float">
            <text:p>16499540</text:p>
          </table:table-cell>
          <table:table-cell table:formula="of:=AVERAGE([.B507:.B555])" office:value-type="float" office:value="27.1171428571429" calcext:value-type="float">
            <text:p>27.1171428571429</text:p>
          </table:table-cell>
          <table:table-cell table:formula="of:=AVERAGE([.B457:.B555])" office:value-type="float" office:value="27.1781818181818" calcext:value-type="float">
            <text:p>27.1781818181818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float" office:value="27.68" calcext:value-type="float">
            <text:p>27.68</text:p>
          </table:table-cell>
          <table:table-cell office:value-type="float" office:value="18955295" calcext:value-type="float">
            <text:p>18955295</text:p>
          </table:table-cell>
          <table:table-cell table:formula="of:=AVERAGE([.B508:.B556])" office:value-type="float" office:value="27.1289795918367" calcext:value-type="float">
            <text:p>27.1289795918367</text:p>
          </table:table-cell>
          <table:table-cell table:formula="of:=AVERAGE([.B458:.B556])" office:value-type="float" office:value="27.1754545454545" calcext:value-type="float">
            <text:p>27.1754545454545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float" office:value="27.68" calcext:value-type="float">
            <text:p>27.68</text:p>
          </table:table-cell>
          <table:table-cell office:value-type="float" office:value="20252932" calcext:value-type="float">
            <text:p>20252932</text:p>
          </table:table-cell>
          <table:table-cell table:formula="of:=AVERAGE([.B509:.B557])" office:value-type="float" office:value="27.1422448979592" calcext:value-type="float">
            <text:p>27.1422448979592</text:p>
          </table:table-cell>
          <table:table-cell table:formula="of:=AVERAGE([.B459:.B557])" office:value-type="float" office:value="27.1762626262626" calcext:value-type="float">
            <text:p>27.1762626262626</text:p>
          </table:table-cell>
        </table:table-row>
        <table:table-row table:style-name="ro1">
          <table:table-cell office:value-type="date" office:date-value="2025-12-13" calcext:value-type="date">
            <text:p>2025-12-13</text:p>
          </table:table-cell>
          <table:table-cell office:value-type="float" office:value="27.68" calcext:value-type="float">
            <text:p>27.68</text:p>
          </table:table-cell>
          <table:table-cell office:value-type="float" office:value="20252932" calcext:value-type="float">
            <text:p>20252932</text:p>
          </table:table-cell>
          <table:table-cell table:formula="of:=AVERAGE([.B510:.B558])" office:value-type="float" office:value="27.1555102040816" calcext:value-type="float">
            <text:p>27.1555102040816</text:p>
          </table:table-cell>
          <table:table-cell table:formula="of:=AVERAGE([.B460:.B558])" office:value-type="float" office:value="27.1761616161616" calcext:value-type="float">
            <text:p>27.1761616161616</text:p>
          </table:table-cell>
        </table:table-row>
        <table:table-row table:style-name="ro1">
          <table:table-cell office:value-type="date" office:date-value="2025-12-14" calcext:value-type="date">
            <text:p>2025-12-14</text:p>
          </table:table-cell>
          <table:table-cell office:value-type="float" office:value="27.68" calcext:value-type="float">
            <text:p>27.68</text:p>
          </table:table-cell>
          <table:table-cell office:value-type="float" office:value="20252932" calcext:value-type="float">
            <text:p>20252932</text:p>
          </table:table-cell>
          <table:table-cell table:formula="of:=AVERAGE([.B511:.B559])" office:value-type="float" office:value="27.1687755102041" calcext:value-type="float">
            <text:p>27.1687755102041</text:p>
          </table:table-cell>
          <table:table-cell table:formula="of:=AVERAGE([.B461:.B559])" office:value-type="float" office:value="27.1765656565657" calcext:value-type="float">
            <text:p>27.1765656565657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27.76" calcext:value-type="float">
            <text:p>27.76</text:p>
          </table:table-cell>
          <table:table-cell office:value-type="float" office:value="25870938" calcext:value-type="float">
            <text:p>25870938</text:p>
          </table:table-cell>
          <table:table-cell table:formula="of:=AVERAGE([.B512:.B560])" office:value-type="float" office:value="27.1820408163265" calcext:value-type="float">
            <text:p>27.1820408163265</text:p>
          </table:table-cell>
          <table:table-cell table:formula="of:=AVERAGE([.B462:.B560])" office:value-type="float" office:value="27.1769696969697" calcext:value-type="float">
            <text:p>27.1769696969697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float" office:value="27.47" calcext:value-type="float">
            <text:p>27.47</text:p>
          </table:table-cell>
          <table:table-cell office:value-type="float" office:value="20603498" calcext:value-type="float">
            <text:p>20603498</text:p>
          </table:table-cell>
          <table:table-cell table:formula="of:=AVERAGE([.B513:.B561])" office:value-type="float" office:value="27.1951020408163" calcext:value-type="float">
            <text:p>27.1951020408163</text:p>
          </table:table-cell>
          <table:table-cell table:formula="of:=AVERAGE([.B463:.B561])" office:value-type="float" office:value="27.1781818181818" calcext:value-type="float">
            <text:p>27.1781818181818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float" office:value="27.6" calcext:value-type="float">
            <text:p>27.6</text:p>
          </table:table-cell>
          <table:table-cell office:value-type="float" office:value="17679895" calcext:value-type="float">
            <text:p>17679895</text:p>
          </table:table-cell>
          <table:table-cell table:formula="of:=AVERAGE([.B514:.B562])" office:value-type="float" office:value="27.204693877551" calcext:value-type="float">
            <text:p>27.204693877551</text:p>
          </table:table-cell>
          <table:table-cell table:formula="of:=AVERAGE([.B464:.B562])" office:value-type="float" office:value="27.1784848484849" calcext:value-type="float">
            <text:p>27.1784848484849</text:p>
          </table:table-cell>
        </table:table-row>
        <table:table-row table:style-name="ro1">
          <table:table-cell office:value-type="date" office:date-value="2025-12-18" calcext:value-type="date">
            <text:p>2025-12-18</text:p>
          </table:table-cell>
          <table:table-cell office:value-type="float" office:value="27.48" calcext:value-type="float">
            <text:p>27.48</text:p>
          </table:table-cell>
          <table:table-cell office:value-type="float" office:value="19642933" calcext:value-type="float">
            <text:p>19642933</text:p>
          </table:table-cell>
          <table:table-cell table:formula="of:=AVERAGE([.B515:.B563])" office:value-type="float" office:value="27.2222448979592" calcext:value-type="float">
            <text:p>27.2222448979592</text:p>
          </table:table-cell>
          <table:table-cell table:formula="of:=AVERAGE([.B465:.B563])" office:value-type="float" office:value="27.18" calcext:value-type="float">
            <text:p>27.18</text:p>
          </table:table-cell>
        </table:table-row>
        <table:table-row table:style-name="ro1">
          <table:table-cell office:value-type="date" office:date-value="2025-12-19" calcext:value-type="date">
            <text:p>2025-12-19</text:p>
          </table:table-cell>
          <table:table-cell office:value-type="float" office:value="27.46" calcext:value-type="float">
            <text:p>27.46</text:p>
          </table:table-cell>
          <table:table-cell office:value-type="float" office:value="20518163" calcext:value-type="float">
            <text:p>20518163</text:p>
          </table:table-cell>
          <table:table-cell table:formula="of:=AVERAGE([.B516:.B564])" office:value-type="float" office:value="27.2385714285714" calcext:value-type="float">
            <text:p>27.2385714285714</text:p>
          </table:table-cell>
          <table:table-cell table:formula="of:=AVERAGE([.B466:.B564])" office:value-type="float" office:value="27.179797979798" calcext:value-type="float">
            <text:p>27.179797979798</text:p>
          </table:table-cell>
        </table:table-row>
        <table:table-row table:style-name="ro1">
          <table:table-cell office:value-type="date" office:date-value="2025-12-20" calcext:value-type="date">
            <text:p>2025-12-20</text:p>
          </table:table-cell>
          <table:table-cell office:value-type="float" office:value="27.46" calcext:value-type="float">
            <text:p>27.46</text:p>
          </table:table-cell>
          <table:table-cell office:value-type="float" office:value="20518163" calcext:value-type="float">
            <text:p>20518163</text:p>
          </table:table-cell>
          <table:table-cell table:formula="of:=AVERAGE([.B517:.B565])" office:value-type="float" office:value="27.2530612244898" calcext:value-type="float">
            <text:p>27.2530612244898</text:p>
          </table:table-cell>
          <table:table-cell table:formula="of:=AVERAGE([.B467:.B565])" office:value-type="float" office:value="27.1771717171717" calcext:value-type="float">
            <text:p>27.1771717171717</text:p>
          </table:table-cell>
        </table:table-row>
        <table:table-row table:style-name="ro1">
          <table:table-cell office:value-type="date" office:date-value="2025-12-21" calcext:value-type="date">
            <text:p>2025-12-21</text:p>
          </table:table-cell>
          <table:table-cell office:value-type="float" office:value="27.46" calcext:value-type="float">
            <text:p>27.46</text:p>
          </table:table-cell>
          <table:table-cell office:value-type="float" office:value="20518163" calcext:value-type="float">
            <text:p>20518163</text:p>
          </table:table-cell>
          <table:table-cell table:formula="of:=AVERAGE([.B518:.B566])" office:value-type="float" office:value="27.2675510204082" calcext:value-type="float">
            <text:p>27.2675510204082</text:p>
          </table:table-cell>
          <table:table-cell table:formula="of:=AVERAGE([.B468:.B566])" office:value-type="float" office:value="27.1769696969697" calcext:value-type="float">
            <text:p>27.1769696969697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27.62" calcext:value-type="float">
            <text:p>27.62</text:p>
          </table:table-cell>
          <table:table-cell office:value-type="float" office:value="20436792" calcext:value-type="float">
            <text:p>20436792</text:p>
          </table:table-cell>
          <table:table-cell table:formula="of:=AVERAGE([.B519:.B567])" office:value-type="float" office:value="27.2820408163265" calcext:value-type="float">
            <text:p>27.2820408163265</text:p>
          </table:table-cell>
          <table:table-cell table:formula="of:=AVERAGE([.B469:.B567])" office:value-type="float" office:value="27.1767676767677" calcext:value-type="float">
            <text:p>27.1767676767677</text:p>
          </table:table-cell>
        </table:table-row>
        <table:table-row table:style-name="ro1">
          <table:table-cell office:value-type="date" office:date-value="2025-12-23" calcext:value-type="date">
            <text:p>2025-12-23</text:p>
          </table:table-cell>
          <table:table-cell office:value-type="float" office:value="27.54" calcext:value-type="float">
            <text:p>27.54</text:p>
          </table:table-cell>
          <table:table-cell office:value-type="float" office:value="16626444" calcext:value-type="float">
            <text:p>16626444</text:p>
          </table:table-cell>
          <table:table-cell table:formula="of:=AVERAGE([.B520:.B568])" office:value-type="float" office:value="27.3055102040816" calcext:value-type="float">
            <text:p>27.3055102040816</text:p>
          </table:table-cell>
          <table:table-cell table:formula="of:=AVERAGE([.B470:.B568])" office:value-type="float" office:value="27.1781818181818" calcext:value-type="float">
            <text:p>27.1781818181818</text:p>
          </table:table-cell>
        </table:table-row>
        <table:table-row table:style-name="ro1">
          <table:table-cell office:value-type="date" office:date-value="2025-12-24" calcext:value-type="date">
            <text:p>2025-12-24</text:p>
          </table:table-cell>
          <table:table-cell office:value-type="float" office:value="27.66" calcext:value-type="float">
            <text:p>27.66</text:p>
          </table:table-cell>
          <table:table-cell office:value-type="float" office:value="9031881" calcext:value-type="float">
            <text:p>9031881</text:p>
          </table:table-cell>
          <table:table-cell table:formula="of:=AVERAGE([.B521:.B569])" office:value-type="float" office:value="27.3279591836735" calcext:value-type="float">
            <text:p>27.3279591836735</text:p>
          </table:table-cell>
          <table:table-cell table:formula="of:=AVERAGE([.B471:.B569])" office:value-type="float" office:value="27.180202020202" calcext:value-type="float">
            <text:p>27.180202020202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float" office:value="27.66" calcext:value-type="float">
            <text:p>27.66</text:p>
          </table:table-cell>
          <table:table-cell office:value-type="float" office:value="9031881" calcext:value-type="float">
            <text:p>9031881</text:p>
          </table:table-cell>
          <table:table-cell table:formula="of:=AVERAGE([.B522:.B570])" office:value-type="float" office:value="27.3502040816327" calcext:value-type="float">
            <text:p>27.3502040816327</text:p>
          </table:table-cell>
          <table:table-cell table:formula="of:=AVERAGE([.B472:.B570])" office:value-type="float" office:value="27.1826262626263" calcext:value-type="float">
            <text:p>27.1826262626263</text:p>
          </table:table-cell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27.64" calcext:value-type="float">
            <text:p>27.64</text:p>
          </table:table-cell>
          <table:table-cell office:value-type="float" office:value="15949446" calcext:value-type="float">
            <text:p>15949446</text:p>
          </table:table-cell>
          <table:table-cell table:formula="of:=AVERAGE([.B523:.B571])" office:value-type="float" office:value="27.3734693877551" calcext:value-type="float">
            <text:p>27.3734693877551</text:p>
          </table:table-cell>
          <table:table-cell table:formula="of:=AVERAGE([.B473:.B571])" office:value-type="float" office:value="27.1845454545455" calcext:value-type="float">
            <text:p>27.1845454545455</text:p>
          </table:table-cell>
        </table:table-row>
        <table:table-row table:style-name="ro1">
          <table:table-cell office:value-type="date" office:date-value="2025-12-27" calcext:value-type="date">
            <text:p>2025-12-27</text:p>
          </table:table-cell>
          <table:table-cell office:value-type="float" office:value="27.64" calcext:value-type="float">
            <text:p>27.64</text:p>
          </table:table-cell>
          <table:table-cell office:value-type="float" office:value="15949446" calcext:value-type="float">
            <text:p>15949446</text:p>
          </table:table-cell>
          <table:table-cell table:formula="of:=AVERAGE([.B524:.B572])" office:value-type="float" office:value="27.3922448979592" calcext:value-type="float">
            <text:p>27.3922448979592</text:p>
          </table:table-cell>
          <table:table-cell table:formula="of:=AVERAGE([.B474:.B572])" office:value-type="float" office:value="27.1864646464646" calcext:value-type="float">
            <text:p>27.1864646464646</text:p>
          </table:table-cell>
        </table:table-row>
        <table:table-row table:style-name="ro1">
          <table:table-cell office:value-type="date" office:date-value="2025-12-28" calcext:value-type="date">
            <text:p>2025-12-28</text:p>
          </table:table-cell>
          <table:table-cell office:value-type="float" office:value="27.64" calcext:value-type="float">
            <text:p>27.64</text:p>
          </table:table-cell>
          <table:table-cell office:value-type="float" office:value="15949446" calcext:value-type="float">
            <text:p>15949446</text:p>
          </table:table-cell>
          <table:table-cell table:formula="of:=AVERAGE([.B525:.B573])" office:value-type="float" office:value="27.4110204081633" calcext:value-type="float">
            <text:p>27.4110204081633</text:p>
          </table:table-cell>
          <table:table-cell table:formula="of:=AVERAGE([.B475:.B573])" office:value-type="float" office:value="27.189595959596" calcext:value-type="float">
            <text:p>27.189595959596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27.62" calcext:value-type="float">
            <text:p>27.62</text:p>
          </table:table-cell>
          <table:table-cell office:value-type="float" office:value="15289757" calcext:value-type="float">
            <text:p>15289757</text:p>
          </table:table-cell>
          <table:table-cell table:formula="of:=AVERAGE([.B526:.B574])" office:value-type="float" office:value="27.4297959183673" calcext:value-type="float">
            <text:p>27.4297959183673</text:p>
          </table:table-cell>
          <table:table-cell table:formula="of:=AVERAGE([.B476:.B574])" office:value-type="float" office:value="27.1927272727273" calcext:value-type="float">
            <text:p>27.1927272727273</text:p>
          </table:table-cell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27.63" calcext:value-type="float">
            <text:p>27.63</text:p>
          </table:table-cell>
          <table:table-cell office:value-type="float" office:value="15209769" calcext:value-type="float">
            <text:p>15209769</text:p>
          </table:table-cell>
          <table:table-cell table:formula="of:=AVERAGE([.B527:.B575])" office:value-type="float" office:value="27.4471428571429" calcext:value-type="float">
            <text:p>27.4471428571429</text:p>
          </table:table-cell>
          <table:table-cell table:formula="of:=AVERAGE([.B477:.B575])" office:value-type="float" office:value="27.1956565656566" calcext:value-type="float">
            <text:p>27.1956565656566</text:p>
          </table:table-cell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27.43" calcext:value-type="float">
            <text:p>27.43</text:p>
          </table:table-cell>
          <table:table-cell office:value-type="float" office:value="14202430" calcext:value-type="float">
            <text:p>14202430</text:p>
          </table:table-cell>
          <table:table-cell table:formula="of:=AVERAGE([.B528:.B576])" office:value-type="float" office:value="27.4563265306122" calcext:value-type="float">
            <text:p>27.4563265306122</text:p>
          </table:table-cell>
          <table:table-cell table:formula="of:=AVERAGE([.B478:.B576])" office:value-type="float" office:value="27.1994949494949" calcext:value-type="float">
            <text:p>27.1994949494949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27.43" calcext:value-type="float">
            <text:p>27.43</text:p>
          </table:table-cell>
          <table:table-cell office:value-type="float" office:value="14202430" calcext:value-type="float">
            <text:p>14202430</text:p>
          </table:table-cell>
          <table:table-cell table:formula="of:=AVERAGE([.B529:.B577])" office:value-type="float" office:value="27.4612244897959" calcext:value-type="float">
            <text:p>27.4612244897959</text:p>
          </table:table-cell>
          <table:table-cell table:formula="of:=AVERAGE([.B479:.B577])" office:value-type="float" office:value="27.199797979798" calcext:value-type="float">
            <text:p>27.199797979798</text:p>
          </table:table-cell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27.73" calcext:value-type="float">
            <text:p>27.73</text:p>
          </table:table-cell>
          <table:table-cell office:value-type="float" office:value="22356222" calcext:value-type="float">
            <text:p>22356222</text:p>
          </table:table-cell>
          <table:table-cell table:formula="of:=AVERAGE([.B530:.B578])" office:value-type="float" office:value="27.4655102040816" calcext:value-type="float">
            <text:p>27.4655102040816</text:p>
          </table:table-cell>
          <table:table-cell table:formula="of:=AVERAGE([.B480:.B578])" office:value-type="float" office:value="27.2025252525253" calcext:value-type="float">
            <text:p>27.2025252525253</text:p>
          </table:table-cell>
        </table:table-row>
        <table:table-row table:style-name="ro1">
          <table:table-cell office:value-type="date" office:date-value="2026-01-03" calcext:value-type="date">
            <text:p>2026-01-03</text:p>
          </table:table-cell>
          <table:table-cell office:value-type="float" office:value="27.73" calcext:value-type="float">
            <text:p>27.73</text:p>
          </table:table-cell>
          <table:table-cell office:value-type="float" office:value="22356222" calcext:value-type="float">
            <text:p>22356222</text:p>
          </table:table-cell>
          <table:table-cell table:formula="of:=AVERAGE([.B531:.B579])" office:value-type="float" office:value="27.4755102040816" calcext:value-type="float">
            <text:p>27.4755102040816</text:p>
          </table:table-cell>
          <table:table-cell table:formula="of:=AVERAGE([.B481:.B579])" office:value-type="float" office:value="27.21" calcext:value-type="float">
            <text:p>27.21</text:p>
          </table:table-cell>
        </table:table-row>
        <table:table-row table:style-name="ro1">
          <table:table-cell office:value-type="date" office:date-value="2026-01-04" calcext:value-type="date">
            <text:p>2026-01-04</text:p>
          </table:table-cell>
          <table:table-cell office:value-type="float" office:value="27.73" calcext:value-type="float">
            <text:p>27.73</text:p>
          </table:table-cell>
          <table:table-cell office:value-type="float" office:value="22356222" calcext:value-type="float">
            <text:p>22356222</text:p>
          </table:table-cell>
          <table:table-cell table:formula="of:=AVERAGE([.B532:.B580])" office:value-type="float" office:value="27.4855102040816" calcext:value-type="float">
            <text:p>27.4855102040816</text:p>
          </table:table-cell>
          <table:table-cell table:formula="of:=AVERAGE([.B482:.B580])" office:value-type="float" office:value="27.2152525252525" calcext:value-type="float">
            <text:p>27.2152525252525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27.91" calcext:value-type="float">
            <text:p>27.91</text:p>
          </table:table-cell>
          <table:table-cell office:value-type="float" office:value="27203848" calcext:value-type="float">
            <text:p>27203848</text:p>
          </table:table-cell>
          <table:table-cell table:formula="of:=AVERAGE([.B533:.B581])" office:value-type="float" office:value="27.4955102040816" calcext:value-type="float">
            <text:p>27.4955102040816</text:p>
          </table:table-cell>
          <table:table-cell table:formula="of:=AVERAGE([.B483:.B581])" office:value-type="float" office:value="27.2205050505051" calcext:value-type="float">
            <text:p>27.2205050505051</text:p>
          </table:table-cell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28.09" calcext:value-type="float">
            <text:p>28.09</text:p>
          </table:table-cell>
          <table:table-cell office:value-type="float" office:value="18746412" calcext:value-type="float">
            <text:p>18746412</text:p>
          </table:table-cell>
          <table:table-cell table:formula="of:=AVERAGE([.B534:.B582])" office:value-type="float" office:value="27.5140816326531" calcext:value-type="float">
            <text:p>27.5140816326531</text:p>
          </table:table-cell>
          <table:table-cell table:formula="of:=AVERAGE([.B484:.B582])" office:value-type="float" office:value="27.2275757575758" calcext:value-type="float">
            <text:p>27.2275757575758</text:p>
          </table:table-cell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27.9" calcext:value-type="float">
            <text:p>27.9</text:p>
          </table:table-cell>
          <table:table-cell office:value-type="float" office:value="18869992" calcext:value-type="float">
            <text:p>18869992</text:p>
          </table:table-cell>
          <table:table-cell table:formula="of:=AVERAGE([.B535:.B583])" office:value-type="float" office:value="27.5330612244898" calcext:value-type="float">
            <text:p>27.5330612244898</text:p>
          </table:table-cell>
          <table:table-cell table:formula="of:=AVERAGE([.B485:.B583])" office:value-type="float" office:value="27.2375757575758" calcext:value-type="float">
            <text:p>27.2375757575758</text:p>
          </table:table-cell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28.42" calcext:value-type="float">
            <text:p>28.42</text:p>
          </table:table-cell>
          <table:table-cell office:value-type="float" office:value="22373681" calcext:value-type="float">
            <text:p>22373681</text:p>
          </table:table-cell>
          <table:table-cell table:formula="of:=AVERAGE([.B536:.B584])" office:value-type="float" office:value="27.5528571428571" calcext:value-type="float">
            <text:p>27.5528571428571</text:p>
          </table:table-cell>
          <table:table-cell table:formula="of:=AVERAGE([.B486:.B584])" office:value-type="float" office:value="27.2436363636364" calcext:value-type="float">
            <text:p>27.2436363636364</text:p>
          </table:table-cell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28.55" calcext:value-type="float">
            <text:p>28.55</text:p>
          </table:table-cell>
          <table:table-cell office:value-type="float" office:value="17651903" calcext:value-type="float">
            <text:p>17651903</text:p>
          </table:table-cell>
          <table:table-cell table:formula="of:=AVERAGE([.B537:.B585])" office:value-type="float" office:value="27.5895918367347" calcext:value-type="float">
            <text:p>27.5895918367347</text:p>
          </table:table-cell>
          <table:table-cell table:formula="of:=AVERAGE([.B487:.B585])" office:value-type="float" office:value="27.2526262626263" calcext:value-type="float">
            <text:p>27.2526262626263</text:p>
          </table:table-cell>
        </table:table-row>
        <table:table-row table:style-name="ro1">
          <table:table-cell office:value-type="date" office:date-value="2026-01-10" calcext:value-type="date">
            <text:p>2026-01-10</text:p>
          </table:table-cell>
          <table:table-cell office:value-type="float" office:value="28.55" calcext:value-type="float">
            <text:p>28.55</text:p>
          </table:table-cell>
          <table:table-cell office:value-type="float" office:value="17651903" calcext:value-type="float">
            <text:p>17651903</text:p>
          </table:table-cell>
          <table:table-cell table:formula="of:=AVERAGE([.B538:.B586])" office:value-type="float" office:value="27.6191836734694" calcext:value-type="float">
            <text:p>27.6191836734694</text:p>
          </table:table-cell>
          <table:table-cell table:formula="of:=AVERAGE([.B488:.B586])" office:value-type="float" office:value="27.2648484848485" calcext:value-type="float">
            <text:p>27.2648484848485</text:p>
          </table:table-cell>
        </table:table-row>
        <table:table-row table:style-name="ro1">
          <table:table-cell office:value-type="date" office:date-value="2026-01-11" calcext:value-type="date">
            <text:p>2026-01-11</text:p>
          </table:table-cell>
          <table:table-cell office:value-type="float" office:value="28.55" calcext:value-type="float">
            <text:p>28.55</text:p>
          </table:table-cell>
          <table:table-cell office:value-type="float" office:value="17651903" calcext:value-type="float">
            <text:p>17651903</text:p>
          </table:table-cell>
          <table:table-cell table:formula="of:=AVERAGE([.B539:.B587])" office:value-type="float" office:value="27.6487755102041" calcext:value-type="float">
            <text:p>27.6487755102041</text:p>
          </table:table-cell>
          <table:table-cell table:formula="of:=AVERAGE([.B489:.B587])" office:value-type="float" office:value="27.2763636363636" calcext:value-type="float">
            <text:p>27.276363636363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28.5" calcext:value-type="float">
            <text:p>28.5</text:p>
          </table:table-cell>
          <table:table-cell office:value-type="float" office:value="24490529" calcext:value-type="float">
            <text:p>24490529</text:p>
          </table:table-cell>
          <table:table-cell table:formula="of:=AVERAGE([.B540:.B588])" office:value-type="float" office:value="27.6783673469388" calcext:value-type="float">
            <text:p>27.6783673469388</text:p>
          </table:table-cell>
          <table:table-cell table:formula="of:=AVERAGE([.B490:.B588])" office:value-type="float" office:value="27.2878787878788" calcext:value-type="float">
            <text:p>27.2878787878788</text:p>
          </table:table-cell>
        </table:table-row>
        <table:table-row table:style-name="ro1">
          <table:table-cell office:value-type="date" office:date-value="2026-01-13" calcext:value-type="date">
            <text:p>2026-01-13</text:p>
          </table:table-cell>
          <table:table-cell office:value-type="float" office:value="28.62" calcext:value-type="float">
            <text:p>28.62</text:p>
          </table:table-cell>
          <table:table-cell office:value-type="float" office:value="18445501" calcext:value-type="float">
            <text:p>18445501</text:p>
          </table:table-cell>
          <table:table-cell table:formula="of:=AVERAGE([.B541:.B589])" office:value-type="float" office:value="27.71" calcext:value-type="float">
            <text:p>27.71</text:p>
          </table:table-cell>
          <table:table-cell table:formula="of:=AVERAGE([.B491:.B589])" office:value-type="float" office:value="27.2988888888889" calcext:value-type="float">
            <text:p>27.2988888888889</text:p>
          </table:table-cell>
        </table:table-row>
        <table:table-row table:style-name="ro1">
          <table:table-cell office:value-type="date" office:date-value="2026-01-14" calcext:value-type="date">
            <text:p>2026-01-14</text:p>
          </table:table-cell>
          <table:table-cell office:value-type="float" office:value="29.04" calcext:value-type="float">
            <text:p>29.04</text:p>
          </table:table-cell>
          <table:table-cell office:value-type="float" office:value="21696872" calcext:value-type="float">
            <text:p>21696872</text:p>
          </table:table-cell>
          <table:table-cell table:formula="of:=AVERAGE([.B542:.B590])" office:value-type="float" office:value="27.7365306122449" calcext:value-type="float">
            <text:p>27.7365306122449</text:p>
          </table:table-cell>
          <table:table-cell table:formula="of:=AVERAGE([.B492:.B590])" office:value-type="float" office:value="27.3118181818182" calcext:value-type="float">
            <text:p>27.3118181818182</text:p>
          </table:table-cell>
        </table:table-row>
        <table:table-row table:style-name="ro1">
          <table:table-cell office:value-type="date" office:date-value="2026-01-15" calcext:value-type="date">
            <text:p>2026-01-15</text:p>
          </table:table-cell>
          <table:table-cell office:value-type="float" office:value="29.03" calcext:value-type="float">
            <text:p>29.03</text:p>
          </table:table-cell>
          <table:table-cell office:value-type="float" office:value="18253059" calcext:value-type="float">
            <text:p>18253059</text:p>
          </table:table-cell>
          <table:table-cell table:formula="of:=AVERAGE([.B543:.B591])" office:value-type="float" office:value="27.7689795918367" calcext:value-type="float">
            <text:p>27.7689795918367</text:p>
          </table:table-cell>
          <table:table-cell table:formula="of:=AVERAGE([.B493:.B591])" office:value-type="float" office:value="27.329595959596" calcext:value-type="float">
            <text:p>27.329595959596</text:p>
          </table:table-cell>
        </table:table-row>
        <table:table-row table:style-name="ro1">
          <table:table-cell office:value-type="date" office:date-value="2026-01-16" calcext:value-type="date">
            <text:p>2026-01-16</text:p>
          </table:table-cell>
          <table:table-cell office:value-type="float" office:value="28.9" calcext:value-type="float">
            <text:p>28.9</text:p>
          </table:table-cell>
          <table:table-cell office:value-type="float" office:value="19792286" calcext:value-type="float">
            <text:p>19792286</text:p>
          </table:table-cell>
          <table:table-cell table:formula="of:=AVERAGE([.B544:.B592])" office:value-type="float" office:value="27.8012244897959" calcext:value-type="float">
            <text:p>27.8012244897959</text:p>
          </table:table-cell>
          <table:table-cell table:formula="of:=AVERAGE([.B494:.B592])" office:value-type="float" office:value="27.3482828282828" calcext:value-type="float">
            <text:p>27.3482828282828</text:p>
          </table:table-cell>
        </table:table-row>
        <table:table-row table:style-name="ro1">
          <table:table-cell office:value-type="date" office:date-value="2026-01-17" calcext:value-type="date">
            <text:p>2026-01-17</text:p>
          </table:table-cell>
          <table:table-cell office:value-type="float" office:value="28.9" calcext:value-type="float">
            <text:p>28.9</text:p>
          </table:table-cell>
          <table:table-cell office:value-type="float" office:value="19792286" calcext:value-type="float">
            <text:p>19792286</text:p>
          </table:table-cell>
          <table:table-cell table:formula="of:=AVERAGE([.B545:.B593])" office:value-type="float" office:value="27.8279591836735" calcext:value-type="float">
            <text:p>27.8279591836735</text:p>
          </table:table-cell>
          <table:table-cell table:formula="of:=AVERAGE([.B495:.B593])" office:value-type="float" office:value="27.3674747474748" calcext:value-type="float">
            <text:p>27.3674747474748</text:p>
          </table:table-cell>
        </table:table-row>
        <table:table-row table:style-name="ro1">
          <table:table-cell office:value-type="date" office:date-value="2026-01-18" calcext:value-type="date">
            <text:p>2026-01-18</text:p>
          </table:table-cell>
          <table:table-cell office:value-type="float" office:value="28.9" calcext:value-type="float">
            <text:p>28.9</text:p>
          </table:table-cell>
          <table:table-cell office:value-type="float" office:value="19792286" calcext:value-type="float">
            <text:p>19792286</text:p>
          </table:table-cell>
          <table:table-cell table:formula="of:=AVERAGE([.B546:.B594])" office:value-type="float" office:value="27.854693877551" calcext:value-type="float">
            <text:p>27.854693877551</text:p>
          </table:table-cell>
          <table:table-cell table:formula="of:=AVERAGE([.B496:.B594])" office:value-type="float" office:value="27.3913131313131" calcext:value-type="float">
            <text:p>27.3913131313131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28.9" calcext:value-type="float">
            <text:p>28.9</text:p>
          </table:table-cell>
          <table:table-cell office:value-type="float" office:value="19792286" calcext:value-type="float">
            <text:p>19792286</text:p>
          </table:table-cell>
          <table:table-cell table:formula="of:=AVERAGE([.B547:.B595])" office:value-type="float" office:value="27.8814285714286" calcext:value-type="float">
            <text:p>27.8814285714286</text:p>
          </table:table-cell>
          <table:table-cell table:formula="of:=AVERAGE([.B497:.B595])" office:value-type="float" office:value="27.4151515151515" calcext:value-type="float">
            <text:p>27.4151515151515</text:p>
          </table:table-cell>
        </table:table-row>
        <table:table-row table:style-name="ro1">
          <table:table-cell office:value-type="date" office:date-value="2026-01-20" calcext:value-type="date">
            <text:p>2026-01-20</text:p>
          </table:table-cell>
          <table:table-cell office:value-type="float" office:value="28.7" calcext:value-type="float">
            <text:p>28.7</text:p>
          </table:table-cell>
          <table:table-cell office:value-type="float" office:value="24135561" calcext:value-type="float">
            <text:p>24135561</text:p>
          </table:table-cell>
          <table:table-cell table:formula="of:=AVERAGE([.B548:.B596])" office:value-type="float" office:value="27.909387755102" calcext:value-type="float">
            <text:p>27.909387755102</text:p>
          </table:table-cell>
          <table:table-cell table:formula="of:=AVERAGE([.B498:.B596])" office:value-type="float" office:value="27.4389898989899" calcext:value-type="float">
            <text:p>27.4389898989899</text:p>
          </table:table-cell>
        </table:table-row>
        <table:table-row table:style-name="ro1">
          <table:table-cell office:value-type="date" office:date-value="2026-01-21" calcext:value-type="date">
            <text:p>2026-01-21</text:p>
          </table:table-cell>
          <table:table-cell office:value-type="float" office:value="29.15" calcext:value-type="float">
            <text:p>29.15</text:p>
          </table:table-cell>
          <table:table-cell office:value-type="float" office:value="20011385" calcext:value-type="float">
            <text:p>20011385</text:p>
          </table:table-cell>
          <table:table-cell table:formula="of:=AVERAGE([.B549:.B597])" office:value-type="float" office:value="27.9359183673469" calcext:value-type="float">
            <text:p>27.9359183673469</text:p>
          </table:table-cell>
          <table:table-cell table:formula="of:=AVERAGE([.B499:.B597])" office:value-type="float" office:value="27.459898989899" calcext:value-type="float">
            <text:p>27.459898989899</text:p>
          </table:table-cell>
        </table:table-row>
        <table:table-row table:style-name="ro1">
          <table:table-cell office:value-type="date" office:date-value="2026-01-22" calcext:value-type="date">
            <text:p>2026-01-22</text:p>
          </table:table-cell>
          <table:table-cell office:value-type="float" office:value="29.17" calcext:value-type="float">
            <text:p>29.17</text:p>
          </table:table-cell>
          <table:table-cell office:value-type="float" office:value="16445972" calcext:value-type="float">
            <text:p>16445972</text:p>
          </table:table-cell>
          <table:table-cell table:formula="of:=AVERAGE([.B550:.B598])" office:value-type="float" office:value="27.9634693877551" calcext:value-type="float">
            <text:p>27.9634693877551</text:p>
          </table:table-cell>
          <table:table-cell table:formula="of:=AVERAGE([.B500:.B598])" office:value-type="float" office:value="27.4829292929293" calcext:value-type="float">
            <text:p>27.4829292929293</text:p>
          </table:table-cell>
        </table:table-row>
        <table:table-row table:style-name="ro1">
          <table:table-cell office:value-type="date" office:date-value="2026-01-23" calcext:value-type="date">
            <text:p>2026-01-23</text:p>
          </table:table-cell>
          <table:table-cell office:value-type="float" office:value="29.14" calcext:value-type="float">
            <text:p>29.14</text:p>
          </table:table-cell>
          <table:table-cell office:value-type="float" office:value="19242845" calcext:value-type="float">
            <text:p>19242845</text:p>
          </table:table-cell>
          <table:table-cell table:formula="of:=AVERAGE([.B551:.B599])" office:value-type="float" office:value="27.9924489795918" calcext:value-type="float">
            <text:p>27.9924489795918</text:p>
          </table:table-cell>
          <table:table-cell table:formula="of:=AVERAGE([.B501:.B599])" office:value-type="float" office:value="27.5070707070707" calcext:value-type="float">
            <text:p>27.5070707070707</text:p>
          </table:table-cell>
        </table:table-row>
        <table:table-row table:style-name="ro1">
          <table:table-cell office:value-type="date" office:date-value="2026-01-24" calcext:value-type="date">
            <text:p>2026-01-24</text:p>
          </table:table-cell>
          <table:table-cell office:value-type="float" office:value="29.14" calcext:value-type="float">
            <text:p>29.14</text:p>
          </table:table-cell>
          <table:table-cell office:value-type="float" office:value="19242845" calcext:value-type="float">
            <text:p>19242845</text:p>
          </table:table-cell>
          <table:table-cell table:formula="of:=AVERAGE([.B552:.B600])" office:value-type="float" office:value="28.0216326530612" calcext:value-type="float">
            <text:p>28.0216326530612</text:p>
          </table:table-cell>
          <table:table-cell table:formula="of:=AVERAGE([.B502:.B600])" office:value-type="float" office:value="27.5330303030303" calcext:value-type="float">
            <text:p>27.5330303030303</text:p>
          </table:table-cell>
        </table:table-row>
        <table:table-row table:style-name="ro1">
          <table:table-cell office:value-type="date" office:date-value="2026-01-25" calcext:value-type="date">
            <text:p>2026-01-25</text:p>
          </table:table-cell>
          <table:table-cell office:value-type="float" office:value="29.14" calcext:value-type="float">
            <text:p>29.14</text:p>
          </table:table-cell>
          <table:table-cell office:value-type="float" office:value="19242845" calcext:value-type="float">
            <text:p>19242845</text:p>
          </table:table-cell>
          <table:table-cell table:formula="of:=AVERAGE([.B553:.B601])" office:value-type="float" office:value="28.0508163265306" calcext:value-type="float">
            <text:p>28.0508163265306</text:p>
          </table:table-cell>
          <table:table-cell table:formula="of:=AVERAGE([.B503:.B601])" office:value-type="float" office:value="27.5567676767677" calcext:value-type="float">
            <text:p>27.5567676767677</text:p>
          </table:table-cell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float" office:value="29.18" calcext:value-type="float">
            <text:p>29.18</text:p>
          </table:table-cell>
          <table:table-cell office:value-type="float" office:value="19124766" calcext:value-type="float">
            <text:p>19124766</text:p>
          </table:table-cell>
          <table:table-cell table:formula="of:=AVERAGE([.B554:.B602])" office:value-type="float" office:value="28.08" calcext:value-type="float">
            <text:p>28.08</text:p>
          </table:table-cell>
          <table:table-cell table:formula="of:=AVERAGE([.B504:.B602])" office:value-type="float" office:value="27.5805050505051" calcext:value-type="float">
            <text:p>27.5805050505051</text:p>
          </table:table-cell>
        </table:table-row>
        <table:table-row table:style-name="ro1">
          <table:table-cell office:value-type="date" office:date-value="2026-01-27" calcext:value-type="date">
            <text:p>2026-01-27</text:p>
          </table:table-cell>
          <table:table-cell office:value-type="float" office:value="29.37" calcext:value-type="float">
            <text:p>29.37</text:p>
          </table:table-cell>
          <table:table-cell office:value-type="float" office:value="14886223" calcext:value-type="float">
            <text:p>14886223</text:p>
          </table:table-cell>
          <table:table-cell table:formula="of:=AVERAGE([.B555:.B603])" office:value-type="float" office:value="28.1126530612245" calcext:value-type="float">
            <text:p>28.1126530612245</text:p>
          </table:table-cell>
          <table:table-cell table:formula="of:=AVERAGE([.B505:.B603])" office:value-type="float" office:value="27.6046464646465" calcext:value-type="float">
            <text:p>27.6046464646465</text:p>
          </table:table-cell>
        </table:table-row>
        <table:table-row table:style-name="ro1">
          <table:table-cell office:value-type="date" office:date-value="2026-01-28" calcext:value-type="date">
            <text:p>2026-01-28</text:p>
          </table:table-cell>
          <table:table-cell office:value-type="float" office:value="29.3" calcext:value-type="float">
            <text:p>29.3</text:p>
          </table:table-cell>
          <table:table-cell office:value-type="float" office:value="19578367" calcext:value-type="float">
            <text:p>19578367</text:p>
          </table:table-cell>
          <table:table-cell table:formula="of:=AVERAGE([.B556:.B604])" office:value-type="float" office:value="28.1516326530612" calcext:value-type="float">
            <text:p>28.1516326530612</text:p>
          </table:table-cell>
          <table:table-cell table:formula="of:=AVERAGE([.B506:.B604])" office:value-type="float" office:value="27.6286868686869" calcext:value-type="float">
            <text:p>27.6286868686869</text:p>
          </table:table-cell>
        </table:table-row>
        <table:table-row table:style-name="ro1">
          <table:table-cell office:value-type="date" office:date-value="2026-01-29" calcext:value-type="date">
            <text:p>2026-01-29</text:p>
          </table:table-cell>
          <table:table-cell office:value-type="float" office:value="29.37" calcext:value-type="float">
            <text:p>29.37</text:p>
          </table:table-cell>
          <table:table-cell office:value-type="float" office:value="27141854" calcext:value-type="float">
            <text:p>27141854</text:p>
          </table:table-cell>
          <table:table-cell table:formula="of:=AVERAGE([.B557:.B605])" office:value-type="float" office:value="28.1869387755102" calcext:value-type="float">
            <text:p>28.1869387755102</text:p>
          </table:table-cell>
          <table:table-cell table:formula="of:=AVERAGE([.B507:.B605])" office:value-type="float" office:value="27.6512121212121" calcext:value-type="float">
            <text:p>27.6512121212121</text:p>
          </table:table-cell>
        </table:table-row>
        <table:table-row table:style-name="ro1">
          <table:table-cell office:value-type="date" office:date-value="2026-01-30" calcext:value-type="date">
            <text:p>2026-01-30</text:p>
          </table:table-cell>
          <table:table-cell office:value-type="float" office:value="29.82" calcext:value-type="float">
            <text:p>29.82</text:p>
          </table:table-cell>
          <table:table-cell office:value-type="float" office:value="22771155" calcext:value-type="float">
            <text:p>22771155</text:p>
          </table:table-cell>
          <table:table-cell table:formula="of:=AVERAGE([.B558:.B606])" office:value-type="float" office:value="28.2214285714286" calcext:value-type="float">
            <text:p>28.2214285714286</text:p>
          </table:table-cell>
          <table:table-cell table:formula="of:=AVERAGE([.B508:.B606])" office:value-type="float" office:value="27.6752525252525" calcext:value-type="float">
            <text:p>27.6752525252525</text:p>
          </table:table-cell>
        </table:table-row>
        <table:table-row table:style-name="ro1">
          <table:table-cell office:value-type="date" office:date-value="2026-01-31" calcext:value-type="date">
            <text:p>2026-01-31</text:p>
          </table:table-cell>
          <table:table-cell office:value-type="float" office:value="29.82" calcext:value-type="float">
            <text:p>29.82</text:p>
          </table:table-cell>
          <table:table-cell office:value-type="float" office:value="22771155" calcext:value-type="float">
            <text:p>22771155</text:p>
          </table:table-cell>
          <table:table-cell table:formula="of:=AVERAGE([.B559:.B607])" office:value-type="float" office:value="28.2651020408163" calcext:value-type="float">
            <text:p>28.2651020408163</text:p>
          </table:table-cell>
          <table:table-cell table:formula="of:=AVERAGE([.B509:.B607])" office:value-type="float" office:value="27.7034343434343" calcext:value-type="float">
            <text:p>27.7034343434343</text:p>
          </table:table-cell>
        </table:table-row>
        <table:table-row table:style-name="ro1">
          <table:table-cell office:value-type="date" office:date-value="2026-02-01" calcext:value-type="date">
            <text:p>2026-02-01</text:p>
          </table:table-cell>
          <table:table-cell office:value-type="float" office:value="29.82" calcext:value-type="float">
            <text:p>29.82</text:p>
          </table:table-cell>
          <table:table-cell office:value-type="float" office:value="22771155" calcext:value-type="float">
            <text:p>22771155</text:p>
          </table:table-cell>
          <table:table-cell table:formula="of:=AVERAGE([.B560:.B608])" office:value-type="float" office:value="28.3087755102041" calcext:value-type="float">
            <text:p>28.3087755102041</text:p>
          </table:table-cell>
          <table:table-cell table:formula="of:=AVERAGE([.B510:.B608])" office:value-type="float" office:value="27.7316161616162" calcext:value-type="float">
            <text:p>27.7316161616162</text:p>
          </table:table-cell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float" office:value="30" calcext:value-type="float">
            <text:p>30</text:p>
          </table:table-cell>
          <table:table-cell office:value-type="float" office:value="23678852" calcext:value-type="float">
            <text:p>23678852</text:p>
          </table:table-cell>
          <table:table-cell table:formula="of:=AVERAGE([.B561:.B609])" office:value-type="float" office:value="28.3524489795918" calcext:value-type="float">
            <text:p>28.3524489795918</text:p>
          </table:table-cell>
          <table:table-cell table:formula="of:=AVERAGE([.B511:.B609])" office:value-type="float" office:value="27.759797979798" calcext:value-type="float">
            <text:p>27.759797979798</text:p>
          </table:table-cell>
        </table:table-row>
        <table:table-row table:style-name="ro1">
          <table:table-cell office:value-type="date" office:date-value="2026-02-03" calcext:value-type="date">
            <text:p>2026-02-03</text:p>
          </table:table-cell>
          <table:table-cell office:value-type="float" office:value="30.5" calcext:value-type="float">
            <text:p>30.5</text:p>
          </table:table-cell>
          <table:table-cell office:value-type="float" office:value="28640062" calcext:value-type="float">
            <text:p>28640062</text:p>
          </table:table-cell>
          <table:table-cell table:formula="of:=AVERAGE([.B562:.B610])" office:value-type="float" office:value="28.3981632653061" calcext:value-type="float">
            <text:p>28.3981632653061</text:p>
          </table:table-cell>
          <table:table-cell table:formula="of:=AVERAGE([.B512:.B610])" office:value-type="float" office:value="27.789797979798" calcext:value-type="float">
            <text:p>27.789797979798</text:p>
          </table:table-cell>
        </table:table-row>
        <table:table-row table:style-name="ro1">
          <table:table-cell office:value-type="date" office:date-value="2026-02-04" calcext:value-type="date">
            <text:p>2026-02-04</text:p>
          </table:table-cell>
          <table:table-cell office:value-type="float" office:value="31.01" calcext:value-type="float">
            <text:p>31.01</text:p>
          </table:table-cell>
          <table:table-cell office:value-type="float" office:value="34231572" calcext:value-type="float">
            <text:p>34231572</text:p>
          </table:table-cell>
          <table:table-cell table:formula="of:=AVERAGE([.B563:.B611])" office:value-type="float" office:value="28.46" calcext:value-type="float">
            <text:p>28.46</text:p>
          </table:table-cell>
          <table:table-cell table:formula="of:=AVERAGE([.B513:.B611])" office:value-type="float" office:value="27.8239393939394" calcext:value-type="float">
            <text:p>27.8239393939394</text:p>
          </table:table-cell>
        </table:table-row>
        <table:table-row table:style-name="ro1">
          <table:table-cell office:value-type="date" office:date-value="2026-02-05" calcext:value-type="date">
            <text:p>2026-02-05</text:p>
          </table:table-cell>
          <table:table-cell office:value-type="float" office:value="30.97" calcext:value-type="float">
            <text:p>30.97</text:p>
          </table:table-cell>
          <table:table-cell office:value-type="float" office:value="31348376" calcext:value-type="float">
            <text:p>31348376</text:p>
          </table:table-cell>
          <table:table-cell table:formula="of:=AVERAGE([.B564:.B612])" office:value-type="float" office:value="28.5295918367347" calcext:value-type="float">
            <text:p>28.5295918367347</text:p>
          </table:table-cell>
          <table:table-cell table:formula="of:=AVERAGE([.B514:.B612])" office:value-type="float" office:value="27.8644444444444" calcext:value-type="float">
            <text:p>27.8644444444444</text:p>
          </table:table-cell>
        </table:table-row>
        <table:table-row table:style-name="ro1">
          <table:table-cell office:value-type="date" office:date-value="2026-02-06" calcext:value-type="date">
            <text:p>2026-02-06</text:p>
          </table:table-cell>
          <table:table-cell office:value-type="float" office:value="31.47" calcext:value-type="float">
            <text:p>31.47</text:p>
          </table:table-cell>
          <table:table-cell office:value-type="float" office:value="27103727" calcext:value-type="float">
            <text:p>27103727</text:p>
          </table:table-cell>
          <table:table-cell table:formula="of:=AVERAGE([.B565:.B613])" office:value-type="float" office:value="28.6008163265306" calcext:value-type="float">
            <text:p>28.6008163265306</text:p>
          </table:table-cell>
          <table:table-cell table:formula="of:=AVERAGE([.B515:.B613])" office:value-type="float" office:value="27.9071717171717" calcext:value-type="float">
            <text:p>27.9071717171717</text:p>
          </table:table-cell>
        </table:table-row>
        <table:table-row table:style-name="ro1">
          <table:table-cell office:value-type="date" office:date-value="2026-02-07" calcext:value-type="date">
            <text:p>2026-02-07</text:p>
          </table:table-cell>
          <table:table-cell office:value-type="float" office:value="31.47" calcext:value-type="float">
            <text:p>31.47</text:p>
          </table:table-cell>
          <table:table-cell office:value-type="float" office:value="27103727" calcext:value-type="float">
            <text:p>27103727</text:p>
          </table:table-cell>
          <table:table-cell table:formula="of:=AVERAGE([.B566:.B614])" office:value-type="float" office:value="28.6826530612245" calcext:value-type="float">
            <text:p>28.6826530612245</text:p>
          </table:table-cell>
          <table:table-cell table:formula="of:=AVERAGE([.B516:.B614])" office:value-type="float" office:value="27.9555555555556" calcext:value-type="float">
            <text:p>27.9555555555556</text:p>
          </table:table-cell>
        </table:table-row>
        <table:table-row table:style-name="ro1">
          <table:table-cell office:value-type="date" office:date-value="2026-02-08" calcext:value-type="date">
            <text:p>2026-02-08</text:p>
          </table:table-cell>
          <table:table-cell office:value-type="float" office:value="31.47" calcext:value-type="float">
            <text:p>31.47</text:p>
          </table:table-cell>
          <table:table-cell office:value-type="float" office:value="27103727" calcext:value-type="float">
            <text:p>27103727</text:p>
          </table:table-cell>
          <table:table-cell table:formula="of:=AVERAGE([.B567:.B615])" office:value-type="float" office:value="28.7644897959184" calcext:value-type="float">
            <text:p>28.7644897959184</text:p>
          </table:table-cell>
          <table:table-cell table:formula="of:=AVERAGE([.B517:.B615])" office:value-type="float" office:value="28.0032323232323" calcext:value-type="float">
            <text:p>28.0032323232323</text:p>
          </table:table-cell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office:value-type="float" office:value="31.35" calcext:value-type="float">
            <text:p>31.35</text:p>
          </table:table-cell>
          <table:table-cell office:value-type="float" office:value="25465191" calcext:value-type="float">
            <text:p>25465191</text:p>
          </table:table-cell>
          <table:table-cell table:formula="of:=AVERAGE([.B568:.B616])" office:value-type="float" office:value="28.8463265306122" calcext:value-type="float">
            <text:p>28.8463265306122</text:p>
          </table:table-cell>
          <table:table-cell table:formula="of:=AVERAGE([.B518:.B616])" office:value-type="float" office:value="28.0509090909091" calcext:value-type="float">
            <text:p>28.0509090909091</text:p>
          </table:table-cell>
        </table:table-row>
        <table:table-row table:style-name="ro1">
          <table:table-cell office:value-type="date" office:date-value="2026-02-10" calcext:value-type="date">
            <text:p>2026-02-10</text:p>
          </table:table-cell>
          <table:table-cell office:value-type="float" office:value="31.3" calcext:value-type="float">
            <text:p>31.3</text:p>
          </table:table-cell>
          <table:table-cell office:value-type="float" office:value="20978001" calcext:value-type="float">
            <text:p>20978001</text:p>
          </table:table-cell>
          <table:table-cell table:formula="of:=AVERAGE([.B569:.B617])" office:value-type="float" office:value="28.9224489795918" calcext:value-type="float">
            <text:p>28.9224489795918</text:p>
          </table:table-cell>
          <table:table-cell table:formula="of:=AVERAGE([.B519:.B617])" office:value-type="float" office:value="28.0973737373737" calcext:value-type="float">
            <text:p>28.0973737373737</text:p>
          </table:table-cell>
        </table:table-row>
        <table:table-row table:style-name="ro1">
          <table:table-cell office:value-type="date" office:date-value="2026-02-11" calcext:value-type="date">
            <text:p>2026-02-11</text:p>
          </table:table-cell>
          <table:table-cell office:value-type="float" office:value="31.64" calcext:value-type="float">
            <text:p>31.64</text:p>
          </table:table-cell>
          <table:table-cell office:value-type="float" office:value="23176757" calcext:value-type="float">
            <text:p>23176757</text:p>
          </table:table-cell>
          <table:table-cell table:formula="of:=AVERAGE([.B570:.B618])" office:value-type="float" office:value="28.9991836734694" calcext:value-type="float">
            <text:p>28.9991836734694</text:p>
          </table:table-cell>
          <table:table-cell table:formula="of:=AVERAGE([.B520:.B618])" office:value-type="float" office:value="28.1461616161616" calcext:value-type="float">
            <text:p>28.1461616161616</text:p>
          </table:table-cell>
        </table:table-row>
        <table:table-row table:style-name="ro1">
          <table:table-cell office:value-type="date" office:date-value="2026-02-12" calcext:value-type="date">
            <text:p>2026-02-12</text:p>
          </table:table-cell>
          <table:table-cell office:value-type="float" office:value="31.34" calcext:value-type="float">
            <text:p>31.34</text:p>
          </table:table-cell>
          <table:table-cell office:value-type="float" office:value="23196250" calcext:value-type="float">
            <text:p>23196250</text:p>
          </table:table-cell>
          <table:table-cell table:formula="of:=AVERAGE([.B571:.B619])" office:value-type="float" office:value="29.0804081632653" calcext:value-type="float">
            <text:p>29.0804081632653</text:p>
          </table:table-cell>
          <table:table-cell table:formula="of:=AVERAGE([.B521:.B619])" office:value-type="float" office:value="28.1986868686869" calcext:value-type="float">
            <text:p>28.1986868686869</text:p>
          </table:table-cell>
        </table:table-row>
        <table:table-row table:style-name="ro1">
          <table:table-cell office:value-type="date" office:date-value="2026-02-13" calcext:value-type="date">
            <text:p>2026-02-13</text:p>
          </table:table-cell>
          <table:table-cell office:value-type="float" office:value="31.61" calcext:value-type="float">
            <text:p>31.61</text:p>
          </table:table-cell>
          <table:table-cell office:value-type="float" office:value="29146500" calcext:value-type="float">
            <text:p>29146500</text:p>
          </table:table-cell>
          <table:table-cell table:formula="of:=AVERAGE([.B572:.B620])" office:value-type="float" office:value="29.1555102040816" calcext:value-type="float">
            <text:p>29.1555102040816</text:p>
          </table:table-cell>
          <table:table-cell table:formula="of:=AVERAGE([.B522:.B620])" office:value-type="float" office:value="28.2468686868687" calcext:value-type="float">
            <text:p>28.2468686868687</text:p>
          </table:table-cell>
        </table:table-row>
        <table:table-row table:style-name="ro1">
          <table:table-cell office:value-type="date" office:date-value="2026-02-14" calcext:value-type="date">
            <text:p>2026-02-14</text:p>
          </table:table-cell>
          <table:table-cell office:value-type="float" office:value="31.61" calcext:value-type="float">
            <text:p>31.61</text:p>
          </table:table-cell>
          <table:table-cell office:value-type="float" office:value="29146500" calcext:value-type="float">
            <text:p>29146500</text:p>
          </table:table-cell>
          <table:table-cell table:formula="of:=AVERAGE([.B573:.B621])" office:value-type="float" office:value="29.2365306122449" calcext:value-type="float">
            <text:p>29.2365306122449</text:p>
          </table:table-cell>
          <table:table-cell table:formula="of:=AVERAGE([.B523:.B621])" office:value-type="float" office:value="28.2982828282828" calcext:value-type="float">
            <text:p>28.2982828282828</text:p>
          </table:table-cell>
        </table:table-row>
        <table:table-row table:style-name="ro1">
          <table:table-cell office:value-type="date" office:date-value="2026-02-15" calcext:value-type="date">
            <text:p>2026-02-15</text:p>
          </table:table-cell>
          <table:table-cell office:value-type="float" office:value="31.61" calcext:value-type="float">
            <text:p>31.61</text:p>
          </table:table-cell>
          <table:table-cell office:value-type="float" office:value="29146500" calcext:value-type="float">
            <text:p>29146500</text:p>
          </table:table-cell>
          <table:table-cell table:formula="of:=AVERAGE([.B574:.B622])" office:value-type="float" office:value="29.3175510204082" calcext:value-type="float">
            <text:p>29.3175510204082</text:p>
          </table:table-cell>
          <table:table-cell table:formula="of:=AVERAGE([.B524:.B622])" office:value-type="float" office:value="28.3476767676768" calcext:value-type="float">
            <text:p>28.3476767676768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float" office:value="31.61" calcext:value-type="float">
            <text:p>31.61</text:p>
          </table:table-cell>
          <table:table-cell office:value-type="float" office:value="29146500" calcext:value-type="float">
            <text:p>29146500</text:p>
          </table:table-cell>
          <table:table-cell table:formula="of:=AVERAGE([.B575:.B623])" office:value-type="float" office:value="29.3985714285714" calcext:value-type="float">
            <text:p>29.3985714285714</text:p>
          </table:table-cell>
          <table:table-cell table:formula="of:=AVERAGE([.B525:.B623])" office:value-type="float" office:value="28.3970707070707" calcext:value-type="float">
            <text:p>28.3970707070707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float" office:value="31.42" calcext:value-type="float">
            <text:p>31.42</text:p>
          </table:table-cell>
          <table:table-cell office:value-type="float" office:value="32704742" calcext:value-type="float">
            <text:p>32704742</text:p>
          </table:table-cell>
          <table:table-cell table:formula="of:=AVERAGE([.B576:.B624])" office:value-type="float" office:value="29.48" calcext:value-type="float">
            <text:p>29.48</text:p>
          </table:table-cell>
          <table:table-cell table:formula="of:=AVERAGE([.B526:.B624])" office:value-type="float" office:value="28.4464646464646" calcext:value-type="float">
            <text:p>28.4464646464646</text:p>
          </table:table-cell>
        </table:table-row>
        <table:table-row table:style-name="ro1">
          <table:table-cell office:value-type="date" office:date-value="2026-02-18" calcext:value-type="date">
            <text:p>2026-02-18</text:p>
          </table:table-cell>
          <table:table-cell office:value-type="float" office:value="31.56" calcext:value-type="float">
            <text:p>31.56</text:p>
          </table:table-cell>
          <table:table-cell office:value-type="float" office:value="18596777" calcext:value-type="float">
            <text:p>18596777</text:p>
          </table:table-cell>
          <table:table-cell table:formula="of:=AVERAGE([.B577:.B625])" office:value-type="float" office:value="29.5573469387755" calcext:value-type="float">
            <text:p>29.5573469387755</text:p>
          </table:table-cell>
          <table:table-cell table:formula="of:=AVERAGE([.B527:.B625])" office:value-type="float" office:value="28.4934343434343" calcext:value-type="float">
            <text:p>28.4934343434343</text:p>
          </table:table-cell>
        </table:table-row>
        <table:table-row table:style-name="ro1">
          <table:table-cell office:value-type="date" office:date-value="2026-02-19" calcext:value-type="date">
            <text:p>2026-02-19</text:p>
          </table:table-cell>
          <table:table-cell office:value-type="float" office:value="31.57" calcext:value-type="float">
            <text:p>31.57</text:p>
          </table:table-cell>
          <table:table-cell office:value-type="float" office:value="17596129" calcext:value-type="float">
            <text:p>17596129</text:p>
          </table:table-cell>
          <table:table-cell table:formula="of:=AVERAGE([.B578:.B626])" office:value-type="float" office:value="29.6416326530612" calcext:value-type="float">
            <text:p>29.6416326530612</text:p>
          </table:table-cell>
          <table:table-cell table:formula="of:=AVERAGE([.B528:.B626])" office:value-type="float" office:value="28.5376767676768" calcext:value-type="float">
            <text:p>28.5376767676768</text:p>
          </table:table-cell>
        </table:table-row>
        <table:table-row table:style-name="ro1">
          <table:table-cell office:value-type="date" office:date-value="2026-02-20" calcext:value-type="date">
            <text:p>2026-02-20</text:p>
          </table:table-cell>
          <table:table-cell office:value-type="float" office:value="31.61" calcext:value-type="float">
            <text:p>31.61</text:p>
          </table:table-cell>
          <table:table-cell office:value-type="float" office:value="19596717" calcext:value-type="float">
            <text:p>19596717</text:p>
          </table:table-cell>
          <table:table-cell table:formula="of:=AVERAGE([.B579:.B627])" office:value-type="float" office:value="29.7261224489796" calcext:value-type="float">
            <text:p>29.7261224489796</text:p>
          </table:table-cell>
          <table:table-cell table:formula="of:=AVERAGE([.B529:.B627])" office:value-type="float" office:value="28.5819191919192" calcext:value-type="float">
            <text:p>28.5819191919192</text:p>
          </table:table-cell>
        </table:table-row>
        <table:table-row table:style-name="ro1">
          <table:table-cell office:value-type="date" office:date-value="2026-02-21" calcext:value-type="date">
            <text:p>2026-02-21</text:p>
          </table:table-cell>
          <table:table-cell office:value-type="float" office:value="31.61" calcext:value-type="float">
            <text:p>31.61</text:p>
          </table:table-cell>
          <table:table-cell office:value-type="float" office:value="19596717" calcext:value-type="float">
            <text:p>19596717</text:p>
          </table:table-cell>
          <table:table-cell table:formula="of:=AVERAGE([.B580:.B628])" office:value-type="float" office:value="29.805306122449" calcext:value-type="float">
            <text:p>29.805306122449</text:p>
          </table:table-cell>
          <table:table-cell table:formula="of:=AVERAGE([.B530:.B628])" office:value-type="float" office:value="28.6262626262626" calcext:value-type="float">
            <text:p>28.6262626262626</text:p>
          </table:table-cell>
        </table:table-row>
        <table:table-row table:style-name="ro1">
          <table:table-cell office:value-type="date" office:date-value="2026-02-22" calcext:value-type="date">
            <text:p>2026-02-22</text:p>
          </table:table-cell>
          <table:table-cell office:value-type="float" office:value="31.61" calcext:value-type="float">
            <text:p>31.61</text:p>
          </table:table-cell>
          <table:table-cell office:value-type="float" office:value="19596717" calcext:value-type="float">
            <text:p>19596717</text:p>
          </table:table-cell>
          <table:table-cell table:formula="of:=AVERAGE([.B581:.B629])" office:value-type="float" office:value="29.8844897959184" calcext:value-type="float">
            <text:p>29.8844897959184</text:p>
          </table:table-cell>
          <table:table-cell table:formula="of:=AVERAGE([.B531:.B629])" office:value-type="float" office:value="28.670404040404" calcext:value-type="float">
            <text:p>28.670404040404</text:p>
          </table:table-cell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office:value-type="float" office:value="31.53" calcext:value-type="float">
            <text:p>31.53</text:p>
          </table:table-cell>
          <table:table-cell office:value-type="float" office:value="21142700" calcext:value-type="float">
            <text:p>21142700</text:p>
          </table:table-cell>
          <table:table-cell table:formula="of:=AVERAGE([.B582:.B630])" office:value-type="float" office:value="29.9636734693878" calcext:value-type="float">
            <text:p>29.9636734693878</text:p>
          </table:table-cell>
          <table:table-cell table:formula="of:=AVERAGE([.B532:.B630])" office:value-type="float" office:value="28.7145454545455" calcext:value-type="float">
            <text:p>28.7145454545455</text:p>
          </table:table-cell>
        </table:table-row>
        <table:table-row table:style-name="ro1">
          <table:table-cell office:value-type="date" office:date-value="2026-02-24" calcext:value-type="date">
            <text:p>2026-02-24</text:p>
          </table:table-cell>
          <table:table-cell office:value-type="float" office:value="31.64" calcext:value-type="float">
            <text:p>31.64</text:p>
          </table:table-cell>
          <table:table-cell office:value-type="float" office:value="16288429" calcext:value-type="float">
            <text:p>16288429</text:p>
          </table:table-cell>
          <table:table-cell table:formula="of:=AVERAGE([.B583:.B631])" office:value-type="float" office:value="30.0375510204082" calcext:value-type="float">
            <text:p>30.0375510204082</text:p>
          </table:table-cell>
          <table:table-cell table:formula="of:=AVERAGE([.B533:.B631])" office:value-type="float" office:value="28.7578787878788" calcext:value-type="float">
            <text:p>28.7578787878788</text:p>
          </table:table-cell>
        </table:table-row>
        <table:table-row table:style-name="ro1">
          <table:table-cell office:value-type="date" office:date-value="2026-02-25" calcext:value-type="date">
            <text:p>2026-02-25</text:p>
          </table:table-cell>
          <table:table-cell office:value-type="float" office:value="31.51" calcext:value-type="float">
            <text:p>31.51</text:p>
          </table:table-cell>
          <table:table-cell office:value-type="float" office:value="21818532" calcext:value-type="float">
            <text:p>21818532</text:p>
          </table:table-cell>
          <table:table-cell table:formula="of:=AVERAGE([.B584:.B632])" office:value-type="float" office:value="30.11" calcext:value-type="float">
            <text:p>30.11</text:p>
          </table:table-cell>
          <table:table-cell table:formula="of:=AVERAGE([.B534:.B632])" office:value-type="float" office:value="28.8047474747475" calcext:value-type="float">
            <text:p>28.8047474747475</text:p>
          </table:table-cell>
        </table:table-row>
        <table:table-row table:style-name="ro1">
          <table:table-cell office:value-type="date" office:date-value="2026-02-26" calcext:value-type="date">
            <text:p>2026-02-26</text:p>
          </table:table-cell>
          <table:table-cell office:value-type="float" office:value="31.51" calcext:value-type="float">
            <text:p>31.51</text:p>
          </table:table-cell>
          <table:table-cell office:value-type="float" office:value="20120412" calcext:value-type="float">
            <text:p>20120412</text:p>
          </table:table-cell>
          <table:table-cell table:formula="of:=AVERAGE([.B585:.B633])" office:value-type="float" office:value="30.1836734693878" calcext:value-type="float">
            <text:p>30.1836734693878</text:p>
          </table:table-cell>
          <table:table-cell table:formula="of:=AVERAGE([.B535:.B633])" office:value-type="float" office:value="28.8486868686869" calcext:value-type="float">
            <text:p>28.8486868686869</text:p>
          </table:table-cell>
        </table:table-row>
        <table:table-row table:style-name="ro1">
          <table:table-cell office:value-type="date" office:date-value="2026-02-27" calcext:value-type="date">
            <text:p>2026-02-27</text:p>
          </table:table-cell>
          <table:table-cell office:value-type="float" office:value="31.77" calcext:value-type="float">
            <text:p>31.77</text:p>
          </table:table-cell>
          <table:table-cell office:value-type="float" office:value="17389463" calcext:value-type="float">
            <text:p>17389463</text:p>
          </table:table-cell>
          <table:table-cell table:formula="of:=AVERAGE([.B586:.B634])" office:value-type="float" office:value="30.2467346938776" calcext:value-type="float">
            <text:p>30.2467346938776</text:p>
          </table:table-cell>
          <table:table-cell table:formula="of:=AVERAGE([.B536:.B634])" office:value-type="float" office:value="28.8949494949495" calcext:value-type="float">
            <text:p>28.8949494949495</text:p>
          </table:table-cell>
        </table:table-row>
        <table:table-row table:style-name="ro1">
          <table:table-cell office:value-type="date" office:date-value="2026-02-28" calcext:value-type="date">
            <text:p>2026-02-28</text:p>
          </table:table-cell>
          <table:table-cell office:value-type="float" office:value="31.77" calcext:value-type="float">
            <text:p>31.77</text:p>
          </table:table-cell>
          <table:table-cell office:value-type="float" office:value="17389463" calcext:value-type="float">
            <text:p>17389463</text:p>
          </table:table-cell>
          <table:table-cell table:formula="of:=AVERAGE([.B587:.B635])" office:value-type="float" office:value="30.3124489795918" calcext:value-type="float">
            <text:p>30.3124489795918</text:p>
          </table:table-cell>
          <table:table-cell table:formula="of:=AVERAGE([.B537:.B635])" office:value-type="float" office:value="28.9469696969697" calcext:value-type="float">
            <text:p>28.9469696969697</text:p>
          </table:table-cell>
        </table:table-row>
        <table:table-row table:style-name="ro1">
          <table:table-cell office:value-type="date" office:date-value="2026-03-01" calcext:value-type="date">
            <text:p>2026-03-01</text:p>
          </table:table-cell>
          <table:table-cell office:value-type="float" office:value="31.77" calcext:value-type="float">
            <text:p>31.77</text:p>
          </table:table-cell>
          <table:table-cell office:value-type="float" office:value="17389463" calcext:value-type="float">
            <text:p>17389463</text:p>
          </table:table-cell>
          <table:table-cell table:formula="of:=AVERAGE([.B588:.B636])" office:value-type="float" office:value="30.3781632653061" calcext:value-type="float">
            <text:p>30.3781632653061</text:p>
          </table:table-cell>
          <table:table-cell table:formula="of:=AVERAGE([.B538:.B636])" office:value-type="float" office:value="28.9941414141414" calcext:value-type="float">
            <text:p>28.9941414141414</text:p>
          </table:table-cell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float" office:value="31.86" calcext:value-type="float">
            <text:p>31.86</text:p>
          </table:table-cell>
          <table:table-cell office:value-type="float" office:value="24565202" calcext:value-type="float">
            <text:p>24565202</text:p>
          </table:table-cell>
          <table:table-cell table:formula="of:=AVERAGE([.B589:.B637])" office:value-type="float" office:value="30.4438775510204" calcext:value-type="float">
            <text:p>30.4438775510204</text:p>
          </table:table-cell>
          <table:table-cell table:formula="of:=AVERAGE([.B539:.B637])" office:value-type="float" office:value="29.0413131313131" calcext:value-type="float">
            <text:p>29.0413131313131</text:p>
          </table:table-cell>
        </table:table-row>
        <table:table-row table:style-name="ro1">
          <table:table-cell office:value-type="date" office:date-value="2026-03-03" calcext:value-type="date">
            <text:p>2026-03-03</text:p>
          </table:table-cell>
          <table:table-cell office:value-type="float" office:value="31.59" calcext:value-type="float">
            <text:p>31.59</text:p>
          </table:table-cell>
          <table:table-cell office:value-type="float" office:value="29374979" calcext:value-type="float">
            <text:p>29374979</text:p>
          </table:table-cell>
          <table:table-cell table:formula="of:=AVERAGE([.B590:.B638])" office:value-type="float" office:value="30.5124489795918" calcext:value-type="float">
            <text:p>30.5124489795918</text:p>
          </table:table-cell>
          <table:table-cell table:formula="of:=AVERAGE([.B540:.B638])" office:value-type="float" office:value="29.0893939393939" calcext:value-type="float">
            <text:p>29.0893939393939</text:p>
          </table:table-cell>
        </table:table-row>
        <table:table-row table:style-name="ro1">
          <table:table-cell office:value-type="date" office:date-value="2026-03-04" calcext:value-type="date">
            <text:p>2026-03-04</text:p>
          </table:table-cell>
          <table:table-cell office:value-type="float" office:value="31.54" calcext:value-type="float">
            <text:p>31.54</text:p>
          </table:table-cell>
          <table:table-cell office:value-type="float" office:value="36141353" calcext:value-type="float">
            <text:p>36141353</text:p>
          </table:table-cell>
          <table:table-cell table:formula="of:=AVERAGE([.B591:.B639])" office:value-type="float" office:value="30.5730612244898" calcext:value-type="float">
            <text:p>30.5730612244898</text:p>
          </table:table-cell>
          <table:table-cell table:formula="of:=AVERAGE([.B541:.B639])" office:value-type="float" office:value="29.1362626262626" calcext:value-type="float">
            <text:p>29.1362626262626</text:p>
          </table:table-cell>
        </table:table-row>
        <table:table-row table:style-name="ro1">
          <table:table-cell office:value-type="date" office:date-value="2026-03-05" calcext:value-type="date">
            <text:p>2026-03-05</text:p>
          </table:table-cell>
          <table:table-cell office:value-type="float" office:value="31.26" calcext:value-type="float">
            <text:p>31.26</text:p>
          </table:table-cell>
          <table:table-cell office:value-type="float" office:value="21798349" calcext:value-type="float">
            <text:p>21798349</text:p>
          </table:table-cell>
          <table:table-cell table:formula="of:=AVERAGE([.B592:.B640])" office:value-type="float" office:value="30.6240816326531" calcext:value-type="float">
            <text:p>30.6240816326531</text:p>
          </table:table-cell>
          <table:table-cell table:formula="of:=AVERAGE([.B542:.B640])" office:value-type="float" office:value="29.1788888888889" calcext:value-type="float">
            <text:p>29.1788888888889</text:p>
          </table:table-cell>
        </table:table-row>
        <table:table-row table:style-name="ro1">
          <table:table-cell office:value-type="date" office:date-value="2026-03-06" calcext:value-type="date">
            <text:p>2026-03-06</text:p>
          </table:table-cell>
          <table:table-cell office:value-type="float" office:value="31.13" calcext:value-type="float">
            <text:p>31.13</text:p>
          </table:table-cell>
          <table:table-cell office:value-type="float" office:value="30706144" calcext:value-type="float">
            <text:p>30706144</text:p>
          </table:table-cell>
          <table:table-cell table:formula="of:=AVERAGE([.B593:.B641])" office:value-type="float" office:value="30.6695918367347" calcext:value-type="float">
            <text:p>30.6695918367347</text:p>
          </table:table-cell>
          <table:table-cell table:formula="of:=AVERAGE([.B543:.B641])" office:value-type="float" office:value="29.2173737373737" calcext:value-type="float">
            <text:p>29.2173737373737</text:p>
          </table:table-cell>
        </table:table-row>
        <table:table-row table:style-name="ro1">
          <table:table-cell office:value-type="date" office:date-value="2026-03-07" calcext:value-type="date">
            <text:p>2026-03-07</text:p>
          </table:table-cell>
          <table:table-cell office:value-type="float" office:value="31.13" calcext:value-type="float">
            <text:p>31.13</text:p>
          </table:table-cell>
          <table:table-cell office:value-type="float" office:value="30706144" calcext:value-type="float">
            <text:p>30706144</text:p>
          </table:table-cell>
          <table:table-cell table:formula="of:=AVERAGE([.B594:.B642])" office:value-type="float" office:value="30.7151020408163" calcext:value-type="float">
            <text:p>30.7151020408163</text:p>
          </table:table-cell>
          <table:table-cell table:formula="of:=AVERAGE([.B544:.B642])" office:value-type="float" office:value="29.2545454545455" calcext:value-type="float">
            <text:p>29.2545454545455</text:p>
          </table:table-cell>
        </table:table-row>
        <table:table-row table:style-name="ro1">
          <table:table-cell office:value-type="date" office:date-value="2026-03-08" calcext:value-type="date">
            <text:p>2026-03-08</text:p>
          </table:table-cell>
          <table:table-cell office:value-type="float" office:value="31.13" calcext:value-type="float">
            <text:p>31.13</text:p>
          </table:table-cell>
          <table:table-cell office:value-type="float" office:value="30706144" calcext:value-type="float">
            <text:p>30706144</text:p>
          </table:table-cell>
          <table:table-cell table:formula="of:=AVERAGE([.B595:.B643])" office:value-type="float" office:value="30.760612244898" calcext:value-type="float">
            <text:p>30.760612244898</text:p>
          </table:table-cell>
          <table:table-cell table:formula="of:=AVERAGE([.B545:.B643])" office:value-type="float" office:value="29.290303030303" calcext:value-type="float">
            <text:p>29.290303030303</text:p>
          </table:table-cell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office:value-type="float" office:value="31.02" calcext:value-type="float">
            <text:p>31.02</text:p>
          </table:table-cell>
          <table:table-cell office:value-type="float" office:value="27754642" calcext:value-type="float">
            <text:p>27754642</text:p>
          </table:table-cell>
          <table:table-cell table:formula="of:=AVERAGE([.B596:.B644])" office:value-type="float" office:value="30.8061224489796" calcext:value-type="float">
            <text:p>30.8061224489796</text:p>
          </table:table-cell>
          <table:table-cell table:formula="of:=AVERAGE([.B546:.B644])" office:value-type="float" office:value="29.3260606060606" calcext:value-type="float">
            <text:p>29.3260606060606</text:p>
          </table:table-cell>
        </table:table-row>
        <table:table-row table:style-name="ro1">
          <table:table-cell office:value-type="date" office:date-value="2026-03-10" calcext:value-type="date">
            <text:p>2026-03-10</text:p>
          </table:table-cell>
          <table:table-cell office:value-type="float" office:value="30.9" calcext:value-type="float">
            <text:p>30.9</text:p>
          </table:table-cell>
          <table:table-cell office:value-type="float" office:value="26716007" calcext:value-type="float">
            <text:p>26716007</text:p>
          </table:table-cell>
          <table:table-cell table:formula="of:=AVERAGE([.B597:.B645])" office:value-type="float" office:value="30.849387755102" calcext:value-type="float">
            <text:p>30.849387755102</text:p>
          </table:table-cell>
          <table:table-cell table:formula="of:=AVERAGE([.B547:.B645])" office:value-type="float" office:value="29.3607070707071" calcext:value-type="float">
            <text:p>29.3607070707071</text:p>
          </table:table-cell>
        </table:table-row>
        <table:table-row table:style-name="ro1">
          <table:table-cell office:value-type="date" office:date-value="2026-03-11" calcext:value-type="date">
            <text:p>2026-03-11</text:p>
          </table:table-cell>
          <table:table-cell office:value-type="float" office:value="31" calcext:value-type="float">
            <text:p>31</text:p>
          </table:table-cell>
          <table:table-cell office:value-type="float" office:value="19947056" calcext:value-type="float">
            <text:p>19947056</text:p>
          </table:table-cell>
          <table:table-cell table:formula="of:=AVERAGE([.B598:.B646])" office:value-type="float" office:value="30.8942857142857" calcext:value-type="float">
            <text:p>30.8942857142857</text:p>
          </table:table-cell>
          <table:table-cell table:formula="of:=AVERAGE([.B548:.B646])" office:value-type="float" office:value="29.3947474747475" calcext:value-type="float">
            <text:p>29.3947474747475</text:p>
          </table:table-cell>
        </table:table-row>
        <table:table-row table:style-name="ro1">
          <table:table-cell office:value-type="date" office:date-value="2026-03-12" calcext:value-type="date">
            <text:p>2026-03-12</text:p>
          </table:table-cell>
          <table:table-cell office:value-type="float" office:value="30.82" calcext:value-type="float">
            <text:p>30.82</text:p>
          </table:table-cell>
          <table:table-cell office:value-type="float" office:value="22684191" calcext:value-type="float">
            <text:p>22684191</text:p>
          </table:table-cell>
          <table:table-cell table:formula="of:=AVERAGE([.B599:.B647])" office:value-type="float" office:value="30.9320408163265" calcext:value-type="float">
            <text:p>30.9320408163265</text:p>
          </table:table-cell>
          <table:table-cell table:formula="of:=AVERAGE([.B549:.B647])" office:value-type="float" office:value="29.4311111111111" calcext:value-type="float">
            <text:p>29.4311111111111</text:p>
          </table:table-cell>
        </table:table-row>
        <table:table-row table:style-name="ro1">
          <table:table-cell office:value-type="date" office:date-value="2026-03-13" calcext:value-type="date">
            <text:p>2026-03-13</text:p>
          </table:table-cell>
          <table:table-cell office:value-type="float" office:value="30.8" calcext:value-type="float">
            <text:p>30.8</text:p>
          </table:table-cell>
          <table:table-cell office:value-type="float" office:value="30481933" calcext:value-type="float">
            <text:p>30481933</text:p>
          </table:table-cell>
          <table:table-cell table:formula="of:=AVERAGE([.B600:.B648])" office:value-type="float" office:value="30.9657142857143" calcext:value-type="float">
            <text:p>30.9657142857143</text:p>
          </table:table-cell>
          <table:table-cell table:formula="of:=AVERAGE([.B550:.B648])" office:value-type="float" office:value="29.4616161616162" calcext:value-type="float">
            <text:p>29.4616161616162</text:p>
          </table:table-cell>
        </table:table-row>
        <table:table-row table:style-name="ro1">
          <table:table-cell office:value-type="date" office:date-value="2026-03-14" calcext:value-type="date">
            <text:p>2026-03-14</text:p>
          </table:table-cell>
          <table:table-cell office:value-type="float" office:value="30.8" calcext:value-type="float">
            <text:p>30.8</text:p>
          </table:table-cell>
          <table:table-cell office:value-type="float" office:value="30481933" calcext:value-type="float">
            <text:p>30481933</text:p>
          </table:table-cell>
          <table:table-cell table:formula="of:=AVERAGE([.B601:.B649])" office:value-type="float" office:value="30.9995918367347" calcext:value-type="float">
            <text:p>30.9995918367347</text:p>
          </table:table-cell>
          <table:table-cell table:formula="of:=AVERAGE([.B551:.B649])" office:value-type="float" office:value="29.4924242424242" calcext:value-type="float">
            <text:p>29.4924242424242</text:p>
          </table:table-cell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float" office:value="30.8" calcext:value-type="float">
            <text:p>30.8</text:p>
          </table:table-cell>
          <table:table-cell office:value-type="float" office:value="30481933" calcext:value-type="float">
            <text:p>30481933</text:p>
          </table:table-cell>
          <table:table-cell table:formula="of:=AVERAGE([.B602:.B650])" office:value-type="float" office:value="31.0334693877551" calcext:value-type="float">
            <text:p>31.0334693877551</text:p>
          </table:table-cell>
          <table:table-cell table:formula="of:=AVERAGE([.B552:.B650])" office:value-type="float" office:value="29.5236363636364" calcext:value-type="float">
            <text:p>29.5236363636364</text:p>
          </table:table-cell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office:value-type="float" office:value="30.87" calcext:value-type="float">
            <text:p>30.87</text:p>
          </table:table-cell>
          <table:table-cell office:value-type="float" office:value="30596463" calcext:value-type="float">
            <text:p>30596463</text:p>
          </table:table-cell>
          <table:table-cell table:formula="of:=AVERAGE([.B603:.B651])" office:value-type="float" office:value="31.0673469387755" calcext:value-type="float">
            <text:p>31.0673469387755</text:p>
          </table:table-cell>
          <table:table-cell table:formula="of:=AVERAGE([.B553:.B651])" office:value-type="float" office:value="29.5548484848485" calcext:value-type="float">
            <text:p>29.5548484848485</text:p>
          </table:table-cell>
        </table:table-row>
        <table:table-row table:style-name="ro1">
          <table:table-cell office:value-type="date" office:date-value="2026-03-17" calcext:value-type="date">
            <text:p>2026-03-17</text:p>
          </table:table-cell>
          <table:table-cell office:value-type="float" office:value="30.95" calcext:value-type="float">
            <text:p>30.95</text:p>
          </table:table-cell>
          <table:table-cell office:value-type="float" office:value="24455957" calcext:value-type="float">
            <text:p>24455957</text:p>
          </table:table-cell>
          <table:table-cell table:formula="of:=AVERAGE([.B604:.B652])" office:value-type="float" office:value="31.1018367346939" calcext:value-type="float">
            <text:p>31.1018367346939</text:p>
          </table:table-cell>
          <table:table-cell table:formula="of:=AVERAGE([.B554:.B652])" office:value-type="float" office:value="29.5867676767677" calcext:value-type="float">
            <text:p>29.5867676767677</text:p>
          </table:table-cell>
        </table:table-row>
        <table:table-row table:style-name="ro1">
          <table:table-cell office:value-type="date" office:date-value="2026-03-18" calcext:value-type="date">
            <text:p>2026-03-18</text:p>
          </table:table-cell>
          <table:table-cell office:value-type="float" office:value="30.58" calcext:value-type="float">
            <text:p>30.58</text:p>
          </table:table-cell>
          <table:table-cell office:value-type="float" office:value="26352607" calcext:value-type="float">
            <text:p>26352607</text:p>
          </table:table-cell>
          <table:table-cell table:formula="of:=AVERAGE([.B605:.B653])" office:value-type="float" office:value="31.1340816326531" calcext:value-type="float">
            <text:p>31.1340816326531</text:p>
          </table:table-cell>
          <table:table-cell table:formula="of:=AVERAGE([.B555:.B653])" office:value-type="float" office:value="29.6208080808081" calcext:value-type="float">
            <text:p>29.6208080808081</text:p>
          </table:table-cell>
        </table:table-row>
        <table:table-row table:style-name="ro1">
          <table:table-cell office:value-type="date" office:date-value="2026-03-19" calcext:value-type="date">
            <text:p>2026-03-19</text:p>
          </table:table-cell>
          <table:table-cell office:value-type="float" office:value="30.59" calcext:value-type="float">
            <text:p>30.59</text:p>
          </table:table-cell>
          <table:table-cell office:value-type="float" office:value="29056926" calcext:value-type="float">
            <text:p>29056926</text:p>
          </table:table-cell>
          <table:table-cell table:formula="of:=AVERAGE([.B606:.B654])" office:value-type="float" office:value="31.1602040816327" calcext:value-type="float">
            <text:p>31.1602040816327</text:p>
          </table:table-cell>
          <table:table-cell table:formula="of:=AVERAGE([.B556:.B654])" office:value-type="float" office:value="29.6523232323232" calcext:value-type="float">
            <text:p>29.6523232323232</text:p>
          </table:table-cell>
        </table:table-row>
        <table:table-row table:style-name="ro1">
          <table:table-cell office:value-type="date" office:date-value="2026-03-20" calcext:value-type="date">
            <text:p>2026-03-20</text:p>
          </table:table-cell>
          <table:table-cell office:value-type="float" office:value="30.39" calcext:value-type="float">
            <text:p>30.39</text:p>
          </table:table-cell>
          <table:table-cell office:value-type="float" office:value="27516683" calcext:value-type="float">
            <text:p>27516683</text:p>
          </table:table-cell>
          <table:table-cell table:formula="of:=AVERAGE([.B607:.B655])" office:value-type="float" office:value="31.1851020408163" calcext:value-type="float">
            <text:p>31.1851020408163</text:p>
          </table:table-cell>
          <table:table-cell table:formula="of:=AVERAGE([.B557:.B655])" office:value-type="float" office:value="29.6828282828283" calcext:value-type="float">
            <text:p>29.6828282828283</text:p>
          </table:table-cell>
        </table:table-row>
        <table:table-row table:style-name="ro1">
          <table:table-cell office:value-type="date" office:date-value="2026-03-21" calcext:value-type="date">
            <text:p>2026-03-21</text:p>
          </table:table-cell>
          <table:table-cell office:value-type="float" office:value="30.39" calcext:value-type="float">
            <text:p>30.39</text:p>
          </table:table-cell>
          <table:table-cell office:value-type="float" office:value="27516683" calcext:value-type="float">
            <text:p>27516683</text:p>
          </table:table-cell>
          <table:table-cell table:formula="of:=AVERAGE([.B608:.B656])" office:value-type="float" office:value="31.1967346938776" calcext:value-type="float">
            <text:p>31.1967346938776</text:p>
          </table:table-cell>
          <table:table-cell table:formula="of:=AVERAGE([.B558:.B656])" office:value-type="float" office:value="29.710202020202" calcext:value-type="float">
            <text:p>29.710202020202</text:p>
          </table:table-cell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float" office:value="30.39" calcext:value-type="float">
            <text:p>30.39</text:p>
          </table:table-cell>
          <table:table-cell office:value-type="float" office:value="27516683" calcext:value-type="float">
            <text:p>27516683</text:p>
          </table:table-cell>
          <table:table-cell table:formula="of:=AVERAGE([.B609:.B657])" office:value-type="float" office:value="31.2083673469388" calcext:value-type="float">
            <text:p>31.2083673469388</text:p>
          </table:table-cell>
          <table:table-cell table:formula="of:=AVERAGE([.B559:.B657])" office:value-type="float" office:value="29.7375757575758" calcext:value-type="float">
            <text:p>29.7375757575758</text:p>
          </table:table-cell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office:value-type="float" office:value="30.54" calcext:value-type="float">
            <text:p>30.54</text:p>
          </table:table-cell>
          <table:table-cell office:value-type="float" office:value="33437866" calcext:value-type="float">
            <text:p>33437866</text:p>
          </table:table-cell>
          <table:table-cell table:formula="of:=AVERAGE([.B610:.B658])" office:value-type="float" office:value="31.22" calcext:value-type="float">
            <text:p>31.22</text:p>
          </table:table-cell>
          <table:table-cell table:formula="of:=AVERAGE([.B560:.B658])" office:value-type="float" office:value="29.7649494949495" calcext:value-type="float">
            <text:p>29.7649494949495</text:p>
          </table:table-cell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float" office:value="30.64" calcext:value-type="float">
            <text:p>30.64</text:p>
          </table:table-cell>
          <table:table-cell office:value-type="float" office:value="30013372" calcext:value-type="float">
            <text:p>30013372</text:p>
          </table:table-cell>
          <table:table-cell table:formula="of:=AVERAGE([.B611:.B659])" office:value-type="float" office:value="31.2310204081633" calcext:value-type="float">
            <text:p>31.2310204081633</text:p>
          </table:table-cell>
          <table:table-cell table:formula="of:=AVERAGE([.B561:.B659])" office:value-type="float" office:value="29.7938383838384" calcext:value-type="float">
            <text:p>29.7938383838384</text:p>
          </table:table-cell>
        </table:table-row>
        <table:table-row table:style-name="ro1">
          <table:table-cell office:value-type="date" office:date-value="2026-03-25" calcext:value-type="date">
            <text:p>2026-03-25</text:p>
          </table:table-cell>
          <table:table-cell office:value-type="float" office:value="30.54" calcext:value-type="float">
            <text:p>30.54</text:p>
          </table:table-cell>
          <table:table-cell office:value-type="float" office:value="27249814" calcext:value-type="float">
            <text:p>27249814</text:p>
          </table:table-cell>
          <table:table-cell table:formula="of:=AVERAGE([.B612:.B660])" office:value-type="float" office:value="31.2338775510204" calcext:value-type="float">
            <text:p>31.2338775510204</text:p>
          </table:table-cell>
          <table:table-cell table:formula="of:=AVERAGE([.B562:.B660])" office:value-type="float" office:value="29.8229292929293" calcext:value-type="float">
            <text:p>29.8229292929293</text:p>
          </table:table-cell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float" office:value="30.62" calcext:value-type="float">
            <text:p>30.62</text:p>
          </table:table-cell>
          <table:table-cell office:value-type="float" office:value="20280059" calcext:value-type="float">
            <text:p>20280059</text:p>
          </table:table-cell>
          <table:table-cell table:formula="of:=AVERAGE([.B613:.B661])" office:value-type="float" office:value="31.2242857142857" calcext:value-type="float">
            <text:p>31.2242857142857</text:p>
          </table:table-cell>
          <table:table-cell table:formula="of:=AVERAGE([.B563:.B661])" office:value-type="float" office:value="29.8539393939394" calcext:value-type="float">
            <text:p>29.8539393939394</text:p>
          </table:table-cell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office:value-type="float" office:value="30.44" calcext:value-type="float">
            <text:p>30.44</text:p>
          </table:table-cell>
          <table:table-cell office:value-type="float" office:value="23433767" calcext:value-type="float">
            <text:p>23433767</text:p>
          </table:table-cell>
          <table:table-cell table:formula="of:=AVERAGE([.B614:.B662])" office:value-type="float" office:value="31.2171428571429" calcext:value-type="float">
            <text:p>31.2171428571429</text:p>
          </table:table-cell>
          <table:table-cell table:formula="of:=AVERAGE([.B564:.B662])" office:value-type="float" office:value="29.8844444444444" calcext:value-type="float">
            <text:p>29.8844444444444</text:p>
          </table:table-cell>
        </table:table-row>
        <table:table-row table:style-name="ro1">
          <table:table-cell office:value-type="date" office:date-value="2026-03-28" calcext:value-type="date">
            <text:p>2026-03-28</text:p>
          </table:table-cell>
          <table:table-cell office:value-type="float" office:value="30.44" calcext:value-type="float">
            <text:p>30.44</text:p>
          </table:table-cell>
          <table:table-cell office:value-type="float" office:value="23433767" calcext:value-type="float">
            <text:p>23433767</text:p>
          </table:table-cell>
          <table:table-cell table:formula="of:=AVERAGE([.B615:.B663])" office:value-type="float" office:value="31.1961224489796" calcext:value-type="float">
            <text:p>31.1961224489796</text:p>
          </table:table-cell>
          <table:table-cell table:formula="of:=AVERAGE([.B565:.B663])" office:value-type="float" office:value="29.9143434343434" calcext:value-type="float">
            <text:p>29.9143434343434</text:p>
          </table:table-cell>
        </table:table-row>
        <table:table-row table:style-name="ro1">
          <table:table-cell office:value-type="date" office:date-value="2026-03-29" calcext:value-type="date">
            <text:p>2026-03-29</text:p>
          </table:table-cell>
          <table:table-cell office:value-type="float" office:value="30.44" calcext:value-type="float">
            <text:p>30.44</text:p>
          </table:table-cell>
          <table:table-cell office:value-type="float" office:value="23433767" calcext:value-type="float">
            <text:p>23433767</text:p>
          </table:table-cell>
          <table:table-cell table:formula="of:=AVERAGE([.B616:.B664])" office:value-type="float" office:value="31.1751020408163" calcext:value-type="float">
            <text:p>31.1751020408163</text:p>
          </table:table-cell>
          <table:table-cell table:formula="of:=AVERAGE([.B566:.B664])" office:value-type="float" office:value="29.9444444444444" calcext:value-type="float">
            <text:p>29.9444444444444</text:p>
          </table:table-cell>
        </table:table-row>
        <table:table-row table:style-name="ro1">
          <table:table-cell office:value-type="date" office:date-value="2026-03-30" calcext:value-type="date">
            <text:p>2026-03-30</text:p>
          </table:table-cell>
          <table:table-cell office:value-type="float" office:value="30.48" calcext:value-type="float">
            <text:p>30.48</text:p>
          </table:table-cell>
          <table:table-cell office:value-type="float" office:value="30521876" calcext:value-type="float">
            <text:p>30521876</text:p>
          </table:table-cell>
          <table:table-cell table:formula="of:=AVERAGE([.B617:.B665])" office:value-type="float" office:value="31.1540816326531" calcext:value-type="float">
            <text:p>31.1540816326531</text:p>
          </table:table-cell>
          <table:table-cell table:formula="of:=AVERAGE([.B567:.B665])" office:value-type="float" office:value="29.9745454545455" calcext:value-type="float">
            <text:p>29.9745454545455</text:p>
          </table:table-cell>
        </table:table-row>
        <table:table-row table:style-name="ro1">
          <table:table-cell office:value-type="date" office:date-value="2026-03-31" calcext:value-type="date">
            <text:p>2026-03-31</text:p>
          </table:table-cell>
          <table:table-cell office:value-type="float" office:value="30.68" calcext:value-type="float">
            <text:p>30.68</text:p>
          </table:table-cell>
          <table:table-cell office:value-type="float" office:value="30453546" calcext:value-type="float">
            <text:p>30453546</text:p>
          </table:table-cell>
          <table:table-cell table:formula="of:=AVERAGE([.B618:.B666])" office:value-type="float" office:value="31.1363265306122" calcext:value-type="float">
            <text:p>31.1363265306122</text:p>
          </table:table-cell>
          <table:table-cell table:formula="of:=AVERAGE([.B568:.B666])" office:value-type="float" office:value="30.0050505050505" calcext:value-type="float">
            <text:p>30.0050505050505</text:p>
          </table:table-cell>
        </table:table-row>
        <table:table-row table:style-name="ro1">
          <table:table-cell office:value-type="date" office:date-value="2026-04-01" calcext:value-type="date">
            <text:p>2026-04-01</text:p>
          </table:table-cell>
          <table:table-cell office:value-type="float" office:value="30.51" calcext:value-type="float">
            <text:p>30.51</text:p>
          </table:table-cell>
          <table:table-cell office:value-type="float" office:value="31995039" calcext:value-type="float">
            <text:p>31995039</text:p>
          </table:table-cell>
          <table:table-cell table:formula="of:=AVERAGE([.B619:.B667])" office:value-type="float" office:value="31.1236734693878" calcext:value-type="float">
            <text:p>31.1236734693878</text:p>
          </table:table-cell>
          <table:table-cell table:formula="of:=AVERAGE([.B569:.B667])" office:value-type="float" office:value="30.0359595959596" calcext:value-type="float">
            <text:p>30.0359595959596</text:p>
          </table:table-cell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float" office:value="30.56" calcext:value-type="float">
            <text:p>30.56</text:p>
          </table:table-cell>
          <table:table-cell office:value-type="float" office:value="20626206" calcext:value-type="float">
            <text:p>20626206</text:p>
          </table:table-cell>
          <table:table-cell table:formula="of:=AVERAGE([.B620:.B668])" office:value-type="float" office:value="31.100612244898" calcext:value-type="float">
            <text:p>31.100612244898</text:p>
          </table:table-cell>
          <table:table-cell table:formula="of:=AVERAGE([.B570:.B668])" office:value-type="float" office:value="30.0659595959596" calcext:value-type="float">
            <text:p>30.0659595959596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float" office:value="30.56" calcext:value-type="float">
            <text:p>30.56</text:p>
          </table:table-cell>
          <table:table-cell office:value-type="float" office:value="20626206" calcext:value-type="float">
            <text:p>20626206</text:p>
          </table:table-cell>
          <table:table-cell table:formula="of:=AVERAGE([.B621:.B669])" office:value-type="float" office:value="31.084693877551" calcext:value-type="float">
            <text:p>31.084693877551</text:p>
          </table:table-cell>
          <table:table-cell table:formula="of:=AVERAGE([.B571:.B669])" office:value-type="float" office:value="30.0952525252525" calcext:value-type="float">
            <text:p>30.0952525252525</text:p>
          </table:table-cell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float" office:value="30.56" calcext:value-type="float">
            <text:p>30.56</text:p>
          </table:table-cell>
          <table:table-cell office:value-type="float" office:value="20626206" calcext:value-type="float">
            <text:p>20626206</text:p>
          </table:table-cell>
          <table:table-cell table:formula="of:=AVERAGE([.B622:.B670])" office:value-type="float" office:value="31.0632653061224" calcext:value-type="float">
            <text:p>31.0632653061224</text:p>
          </table:table-cell>
          <table:table-cell table:formula="of:=AVERAGE([.B572:.B670])" office:value-type="float" office:value="30.1245454545455" calcext:value-type="float">
            <text:p>30.1245454545455</text:p>
          </table:table-cell>
        </table:table-row>
        <table:table-row table:style-name="ro1">
          <table:table-cell office:value-type="date" office:date-value="2026-04-05" calcext:value-type="date">
            <text:p>2026-04-05</text:p>
          </table:table-cell>
          <table:table-cell office:value-type="float" office:value="30.56" calcext:value-type="float">
            <text:p>30.56</text:p>
          </table:table-cell>
          <table:table-cell office:value-type="float" office:value="20626206" calcext:value-type="float">
            <text:p>20626206</text:p>
          </table:table-cell>
          <table:table-cell table:formula="of:=AVERAGE([.B623:.B671])" office:value-type="float" office:value="31.0418367346939" calcext:value-type="float">
            <text:p>31.0418367346939</text:p>
          </table:table-cell>
          <table:table-cell table:formula="of:=AVERAGE([.B573:.B671])" office:value-type="float" office:value="30.1540404040404" calcext:value-type="float">
            <text:p>30.1540404040404</text:p>
          </table:table-cell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office:value-type="float" office:value="30.64" calcext:value-type="float">
            <text:p>30.64</text:p>
          </table:table-cell>
          <table:table-cell office:value-type="float" office:value="21978669" calcext:value-type="float">
            <text:p>21978669</text:p>
          </table:table-cell>
          <table:table-cell table:formula="of:=AVERAGE([.B624:.B672])" office:value-type="float" office:value="31.0204081632653" calcext:value-type="float">
            <text:p>31.0204081632653</text:p>
          </table:table-cell>
          <table:table-cell table:formula="of:=AVERAGE([.B574:.B672])" office:value-type="float" office:value="30.1835353535354" calcext:value-type="float">
            <text:p>30.1835353535354</text:p>
          </table:table-cell>
        </table:table-row>
        <table:table-row table:style-name="ro1">
          <table:table-cell office:value-type="date" office:date-value="2026-04-07" calcext:value-type="date">
            <text:p>2026-04-07</text:p>
          </table:table-cell>
          <table:table-cell office:value-type="float" office:value="30.56" calcext:value-type="float">
            <text:p>30.56</text:p>
          </table:table-cell>
          <table:table-cell office:value-type="float" office:value="18789600" calcext:value-type="float">
            <text:p>18789600</text:p>
          </table:table-cell>
          <table:table-cell table:formula="of:=AVERAGE([.B625:.B673])" office:value-type="float" office:value="31.000612244898" calcext:value-type="float">
            <text:p>31.000612244898</text:p>
          </table:table-cell>
          <table:table-cell table:formula="of:=AVERAGE([.B575:.B673])" office:value-type="float" office:value="30.2138383838384" calcext:value-type="float">
            <text:p>30.2138383838384</text:p>
          </table:table-cell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float" office:value="30.86" calcext:value-type="float">
            <text:p>30.86</text:p>
          </table:table-cell>
          <table:table-cell office:value-type="float" office:value="30778767" calcext:value-type="float">
            <text:p>30778767</text:p>
          </table:table-cell>
          <table:table-cell table:formula="of:=AVERAGE([.B626:.B674])" office:value-type="float" office:value="30.9830612244898" calcext:value-type="float">
            <text:p>30.9830612244898</text:p>
          </table:table-cell>
          <table:table-cell table:formula="of:=AVERAGE([.B576:.B674])" office:value-type="float" office:value="30.2435353535354" calcext:value-type="float">
            <text:p>30.2435353535354</text:p>
          </table:table-cell>
        </table:table-row>
        <table:table-row table:style-name="ro1">
          <table:table-cell office:value-type="date" office:date-value="2026-04-09" calcext:value-type="date">
            <text:p>2026-04-09</text:p>
          </table:table-cell>
          <table:table-cell office:value-type="float" office:value="30.94" calcext:value-type="float">
            <text:p>30.94</text:p>
          </table:table-cell>
          <table:table-cell office:value-type="float" office:value="31723844" calcext:value-type="float">
            <text:p>31723844</text:p>
          </table:table-cell>
          <table:table-cell table:formula="of:=AVERAGE([.B627:.B675])" office:value-type="float" office:value="30.9687755102041" calcext:value-type="float">
            <text:p>30.9687755102041</text:p>
          </table:table-cell>
          <table:table-cell table:formula="of:=AVERAGE([.B577:.B675])" office:value-type="float" office:value="30.2761616161616" calcext:value-type="float">
            <text:p>30.2761616161616</text:p>
          </table:table-cell>
        </table:table-row>
        <table:table-row table:style-name="ro1">
          <table:table-cell office:value-type="date" office:date-value="2026-04-10" calcext:value-type="date">
            <text:p>2026-04-10</text:p>
          </table:table-cell>
          <table:table-cell office:value-type="float" office:value="30.56" calcext:value-type="float">
            <text:p>30.56</text:p>
          </table:table-cell>
          <table:table-cell office:value-type="float" office:value="19661646" calcext:value-type="float">
            <text:p>19661646</text:p>
          </table:table-cell>
          <table:table-cell table:formula="of:=AVERAGE([.B628:.B676])" office:value-type="float" office:value="30.9559183673469" calcext:value-type="float">
            <text:p>30.9559183673469</text:p>
          </table:table-cell>
          <table:table-cell table:formula="of:=AVERAGE([.B578:.B676])" office:value-type="float" office:value="30.3116161616162" calcext:value-type="float">
            <text:p>30.3116161616162</text:p>
          </table:table-cell>
        </table:table-row>
        <table:table-row table:style-name="ro1">
          <table:table-cell office:value-type="date" office:date-value="2026-04-11" calcext:value-type="date">
            <text:p>2026-04-11</text:p>
          </table:table-cell>
          <table:table-cell office:value-type="float" office:value="30.56" calcext:value-type="float">
            <text:p>30.56</text:p>
          </table:table-cell>
          <table:table-cell office:value-type="float" office:value="19661646" calcext:value-type="float">
            <text:p>19661646</text:p>
          </table:table-cell>
          <table:table-cell table:formula="of:=AVERAGE([.B629:.B677])" office:value-type="float" office:value="30.9344897959184" calcext:value-type="float">
            <text:p>30.9344897959184</text:p>
          </table:table-cell>
          <table:table-cell table:formula="of:=AVERAGE([.B579:.B677])" office:value-type="float" office:value="30.3432323232323" calcext:value-type="float">
            <text:p>30.3432323232323</text:p>
          </table:table-cell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float" office:value="30.56" calcext:value-type="float">
            <text:p>30.56</text:p>
          </table:table-cell>
          <table:table-cell office:value-type="float" office:value="19661646" calcext:value-type="float">
            <text:p>19661646</text:p>
          </table:table-cell>
          <table:table-cell table:formula="of:=AVERAGE([.B630:.B678])" office:value-type="float" office:value="30.9130612244898" calcext:value-type="float">
            <text:p>30.9130612244898</text:p>
          </table:table-cell>
          <table:table-cell table:formula="of:=AVERAGE([.B580:.B678])" office:value-type="float" office:value="30.3718181818182" calcext:value-type="float">
            <text:p>30.3718181818182</text:p>
          </table:table-cell>
        </table:table-row>
        <table:table-row table:style-name="ro1">
          <table:table-cell office:value-type="date" office:date-value="2026-04-13" calcext:value-type="date">
            <text:p>2026-04-13</text:p>
          </table:table-cell>
          <table:table-cell office:value-type="float" office:value="30.74" calcext:value-type="float">
            <text:p>30.74</text:p>
          </table:table-cell>
          <table:table-cell office:value-type="float" office:value="19407416" calcext:value-type="float">
            <text:p>19407416</text:p>
          </table:table-cell>
          <table:table-cell table:formula="of:=AVERAGE([.B631:.B679])" office:value-type="float" office:value="30.8916326530612" calcext:value-type="float">
            <text:p>30.8916326530612</text:p>
          </table:table-cell>
          <table:table-cell table:formula="of:=AVERAGE([.B581:.B679])" office:value-type="float" office:value="30.400404040404" calcext:value-type="float">
            <text:p>30.400404040404</text:p>
          </table:table-cell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float" office:value="30.71" calcext:value-type="float">
            <text:p>30.71</text:p>
          </table:table-cell>
          <table:table-cell office:value-type="float" office:value="18705323" calcext:value-type="float">
            <text:p>18705323</text:p>
          </table:table-cell>
          <table:table-cell table:formula="of:=AVERAGE([.B632:.B680])" office:value-type="float" office:value="30.8755102040816" calcext:value-type="float">
            <text:p>30.8755102040816</text:p>
          </table:table-cell>
          <table:table-cell table:formula="of:=AVERAGE([.B582:.B680])" office:value-type="float" office:value="30.4308080808081" calcext:value-type="float">
            <text:p>30.4308080808081</text:p>
          </table:table-cell>
        </table:table-row>
        <table:table-row table:style-name="ro1">
          <table:table-cell office:value-type="date" office:date-value="2026-04-15" calcext:value-type="date">
            <text:p>2026-04-15</text:p>
          </table:table-cell>
          <table:table-cell office:value-type="float" office:value="30.65" calcext:value-type="float">
            <text:p>30.65</text:p>
          </table:table-cell>
          <table:table-cell office:value-type="float" office:value="19024483" calcext:value-type="float">
            <text:p>19024483</text:p>
          </table:table-cell>
          <table:table-cell table:formula="of:=AVERAGE([.B633:.B681])" office:value-type="float" office:value="30.8565306122449" calcext:value-type="float">
            <text:p>30.8565306122449</text:p>
          </table:table-cell>
          <table:table-cell table:formula="of:=AVERAGE([.B583:.B681])" office:value-type="float" office:value="30.4590909090909" calcext:value-type="float">
            <text:p>30.4590909090909</text:p>
          </table:table-cell>
        </table:table-row>
        <table:table-row table:style-name="ro1">
          <table:table-cell office:value-type="date" office:date-value="2026-04-16" calcext:value-type="date">
            <text:p>2026-04-16</text:p>
          </table:table-cell>
          <table:table-cell office:value-type="float" office:value="30.81" calcext:value-type="float">
            <text:p>30.81</text:p>
          </table:table-cell>
          <table:table-cell office:value-type="float" office:value="17406481" calcext:value-type="float">
            <text:p>17406481</text:p>
          </table:table-cell>
          <table:table-cell table:formula="of:=AVERAGE([.B634:.B682])" office:value-type="float" office:value="30.8389795918367" calcext:value-type="float">
            <text:p>30.8389795918367</text:p>
          </table:table-cell>
          <table:table-cell table:formula="of:=AVERAGE([.B584:.B682])" office:value-type="float" office:value="30.4849494949495" calcext:value-type="float">
            <text:p>30.4849494949495</text:p>
          </table:table-cell>
        </table:table-row>
        <table:table-row table:style-name="ro1">
          <table:table-cell office:value-type="date" office:date-value="2026-04-17" calcext:value-type="date">
            <text:p>2026-04-17</text:p>
          </table:table-cell>
          <table:table-cell office:value-type="float" office:value="31.05" calcext:value-type="float">
            <text:p>31.05</text:p>
          </table:table-cell>
          <table:table-cell office:value-type="float" office:value="20134693" calcext:value-type="float">
            <text:p>20134693</text:p>
          </table:table-cell>
          <table:table-cell table:formula="of:=AVERAGE([.B635:.B683])" office:value-type="float" office:value="30.824693877551" calcext:value-type="float">
            <text:p>30.824693877551</text:p>
          </table:table-cell>
          <table:table-cell table:formula="of:=AVERAGE([.B585:.B683])" office:value-type="float" office:value="30.5143434343434" calcext:value-type="float">
            <text:p>30.5143434343434</text:p>
          </table:table-cell>
        </table:table-row>
        <table:table-row table:style-name="ro1">
          <table:table-cell office:value-type="date" office:date-value="2026-04-18" calcext:value-type="date">
            <text:p>2026-04-18</text:p>
          </table:table-cell>
          <table:table-cell office:value-type="float" office:value="31.05" calcext:value-type="float">
            <text:p>31.05</text:p>
          </table:table-cell>
          <table:table-cell office:value-type="float" office:value="20134693" calcext:value-type="float">
            <text:p>20134693</text:p>
          </table:table-cell>
          <table:table-cell table:formula="of:=AVERAGE([.B636:.B684])" office:value-type="float" office:value="30.81" calcext:value-type="float">
            <text:p>30.81</text:p>
          </table:table-cell>
          <table:table-cell table:formula="of:=AVERAGE([.B586:.B684])" office:value-type="float" office:value="30.5409090909091" calcext:value-type="float">
            <text:p>30.5409090909091</text:p>
          </table:table-cell>
        </table:table-row>
        <table:table-row table:style-name="ro1">
          <table:table-cell office:value-type="date" office:date-value="2026-04-19" calcext:value-type="date">
            <text:p>2026-04-19</text:p>
          </table:table-cell>
          <table:table-cell office:value-type="float" office:value="31.05" calcext:value-type="float">
            <text:p>31.05</text:p>
          </table:table-cell>
          <table:table-cell office:value-type="float" office:value="20134693" calcext:value-type="float">
            <text:p>20134693</text:p>
          </table:table-cell>
          <table:table-cell table:formula="of:=AVERAGE([.B637:.B685])" office:value-type="float" office:value="30.795306122449" calcext:value-type="float">
            <text:p>30.795306122449</text:p>
          </table:table-cell>
          <table:table-cell table:formula="of:=AVERAGE([.B587:.B685])" office:value-type="float" office:value="30.5661616161616" calcext:value-type="float">
            <text:p>30.5661616161616</text:p>
          </table:table-cell>
        </table:table-row>
        <table:table-row table:style-name="ro1">
          <table:table-cell office:value-type="date" office:date-value="2026-04-20" calcext:value-type="date">
            <text:p>2026-04-20</text:p>
          </table:table-cell>
          <table:table-cell office:value-type="float" office:value="31.03" calcext:value-type="float">
            <text:p>31.03</text:p>
          </table:table-cell>
          <table:table-cell office:value-type="float" office:value="17253123" calcext:value-type="float">
            <text:p>17253123</text:p>
          </table:table-cell>
          <table:table-cell table:formula="of:=AVERAGE([.B638:.B686])" office:value-type="float" office:value="30.780612244898" calcext:value-type="float">
            <text:p>30.780612244898</text:p>
          </table:table-cell>
          <table:table-cell table:formula="of:=AVERAGE([.B588:.B686])" office:value-type="float" office:value="30.5914141414141" calcext:value-type="float">
            <text:p>30.5914141414141</text:p>
          </table:table-cell>
        </table:table-row>
        <table:table-row table:style-name="ro1">
          <table:table-cell office:value-type="date" office:date-value="2026-04-21" calcext:value-type="date">
            <text:p>2026-04-21</text:p>
          </table:table-cell>
          <table:table-cell office:value-type="float" office:value="30.98" calcext:value-type="float">
            <text:p>30.98</text:p>
          </table:table-cell>
          <table:table-cell office:value-type="float" office:value="17909803" calcext:value-type="float">
            <text:p>17909803</text:p>
          </table:table-cell>
          <table:table-cell table:formula="of:=AVERAGE([.B639:.B687])" office:value-type="float" office:value="30.7636734693878" calcext:value-type="float">
            <text:p>30.7636734693878</text:p>
          </table:table-cell>
          <table:table-cell table:formula="of:=AVERAGE([.B589:.B687])" office:value-type="float" office:value="30.6164646464647" calcext:value-type="float">
            <text:p>30.6164646464647</text:p>
          </table:table-cell>
        </table:table-row>
        <table:table-row table:style-name="ro1">
          <table:table-cell office:value-type="date" office:date-value="2026-04-22" calcext:value-type="date">
            <text:p>2026-04-22</text:p>
          </table:table-cell>
          <table:table-cell office:value-type="float" office:value="31.01" calcext:value-type="float">
            <text:p>31.01</text:p>
          </table:table-cell>
          <table:table-cell office:value-type="float" office:value="15167156" calcext:value-type="float">
            <text:p>15167156</text:p>
          </table:table-cell>
          <table:table-cell table:formula="of:=AVERAGE([.B640:.B688])" office:value-type="float" office:value="30.7512244897959" calcext:value-type="float">
            <text:p>30.7512244897959</text:p>
          </table:table-cell>
          <table:table-cell table:formula="of:=AVERAGE([.B590:.B688])" office:value-type="float" office:value="30.6415151515152" calcext:value-type="float">
            <text:p>30.6415151515152</text:p>
          </table:table-cell>
        </table:table-row>
        <table:table-row table:style-name="ro1">
          <table:table-cell office:value-type="date" office:date-value="2026-04-23" calcext:value-type="date">
            <text:p>2026-04-23</text:p>
          </table:table-cell>
          <table:table-cell office:value-type="float" office:value="31.42" calcext:value-type="float">
            <text:p>31.42</text:p>
          </table:table-cell>
          <table:table-cell office:value-type="float" office:value="16814233" calcext:value-type="float">
            <text:p>16814233</text:p>
          </table:table-cell>
          <table:table-cell table:formula="of:=AVERAGE([.B641:.B689])" office:value-type="float" office:value="30.7404081632653" calcext:value-type="float">
            <text:p>30.7404081632653</text:p>
          </table:table-cell>
          <table:table-cell table:formula="of:=AVERAGE([.B591:.B689])" office:value-type="float" office:value="30.6656565656566" calcext:value-type="float">
            <text:p>30.6656565656566</text:p>
          </table:table-cell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float" office:value="31.2" calcext:value-type="float">
            <text:p>31.2</text:p>
          </table:table-cell>
          <table:table-cell office:value-type="float" office:value="19340653" calcext:value-type="float">
            <text:p>19340653</text:p>
          </table:table-cell>
          <table:table-cell table:formula="of:=AVERAGE([.B642:.B690])" office:value-type="float" office:value="30.7436734693878" calcext:value-type="float">
            <text:p>30.7436734693878</text:p>
          </table:table-cell>
          <table:table-cell table:formula="of:=AVERAGE([.B592:.B690])" office:value-type="float" office:value="30.689696969697" calcext:value-type="float">
            <text:p>30.689696969697</text:p>
          </table:table-cell>
        </table:table-row>
        <table:table-row table:style-name="ro1">
          <table:table-cell office:value-type="date" office:date-value="2026-04-25" calcext:value-type="date">
            <text:p>2026-04-25</text:p>
          </table:table-cell>
          <table:table-cell office:value-type="float" office:value="31.2" calcext:value-type="float">
            <text:p>31.2</text:p>
          </table:table-cell>
          <table:table-cell office:value-type="float" office:value="19340653" calcext:value-type="float">
            <text:p>19340653</text:p>
          </table:table-cell>
          <table:table-cell table:formula="of:=AVERAGE([.B643:.B691])" office:value-type="float" office:value="30.7451020408163" calcext:value-type="float">
            <text:p>30.7451020408163</text:p>
          </table:table-cell>
          <table:table-cell table:formula="of:=AVERAGE([.B593:.B691])" office:value-type="float" office:value="30.7116161616162" calcext:value-type="float">
            <text:p>30.7116161616162</text:p>
          </table:table-cell>
        </table:table-row>
        <table:table-row table:style-name="ro1">
          <table:table-cell office:value-type="date" office:date-value="2026-04-26" calcext:value-type="date">
            <text:p>2026-04-26</text:p>
          </table:table-cell>
          <table:table-cell office:value-type="float" office:value="31.2" calcext:value-type="float">
            <text:p>31.2</text:p>
          </table:table-cell>
          <table:table-cell office:value-type="float" office:value="19340653" calcext:value-type="float">
            <text:p>19340653</text:p>
          </table:table-cell>
          <table:table-cell table:formula="of:=AVERAGE([.B644:.B692])" office:value-type="float" office:value="30.7465306122449" calcext:value-type="float">
            <text:p>30.7465306122449</text:p>
          </table:table-cell>
          <table:table-cell table:formula="of:=AVERAGE([.B594:.B692])" office:value-type="float" office:value="30.7348484848485" calcext:value-type="float">
            <text:p>30.7348484848485</text:p>
          </table:table-cell>
        </table:table-row>
        <table:table-row table:style-name="ro1">
          <table:table-cell office:value-type="date" office:date-value="2026-04-27" calcext:value-type="date">
            <text:p>2026-04-27</text:p>
          </table:table-cell>
          <table:table-cell office:value-type="float" office:value="31.13" calcext:value-type="float">
            <text:p>31.13</text:p>
          </table:table-cell>
          <table:table-cell office:value-type="float" office:value="19472284" calcext:value-type="float">
            <text:p>19472284</text:p>
          </table:table-cell>
          <table:table-cell table:formula="of:=AVERAGE([.B645:.B693])" office:value-type="float" office:value="30.7479591836735" calcext:value-type="float">
            <text:p>30.7479591836735</text:p>
          </table:table-cell>
          <table:table-cell table:formula="of:=AVERAGE([.B595:.B693])" office:value-type="float" office:value="30.7580808080808" calcext:value-type="float">
            <text:p>30.7580808080808</text:p>
          </table:table-cell>
        </table:table-row>
        <table:table-row table:style-name="ro1">
          <table:table-cell office:value-type="date" office:date-value="2026-04-28" calcext:value-type="date">
            <text:p>2026-04-28</text:p>
          </table:table-cell>
          <table:table-cell office:value-type="float" office:value="31.31" calcext:value-type="float">
            <text:p>31.31</text:p>
          </table:table-cell>
          <table:table-cell office:value-type="float" office:value="15859922" calcext:value-type="float">
            <text:p>15859922</text:p>
          </table:table-cell>
          <table:table-cell table:formula="of:=AVERAGE([.B646:.B694])" office:value-type="float" office:value="30.7502040816327" calcext:value-type="float">
            <text:p>30.7502040816327</text:p>
          </table:table-cell>
          <table:table-cell table:formula="of:=AVERAGE([.B596:.B694])" office:value-type="float" office:value="30.7806060606061" calcext:value-type="float">
            <text:p>30.7806060606061</text:p>
          </table:table-cell>
        </table:table-row>
        <table:table-row table:style-name="ro1">
          <table:table-cell office:value-type="date" office:date-value="2026-04-29" calcext:value-type="date">
            <text:p>2026-04-29</text:p>
          </table:table-cell>
          <table:table-cell office:value-type="float" office:value="31.45" calcext:value-type="float">
            <text:p>31.45</text:p>
          </table:table-cell>
          <table:table-cell office:value-type="float" office:value="17417390" calcext:value-type="float">
            <text:p>17417390</text:p>
          </table:table-cell>
          <table:table-cell table:formula="of:=AVERAGE([.B647:.B695])" office:value-type="float" office:value="30.7585714285714" calcext:value-type="float">
            <text:p>30.7585714285714</text:p>
          </table:table-cell>
          <table:table-cell table:formula="of:=AVERAGE([.B597:.B695])" office:value-type="float" office:value="30.8049494949495" calcext:value-type="float">
            <text:p>30.8049494949495</text:p>
          </table:table-cell>
        </table:table-row>
        <table:table-row table:style-name="ro1">
          <table:table-cell office:value-type="date" office:date-value="2026-04-30" calcext:value-type="date">
            <text:p>2026-04-30</text:p>
          </table:table-cell>
          <table:table-cell office:value-type="float" office:value="32.07" calcext:value-type="float">
            <text:p>32.07</text:p>
          </table:table-cell>
          <table:table-cell office:value-type="float" office:value="21723332" calcext:value-type="float">
            <text:p>21723332</text:p>
          </table:table-cell>
          <table:table-cell table:formula="of:=AVERAGE([.B648:.B696])" office:value-type="float" office:value="30.7677551020408" calcext:value-type="float">
            <text:p>30.7677551020408</text:p>
          </table:table-cell>
          <table:table-cell table:formula="of:=AVERAGE([.B598:.B696])" office:value-type="float" office:value="30.8327272727273" calcext:value-type="float">
            <text:p>30.8327272727273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float" office:value="31.86" calcext:value-type="float">
            <text:p>31.86</text:p>
          </table:table-cell>
          <table:table-cell office:value-type="float" office:value="21039940" calcext:value-type="float">
            <text:p>21039940</text:p>
          </table:table-cell>
          <table:table-cell table:formula="of:=AVERAGE([.B649:.B697])" office:value-type="float" office:value="30.7932653061224" calcext:value-type="float">
            <text:p>30.7932653061224</text:p>
          </table:table-cell>
          <table:table-cell table:formula="of:=AVERAGE([.B599:.B697])" office:value-type="float" office:value="30.8622222222222" calcext:value-type="float">
            <text:p>30.8622222222222</text:p>
          </table:table-cell>
        </table:table-row>
        <table:table-row table:style-name="ro1">
          <table:table-cell office:value-type="date" office:date-value="2026-05-02" calcext:value-type="date">
            <text:p>2026-05-02</text:p>
          </table:table-cell>
          <table:table-cell office:value-type="float" office:value="31.86" calcext:value-type="float">
            <text:p>31.86</text:p>
          </table:table-cell>
          <table:table-cell office:value-type="float" office:value="21039940" calcext:value-type="float">
            <text:p>21039940</text:p>
          </table:table-cell>
          <table:table-cell table:formula="of:=AVERAGE([.B650:.B698])" office:value-type="float" office:value="30.8148979591837" calcext:value-type="float">
            <text:p>30.8148979591837</text:p>
          </table:table-cell>
          <table:table-cell table:formula="of:=AVERAGE([.B600:.B698])" office:value-type="float" office:value="30.8893939393939" calcext:value-type="float">
            <text:p>30.8893939393939</text:p>
          </table:table-cell>
        </table:table-row>
        <table:table-row table:style-name="ro1">
          <table:table-cell office:value-type="date" office:date-value="2026-05-03" calcext:value-type="date">
            <text:p>2026-05-03</text:p>
          </table:table-cell>
          <table:table-cell office:value-type="float" office:value="31.86" calcext:value-type="float">
            <text:p>31.86</text:p>
          </table:table-cell>
          <table:table-cell office:value-type="float" office:value="21039940" calcext:value-type="float">
            <text:p>21039940</text:p>
          </table:table-cell>
          <table:table-cell table:formula="of:=AVERAGE([.B651:.B699])" office:value-type="float" office:value="30.8365306122449" calcext:value-type="float">
            <text:p>30.8365306122449</text:p>
          </table:table-cell>
          <table:table-cell table:formula="of:=AVERAGE([.B601:.B699])" office:value-type="float" office:value="30.9168686868687" calcext:value-type="float">
            <text:p>30.9168686868687</text:p>
          </table:table-cell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float" office:value="31.52" calcext:value-type="float">
            <text:p>31.52</text:p>
          </table:table-cell>
          <table:table-cell office:value-type="float" office:value="22058915" calcext:value-type="float">
            <text:p>22058915</text:p>
          </table:table-cell>
          <table:table-cell table:formula="of:=AVERAGE([.B652:.B700])" office:value-type="float" office:value="30.8581632653061" calcext:value-type="float">
            <text:p>30.8581632653061</text:p>
          </table:table-cell>
          <table:table-cell table:formula="of:=AVERAGE([.B602:.B700])" office:value-type="float" office:value="30.9443434343434" calcext:value-type="float">
            <text:p>30.9443434343434</text:p>
          </table:table-cell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float" office:value="31.69" calcext:value-type="float">
            <text:p>31.69</text:p>
          </table:table-cell>
          <table:table-cell office:value-type="float" office:value="16891138" calcext:value-type="float">
            <text:p>16891138</text:p>
          </table:table-cell>
          <table:table-cell table:formula="of:=AVERAGE([.B653:.B701])" office:value-type="float" office:value="30.8714285714286" calcext:value-type="float">
            <text:p>30.8714285714286</text:p>
          </table:table-cell>
          <table:table-cell table:formula="of:=AVERAGE([.B603:.B701])" office:value-type="float" office:value="30.9683838383838" calcext:value-type="float">
            <text:p>30.9683838383838</text:p>
          </table:table-cell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float" office:value="31.66" calcext:value-type="float">
            <text:p>31.66</text:p>
          </table:table-cell>
          <table:table-cell office:value-type="float" office:value="20183648" calcext:value-type="float">
            <text:p>20183648</text:p>
          </table:table-cell>
          <table:table-cell table:formula="of:=AVERAGE([.B654:.B702])" office:value-type="float" office:value="30.8865306122449" calcext:value-type="float">
            <text:p>30.8865306122449</text:p>
          </table:table-cell>
          <table:table-cell table:formula="of:=AVERAGE([.B604:.B702])" office:value-type="float" office:value="30.9937373737374" calcext:value-type="float">
            <text:p>30.9937373737374</text:p>
          </table:table-cell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float" office:value="31.54" calcext:value-type="float">
            <text:p>31.54</text:p>
          </table:table-cell>
          <table:table-cell office:value-type="float" office:value="24151241" calcext:value-type="float">
            <text:p>24151241</text:p>
          </table:table-cell>
          <table:table-cell table:formula="of:=AVERAGE([.B655:.B703])" office:value-type="float" office:value="30.9085714285714" calcext:value-type="float">
            <text:p>30.9085714285714</text:p>
          </table:table-cell>
          <table:table-cell table:formula="of:=AVERAGE([.B605:.B703])" office:value-type="float" office:value="31.0168686868687" calcext:value-type="float">
            <text:p>31.0168686868687</text:p>
          </table:table-cell>
        </table:table-row>
        <table:table-row table:style-name="ro1">
          <table:table-cell office:value-type="date" office:date-value="2026-05-08" calcext:value-type="date">
            <text:p>2026-05-08</text:p>
          </table:table-cell>
          <table:table-cell office:value-type="float" office:value="31.62" calcext:value-type="float">
            <text:p>31.62</text:p>
          </table:table-cell>
          <table:table-cell office:value-type="float" office:value="20946816" calcext:value-type="float">
            <text:p>20946816</text:p>
          </table:table-cell>
          <table:table-cell table:formula="of:=AVERAGE([.B656:.B704])" office:value-type="float" office:value="30.9279591836735" calcext:value-type="float">
            <text:p>30.9279591836735</text:p>
          </table:table-cell>
          <table:table-cell table:formula="of:=AVERAGE([.B606:.B704])" office:value-type="float" office:value="31.0394949494949" calcext:value-type="float">
            <text:p>31.0394949494949</text:p>
          </table:table-cell>
        </table:table-row>
        <table:table-row table:style-name="ro1">
          <table:table-cell office:value-type="date" office:date-value="2026-05-09" calcext:value-type="date">
            <text:p>2026-05-09</text:p>
          </table:table-cell>
          <table:table-cell office:value-type="float" office:value="31.62" calcext:value-type="float">
            <text:p>31.62</text:p>
          </table:table-cell>
          <table:table-cell office:value-type="float" office:value="20946816" calcext:value-type="float">
            <text:p>20946816</text:p>
          </table:table-cell>
          <table:table-cell table:formula="of:=AVERAGE([.B657:.B705])" office:value-type="float" office:value="30.9530612244898" calcext:value-type="float">
            <text:p>30.9530612244898</text:p>
          </table:table-cell>
          <table:table-cell table:formula="of:=AVERAGE([.B607:.B705])" office:value-type="float" office:value="31.0622222222222" calcext:value-type="float">
            <text:p>31.0622222222222</text:p>
          </table:table-cell>
        </table:table-row>
        <table:table-row table:style-name="ro1">
          <table:table-cell office:value-type="date" office:date-value="2026-05-10" calcext:value-type="date">
            <text:p>2026-05-10</text:p>
          </table:table-cell>
          <table:table-cell office:value-type="float" office:value="31.62" calcext:value-type="float">
            <text:p>31.62</text:p>
          </table:table-cell>
          <table:table-cell office:value-type="float" office:value="20946816" calcext:value-type="float">
            <text:p>20946816</text:p>
          </table:table-cell>
          <table:table-cell table:formula="of:=AVERAGE([.B658:.B706])" office:value-type="float" office:value="30.9781632653061" calcext:value-type="float">
            <text:p>30.9781632653061</text:p>
          </table:table-cell>
          <table:table-cell table:formula="of:=AVERAGE([.B608:.B706])" office:value-type="float" office:value="31.080404040404" calcext:value-type="float">
            <text:p>31.080404040404</text:p>
          </table:table-cell>
        </table:table-row>
        <table:table-row table:style-name="ro1">
          <table:table-cell office:value-type="date" office:date-value="2026-05-11" calcext:value-type="date">
            <text:p>2026-05-11</text:p>
          </table:table-cell>
          <table:table-cell office:value-type="float" office:value="31.75" calcext:value-type="float">
            <text:p>31.75</text:p>
          </table:table-cell>
          <table:table-cell office:value-type="float" office:value="24800709" calcext:value-type="float">
            <text:p>24800709</text:p>
          </table:table-cell>
          <table:table-cell table:formula="of:=AVERAGE([.B659:.B707])" office:value-type="float" office:value="31.0032653061225" calcext:value-type="float">
            <text:p>31.0032653061225</text:p>
          </table:table-cell>
          <table:table-cell table:formula="of:=AVERAGE([.B609:.B707])" office:value-type="float" office:value="31.0985858585859" calcext:value-type="float">
            <text:p>31.0985858585859</text:p>
          </table:table-cell>
        </table:table-row>
        <table:table-row table:style-name="ro1">
          <table:table-cell office:value-type="date" office:date-value="2026-05-12" calcext:value-type="date">
            <text:p>2026-05-12</text:p>
          </table:table-cell>
          <table:table-cell office:value-type="float" office:value="31.76" calcext:value-type="float">
            <text:p>31.76</text:p>
          </table:table-cell>
          <table:table-cell office:value-type="float" office:value="22999942" calcext:value-type="float">
            <text:p>22999942</text:p>
          </table:table-cell>
          <table:table-cell table:formula="of:=AVERAGE([.B660:.B708])" office:value-type="float" office:value="31.0279591836735" calcext:value-type="float">
            <text:p>31.0279591836735</text:p>
          </table:table-cell>
          <table:table-cell table:formula="of:=AVERAGE([.B610:.B708])" office:value-type="float" office:value="31.1180808080808" calcext:value-type="float">
            <text:p>31.1180808080808</text:p>
          </table:table-cell>
        </table:table-row>
        <table:table-row table:style-name="ro1">
          <table:table-cell office:value-type="date" office:date-value="2026-05-13" calcext:value-type="date">
            <text:p>2026-05-13</text:p>
          </table:table-cell>
          <table:table-cell office:value-type="float" office:value="31.75" calcext:value-type="float">
            <text:p>31.75</text:p>
          </table:table-cell>
          <table:table-cell office:value-type="float" office:value="16077364" calcext:value-type="float">
            <text:p>16077364</text:p>
          </table:table-cell>
          <table:table-cell table:formula="of:=AVERAGE([.B661:.B709])" office:value-type="float" office:value="31.0508163265306" calcext:value-type="float">
            <text:p>31.0508163265306</text:p>
          </table:table-cell>
          <table:table-cell table:formula="of:=AVERAGE([.B611:.B709])" office:value-type="float" office:value="31.1358585858586" calcext:value-type="float">
            <text:p>31.1358585858586</text:p>
          </table:table-cell>
        </table:table-row>
        <table:table-row table:style-name="ro1">
          <table:table-cell office:value-type="date" office:date-value="2026-05-14" calcext:value-type="date">
            <text:p>2026-05-14</text:p>
          </table:table-cell>
          <table:table-cell office:value-type="float" office:value="31.8" calcext:value-type="float">
            <text:p>31.8</text:p>
          </table:table-cell>
          <table:table-cell office:value-type="float" office:value="20145894" calcext:value-type="float">
            <text:p>20145894</text:p>
          </table:table-cell>
          <table:table-cell table:formula="of:=AVERAGE([.B662:.B710])" office:value-type="float" office:value="31.0755102040816" calcext:value-type="float">
            <text:p>31.0755102040816</text:p>
          </table:table-cell>
          <table:table-cell table:formula="of:=AVERAGE([.B612:.B710])" office:value-type="float" office:value="31.1484848484848" calcext:value-type="float">
            <text:p>31.1484848484848</text:p>
          </table:table-cell>
        </table:table-row>
        <table:table-row table:style-name="ro1">
          <table:table-cell office:value-type="date" office:date-value="2026-05-15" calcext:value-type="date">
            <text:p>2026-05-15</text:p>
          </table:table-cell>
          <table:table-cell office:value-type="float" office:value="31.72" calcext:value-type="float">
            <text:p>31.72</text:p>
          </table:table-cell>
          <table:table-cell office:value-type="float" office:value="16015707" calcext:value-type="float">
            <text:p>16015707</text:p>
          </table:table-cell>
          <table:table-cell table:formula="of:=AVERAGE([.B663:.B711])" office:value-type="float" office:value="31.0995918367347" calcext:value-type="float">
            <text:p>31.0995918367347</text:p>
          </table:table-cell>
          <table:table-cell table:formula="of:=AVERAGE([.B613:.B711])" office:value-type="float" office:value="31.1564646464646" calcext:value-type="float">
            <text:p>31.1564646464646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float" office:value="31.72" calcext:value-type="float">
            <text:p>31.72</text:p>
          </table:table-cell>
          <table:table-cell office:value-type="float" office:value="16015707" calcext:value-type="float">
            <text:p>16015707</text:p>
          </table:table-cell>
          <table:table-cell table:formula="of:=AVERAGE([.B664:.B712])" office:value-type="float" office:value="31.1257142857143" calcext:value-type="float">
            <text:p>31.1257142857143</text:p>
          </table:table-cell>
          <table:table-cell table:formula="of:=AVERAGE([.B614:.B712])" office:value-type="float" office:value="31.1640404040404" calcext:value-type="float">
            <text:p>31.1640404040404</text:p>
          </table:table-cell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float" office:value="31.72" calcext:value-type="float">
            <text:p>31.72</text:p>
          </table:table-cell>
          <table:table-cell office:value-type="float" office:value="16015707" calcext:value-type="float">
            <text:p>16015707</text:p>
          </table:table-cell>
          <table:table-cell table:formula="of:=AVERAGE([.B665:.B713])" office:value-type="float" office:value="31.1518367346939" calcext:value-type="float">
            <text:p>31.1518367346939</text:p>
          </table:table-cell>
          <table:table-cell table:formula="of:=AVERAGE([.B615:.B713])" office:value-type="float" office:value="31.1665656565657" calcext:value-type="float">
            <text:p>31.1665656565657</text:p>
          </table:table-cell>
        </table:table-row>
        <table:table-row table:style-name="ro1">
          <table:table-cell office:value-type="date" office:date-value="2026-05-18" calcext:value-type="date">
            <text:p>2026-05-18</text:p>
          </table:table-cell>
          <table:table-cell office:value-type="float" office:value="32.04" calcext:value-type="float">
            <text:p>32.04</text:p>
          </table:table-cell>
          <table:table-cell office:value-type="float" office:value="20267357" calcext:value-type="float">
            <text:p>20267357</text:p>
          </table:table-cell>
          <table:table-cell table:formula="of:=AVERAGE([.B666:.B714])" office:value-type="float" office:value="31.1779591836735" calcext:value-type="float">
            <text:p>31.1779591836735</text:p>
          </table:table-cell>
          <table:table-cell table:formula="of:=AVERAGE([.B616:.B714])" office:value-type="float" office:value="31.1690909090909" calcext:value-type="float">
            <text:p>31.1690909090909</text:p>
          </table:table-cell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float" office:value="32.1" calcext:value-type="float">
            <text:p>32.1</text:p>
          </table:table-cell>
          <table:table-cell office:value-type="float" office:value="18074167" calcext:value-type="float">
            <text:p>18074167</text:p>
          </table:table-cell>
          <table:table-cell table:formula="of:=AVERAGE([.B667:.B715])" office:value-type="float" office:value="31.2097959183673" calcext:value-type="float">
            <text:p>31.2097959183673</text:p>
          </table:table-cell>
          <table:table-cell table:formula="of:=AVERAGE([.B617:.B715])" office:value-type="float" office:value="31.1748484848485" calcext:value-type="float">
            <text:p>31.1748484848485</text:p>
          </table:table-cell>
        </table:table-row>
        <table:table-row table:style-name="ro1">
          <table:table-cell office:value-type="date" office:date-value="2026-05-20" calcext:value-type="date">
            <text:p>2026-05-20</text:p>
          </table:table-cell>
          <table:table-cell office:value-type="float" office:value="32.12" calcext:value-type="float">
            <text:p>32.12</text:p>
          </table:table-cell>
          <table:table-cell office:value-type="float" office:value="18299080" calcext:value-type="float">
            <text:p>18299080</text:p>
          </table:table-cell>
          <table:table-cell table:formula="of:=AVERAGE([.B668:.B716])" office:value-type="float" office:value="31.2387755102041" calcext:value-type="float">
            <text:p>31.2387755102041</text:p>
          </table:table-cell>
          <table:table-cell table:formula="of:=AVERAGE([.B618:.B716])" office:value-type="float" office:value="31.1824242424242" calcext:value-type="float">
            <text:p>31.1824242424242</text:p>
          </table:table-cell>
        </table:table-row>
        <table:table-row table:style-name="ro1">
          <table:table-cell office:value-type="date" office:date-value="2026-05-21" calcext:value-type="date">
            <text:p>2026-05-21</text:p>
          </table:table-cell>
          <table:table-cell office:value-type="float" office:value="32.25" calcext:value-type="float">
            <text:p>32.25</text:p>
          </table:table-cell>
          <table:table-cell office:value-type="float" office:value="19360600" calcext:value-type="float">
            <text:p>19360600</text:p>
          </table:table-cell>
          <table:table-cell table:formula="of:=AVERAGE([.B669:.B717])" office:value-type="float" office:value="31.2716326530612" calcext:value-type="float">
            <text:p>31.2716326530612</text:p>
          </table:table-cell>
          <table:table-cell table:formula="of:=AVERAGE([.B619:.B717])" office:value-type="float" office:value="31.1907070707071" calcext:value-type="float">
            <text:p>31.1907070707071</text:p>
          </table:table-cell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float" office:value="32.83" calcext:value-type="float">
            <text:p>32.83</text:p>
          </table:table-cell>
          <table:table-cell office:value-type="float" office:value="19171979" calcext:value-type="float">
            <text:p>19171979</text:p>
          </table:table-cell>
          <table:table-cell table:formula="of:=AVERAGE([.B670:.B718])" office:value-type="float" office:value="31.3061224489796" calcext:value-type="float">
            <text:p>31.3061224489796</text:p>
          </table:table-cell>
          <table:table-cell table:formula="of:=AVERAGE([.B620:.B718])" office:value-type="float" office:value="31.1968686868687" calcext:value-type="float">
            <text:p>31.1968686868687</text:p>
          </table:table-cell>
        </table:table-row>
        <table:table-row table:style-name="ro1">
          <table:table-cell office:value-type="date" office:date-value="2026-05-23" calcext:value-type="date">
            <text:p>2026-05-23</text:p>
          </table:table-cell>
          <table:table-cell office:value-type="float" office:value="32.83" calcext:value-type="float">
            <text:p>32.83</text:p>
          </table:table-cell>
          <table:table-cell office:value-type="float" office:value="19171979" calcext:value-type="float">
            <text:p>19171979</text:p>
          </table:table-cell>
          <table:table-cell table:formula="of:=AVERAGE([.B671:.B719])" office:value-type="float" office:value="31.3524489795918" calcext:value-type="float">
            <text:p>31.3524489795918</text:p>
          </table:table-cell>
          <table:table-cell table:formula="of:=AVERAGE([.B621:.B719])" office:value-type="float" office:value="31.2119191919192" calcext:value-type="float">
            <text:p>31.2119191919192</text:p>
          </table:table-cell>
        </table:table-row>
        <table:table-row table:style-name="ro1">
          <table:table-cell office:value-type="date" office:date-value="2026-05-24" calcext:value-type="date">
            <text:p>2026-05-24</text:p>
          </table:table-cell>
          <table:table-cell office:value-type="float" office:value="32.83" calcext:value-type="float">
            <text:p>32.83</text:p>
          </table:table-cell>
          <table:table-cell office:value-type="float" office:value="19171979" calcext:value-type="float">
            <text:p>19171979</text:p>
          </table:table-cell>
          <table:table-cell table:formula="of:=AVERAGE([.B672:.B720])" office:value-type="float" office:value="31.3987755102041" calcext:value-type="float">
            <text:p>31.3987755102041</text:p>
          </table:table-cell>
          <table:table-cell table:formula="of:=AVERAGE([.B622:.B720])" office:value-type="float" office:value="31.2242424242424" calcext:value-type="float">
            <text:p>31.2242424242424</text:p>
          </table:table-cell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float" office:value="32.83" calcext:value-type="float">
            <text:p>32.83</text:p>
          </table:table-cell>
          <table:table-cell office:value-type="float" office:value="19171979" calcext:value-type="float">
            <text:p>19171979</text:p>
          </table:table-cell>
          <table:table-cell table:formula="of:=AVERAGE([.B673:.B721])" office:value-type="float" office:value="31.4451020408163" calcext:value-type="float">
            <text:p>31.4451020408163</text:p>
          </table:table-cell>
          <table:table-cell table:formula="of:=AVERAGE([.B623:.B721])" office:value-type="float" office:value="31.2365656565657" calcext:value-type="float">
            <text:p>31.2365656565657</text:p>
          </table:table-cell>
        </table:table-row>
        <table:table-row table:style-name="ro1">
          <table:table-cell office:value-type="date" office:date-value="2026-05-26" calcext:value-type="date">
            <text:p>2026-05-26</text:p>
          </table:table-cell>
          <table:table-cell office:value-type="float" office:value="32.67" calcext:value-type="float">
            <text:p>32.67</text:p>
          </table:table-cell>
          <table:table-cell office:value-type="float" office:value="28043653" calcext:value-type="float">
            <text:p>28043653</text:p>
          </table:table-cell>
          <table:table-cell table:formula="of:=AVERAGE([.B674:.B722])" office:value-type="float" office:value="31.4897959183673" calcext:value-type="float">
            <text:p>31.4897959183673</text:p>
          </table:table-cell>
          <table:table-cell table:formula="of:=AVERAGE([.B624:.B722])" office:value-type="float" office:value="31.2488888888889" calcext:value-type="float">
            <text:p>31.2488888888889</text:p>
          </table:table-cell>
        </table:table-row>
        <table:table-row table:style-name="ro1">
          <table:table-cell office:value-type="date" office:date-value="2026-05-27" calcext:value-type="date">
            <text:p>2026-05-27</text:p>
          </table:table-cell>
          <table:table-cell office:value-type="float" office:value="32.55" calcext:value-type="float">
            <text:p>32.55</text:p>
          </table:table-cell>
          <table:table-cell office:value-type="float" office:value="17388720" calcext:value-type="float">
            <text:p>17388720</text:p>
          </table:table-cell>
          <table:table-cell table:formula="of:=AVERAGE([.B675:.B723])" office:value-type="float" office:value="31.5328571428571" calcext:value-type="float">
            <text:p>31.5328571428571</text:p>
          </table:table-cell>
          <table:table-cell table:formula="of:=AVERAGE([.B625:.B723])" office:value-type="float" office:value="31.259595959596" calcext:value-type="float">
            <text:p>31.259595959596</text:p>
          </table:table-cell>
        </table:table-row>
        <table:table-row table:style-name="ro1">
          <table:table-cell office:value-type="date" office:date-value="2026-05-28" calcext:value-type="date">
            <text:p>2026-05-28</text:p>
          </table:table-cell>
          <table:table-cell office:value-type="float" office:value="32.63" calcext:value-type="float">
            <text:p>32.63</text:p>
          </table:table-cell>
          <table:table-cell office:value-type="float" office:value="16915439" calcext:value-type="float">
            <text:p>16915439</text:p>
          </table:table-cell>
          <table:table-cell table:formula="of:=AVERAGE([.B676:.B724])" office:value-type="float" office:value="31.5673469387755" calcext:value-type="float">
            <text:p>31.5673469387755</text:p>
          </table:table-cell>
          <table:table-cell table:formula="of:=AVERAGE([.B626:.B724])" office:value-type="float" office:value="31.2710101010101" calcext:value-type="float">
            <text:p>31.2710101010101</text:p>
          </table:table-cell>
        </table:table-row>
        <table:table-row table:style-name="ro1">
          <table:table-cell office:value-type="date" office:date-value="2026-05-29" calcext:value-type="date">
            <text:p>2026-05-29</text:p>
          </table:table-cell>
          <table:table-cell office:value-type="float" office:value="32.5" calcext:value-type="float">
            <text:p>32.5</text:p>
          </table:table-cell>
          <table:table-cell office:value-type="float" office:value="17205895" calcext:value-type="float">
            <text:p>17205895</text:p>
          </table:table-cell>
          <table:table-cell table:formula="of:=AVERAGE([.B677:.B725])" office:value-type="float" office:value="31.6018367346939" calcext:value-type="float">
            <text:p>31.6018367346939</text:p>
          </table:table-cell>
          <table:table-cell table:formula="of:=AVERAGE([.B627:.B725])" office:value-type="float" office:value="31.2818181818182" calcext:value-type="float">
            <text:p>31.2818181818182</text:p>
          </table:table-cell>
        </table:table-row>
        <table:table-row table:style-name="ro1">
          <table:table-cell office:value-type="date" office:date-value="2026-05-30" calcext:value-type="date">
            <text:p>2026-05-30</text:p>
          </table:table-cell>
          <table:table-cell office:value-type="float" office:value="32.5" calcext:value-type="float">
            <text:p>32.5</text:p>
          </table:table-cell>
          <table:table-cell office:value-type="float" office:value="17205895" calcext:value-type="float">
            <text:p>17205895</text:p>
          </table:table-cell>
          <table:table-cell table:formula="of:=AVERAGE([.B678:.B726])" office:value-type="float" office:value="31.6414285714286" calcext:value-type="float">
            <text:p>31.6414285714286</text:p>
          </table:table-cell>
          <table:table-cell table:formula="of:=AVERAGE([.B628:.B726])" office:value-type="float" office:value="31.2912121212121" calcext:value-type="float">
            <text:p>31.2912121212121</text:p>
          </table:table-cell>
        </table:table-row>
        <table:table-row table:style-name="ro1">
          <table:table-cell office:value-type="date" office:date-value="2026-05-31" calcext:value-type="date">
            <text:p>2026-05-31</text:p>
          </table:table-cell>
          <table:table-cell office:value-type="float" office:value="32.5" calcext:value-type="float">
            <text:p>32.5</text:p>
          </table:table-cell>
          <table:table-cell office:value-type="float" office:value="17205895" calcext:value-type="float">
            <text:p>17205895</text:p>
          </table:table-cell>
          <table:table-cell table:formula="of:=AVERAGE([.B679:.B727])" office:value-type="float" office:value="31.6810204081633" calcext:value-type="float">
            <text:p>31.6810204081633</text:p>
          </table:table-cell>
          <table:table-cell table:formula="of:=AVERAGE([.B629:.B727])" office:value-type="float" office:value="31.300202020202" calcext:value-type="float">
            <text:p>31.300202020202</text:p>
          </table:table-cell>
        </table:table-row>
        <table:table-row table:style-name="ro1">
          <table:table-cell office:value-type="date" office:date-value="2026-06-01" calcext:value-type="date">
            <text:p>2026-06-01</text:p>
          </table:table-cell>
          <table:table-cell office:value-type="float" office:value="32.18" calcext:value-type="float">
            <text:p>32.18</text:p>
          </table:table-cell>
          <table:table-cell office:value-type="float" office:value="27497769" calcext:value-type="float">
            <text:p>27497769</text:p>
          </table:table-cell>
          <table:table-cell table:formula="of:=AVERAGE([.B680:.B728])" office:value-type="float" office:value="31.720612244898" calcext:value-type="float">
            <text:p>31.720612244898</text:p>
          </table:table-cell>
          <table:table-cell table:formula="of:=AVERAGE([.B630:.B728])" office:value-type="float" office:value="31.3091919191919" calcext:value-type="float">
            <text:p>31.3091919191919</text:p>
          </table:table-cell>
        </table:table-row>
        <table:table-row table:style-name="ro1">
          <table:table-cell office:value-type="date" office:date-value="2026-06-02" calcext:value-type="date">
            <text:p>2026-06-02</text:p>
          </table:table-cell>
          <table:table-cell office:value-type="float" office:value="32.37" calcext:value-type="float">
            <text:p>32.37</text:p>
          </table:table-cell>
          <table:table-cell office:value-type="float" office:value="19827036" calcext:value-type="float">
            <text:p>19827036</text:p>
          </table:table-cell>
          <table:table-cell table:formula="of:=AVERAGE([.B681:.B729])" office:value-type="float" office:value="31.75" calcext:value-type="float">
            <text:p>31.75</text:p>
          </table:table-cell>
          <table:table-cell table:formula="of:=AVERAGE([.B631:.B729])" office:value-type="float" office:value="31.3149494949495" calcext:value-type="float">
            <text:p>31.3149494949495</text:p>
          </table:table-cell>
        </table:table-row>
        <table:table-row table:style-name="ro1">
          <table:table-cell office:value-type="date" office:date-value="2026-06-03" calcext:value-type="date">
            <text:p>2026-06-03</text:p>
          </table:table-cell>
          <table:table-cell office:value-type="float" office:value="32.37" calcext:value-type="float">
            <text:p>32.37</text:p>
          </table:table-cell>
          <table:table-cell office:value-type="float" office:value="16608210" calcext:value-type="float">
            <text:p>16608210</text:p>
          </table:table-cell>
          <table:table-cell table:formula="of:=AVERAGE([.B682:.B730])" office:value-type="float" office:value="31.7838775510204" calcext:value-type="float">
            <text:p>31.7838775510204</text:p>
          </table:table-cell>
          <table:table-cell table:formula="of:=AVERAGE([.B632:.B730])" office:value-type="float" office:value="31.3234343434343" calcext:value-type="float">
            <text:p>31.3234343434343</text:p>
          </table:table-cell>
        </table:table-row>
        <table:table-row table:style-name="ro1">
          <table:table-cell office:value-type="date" office:date-value="2026-06-04" calcext:value-type="date">
            <text:p>2026-06-04</text:p>
          </table:table-cell>
          <table:table-cell office:value-type="float" office:value="32.59" calcext:value-type="float">
            <text:p>32.59</text:p>
          </table:table-cell>
          <table:table-cell office:value-type="float" office:value="18235093" calcext:value-type="float">
            <text:p>18235093</text:p>
          </table:table-cell>
          <table:table-cell table:formula="of:=AVERAGE([.B683:.B731])" office:value-type="float" office:value="31.8189795918367" calcext:value-type="float">
            <text:p>31.8189795918367</text:p>
          </table:table-cell>
          <table:table-cell table:formula="of:=AVERAGE([.B633:.B731])" office:value-type="float" office:value="31.3308080808081" calcext:value-type="float">
            <text:p>31.3308080808081</text:p>
          </table:table-cell>
        </table:table-row>
        <table:table-row table:style-name="ro1">
          <table:table-cell office:value-type="date" office:date-value="2026-06-05" calcext:value-type="date">
            <text:p>2026-06-05</text:p>
          </table:table-cell>
          <table:table-cell office:value-type="float" office:value="32.3" calcext:value-type="float">
            <text:p>32.3</text:p>
          </table:table-cell>
          <table:table-cell office:value-type="float" office:value="26825986" calcext:value-type="float">
            <text:p>26825986</text:p>
          </table:table-cell>
          <table:table-cell table:formula="of:=AVERAGE([.B684:.B732])" office:value-type="float" office:value="31.855306122449" calcext:value-type="float">
            <text:p>31.855306122449</text:p>
          </table:table-cell>
          <table:table-cell table:formula="of:=AVERAGE([.B634:.B732])" office:value-type="float" office:value="31.3417171717172" calcext:value-type="float">
            <text:p>31.3417171717172</text:p>
          </table:table-cell>
        </table:table-row>
      </table:table>
      <table:table table:name="Forecast" table:style-name="ta1">
        <table:shapes>
          <draw:frame draw:z-index="0" draw:style-name="gr1" draw:text-style-name="P1" svg:width="6.3059in" svg:height="5.6071in" svg:x="5.0665in" svg:y="0.7244in">
            <draw:object draw:notify-on-update-of-ranges="Forecast.A1:Forecast.A1 Forecast.A2:Forecast.A762 Forecast.B1:Forecast.B1 Forecast.B2:Forecast.B762 Forecast.C1:Forecast.C1 Forecast.C2:Forecast.C762 Forecast.D1:Forecast.D1 Forecast.D2:Forecast.D762 Forecast.E1:Forecast.E1 Forecast.E2:Forecast.E762 Forecast.F1:Forecast.F1 Forecast.F2:Forecast.F7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/C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25.3223" calcext:value-type="float">
            <text:p>25.3223</text:p>
          </table:table-cell>
          <table:table-cell table:number-columns-repeated="4"/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25.3126" calcext:value-type="float">
            <text:p>25.3126</text:p>
          </table:table-cell>
          <table:table-cell table:number-columns-repeated="4"/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25.2899" calcext:value-type="float">
            <text:p>25.2899</text:p>
          </table:table-cell>
          <table:table-cell table:number-columns-repeated="4"/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25.2283" calcext:value-type="float">
            <text:p>25.2283</text:p>
          </table:table-cell>
          <table:table-cell table:number-columns-repeated="4"/>
        </table:table-row>
        <table:table-row table:style-name="ro1">
          <table:table-cell office:value-type="date" office:date-value="2024-06-08" calcext:value-type="date">
            <text:p>2024-06-08</text:p>
          </table:table-cell>
          <table:table-cell office:value-type="float" office:value="25.2283" calcext:value-type="float">
            <text:p>25.2283</text:p>
          </table:table-cell>
          <table:table-cell table:number-columns-repeated="4"/>
        </table:table-row>
        <table:table-row table:style-name="ro1">
          <table:table-cell office:value-type="date" office:date-value="2024-06-09" calcext:value-type="date">
            <text:p>2024-06-09</text:p>
          </table:table-cell>
          <table:table-cell office:value-type="float" office:value="25.2283" calcext:value-type="float">
            <text:p>25.2283</text:p>
          </table:table-cell>
          <table:table-cell table:number-columns-repeated="4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25.1894" calcext:value-type="float">
            <text:p>25.1894</text:p>
          </table:table-cell>
          <table:table-cell table:number-columns-repeated="4"/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25.102" calcext:value-type="float">
            <text:p>25.102</text:p>
          </table:table-cell>
          <table:table-cell table:number-columns-repeated="4"/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25.0826" calcext:value-type="float">
            <text:p>25.0826</text:p>
          </table:table-cell>
          <table:table-cell table:number-columns-repeated="4"/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24.9757" calcext:value-type="float">
            <text:p>24.9757</text:p>
          </table:table-cell>
          <table:table-cell table:number-columns-repeated="4"/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24.8721" calcext:value-type="float">
            <text:p>24.8721</text:p>
          </table:table-cell>
          <table:table-cell table:number-columns-repeated="4"/>
        </table:table-row>
        <table:table-row table:style-name="ro1">
          <table:table-cell office:value-type="date" office:date-value="2024-06-15" calcext:value-type="date">
            <text:p>2024-06-15</text:p>
          </table:table-cell>
          <table:table-cell office:value-type="float" office:value="24.8721" calcext:value-type="float">
            <text:p>24.8721</text:p>
          </table:table-cell>
          <table:table-cell table:number-columns-repeated="4"/>
        </table:table-row>
        <table:table-row table:style-name="ro1">
          <table:table-cell office:value-type="date" office:date-value="2024-06-16" calcext:value-type="date">
            <text:p>2024-06-16</text:p>
          </table:table-cell>
          <table:table-cell office:value-type="float" office:value="24.8721" calcext:value-type="float">
            <text:p>24.8721</text:p>
          </table:table-cell>
          <table:table-cell table:number-columns-repeated="4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25.0372" calcext:value-type="float">
            <text:p>25.0372</text:p>
          </table:table-cell>
          <table:table-cell table:number-columns-repeated="4"/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25.1473" calcext:value-type="float">
            <text:p>25.1473</text:p>
          </table:table-cell>
          <table:table-cell table:number-columns-repeated="4"/>
        </table:table-row>
        <table:table-row table:style-name="ro1">
          <table:table-cell office:value-type="date" office:date-value="2024-06-19" calcext:value-type="date">
            <text:p>2024-06-19</text:p>
          </table:table-cell>
          <table:table-cell office:value-type="float" office:value="25.1473" calcext:value-type="float">
            <text:p>25.1473</text:p>
          </table:table-cell>
          <table:table-cell table:number-columns-repeated="4"/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25.2835" calcext:value-type="float">
            <text:p>25.2835</text:p>
          </table:table-cell>
          <table:table-cell table:number-columns-repeated="4"/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25.3028" calcext:value-type="float">
            <text:p>25.3028</text:p>
          </table:table-cell>
          <table:table-cell table:number-columns-repeated="4"/>
        </table:table-row>
        <table:table-row table:style-name="ro1">
          <table:table-cell office:value-type="date" office:date-value="2024-06-22" calcext:value-type="date">
            <text:p>2024-06-22</text:p>
          </table:table-cell>
          <table:table-cell office:value-type="float" office:value="25.3028" calcext:value-type="float">
            <text:p>25.3028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float" office:value="25.3028" calcext:value-type="float">
            <text:p>25.3028</text:p>
          </table:table-cell>
          <table:table-cell table:number-columns-repeated="4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25.6559" calcext:value-type="float">
            <text:p>25.6559</text:p>
          </table:table-cell>
          <table:table-cell table:number-columns-repeated="4"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25.4518" calcext:value-type="float">
            <text:p>25.4518</text:p>
          </table:table-cell>
          <table:table-cell table:number-columns-repeated="4"/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25.3452" calcext:value-type="float">
            <text:p>25.3452</text:p>
          </table:table-cell>
          <table:table-cell table:number-columns-repeated="4"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25.2928" calcext:value-type="float">
            <text:p>25.2928</text:p>
          </table:table-cell>
          <table:table-cell table:number-columns-repeated="4"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25.4532" calcext:value-type="float">
            <text:p>25.4532</text:p>
          </table:table-cell>
          <table:table-cell table:number-columns-repeated="4"/>
        </table:table-row>
        <table:table-row table:style-name="ro1">
          <table:table-cell office:value-type="date" office:date-value="2024-06-29" calcext:value-type="date">
            <text:p>2024-06-29</text:p>
          </table:table-cell>
          <table:table-cell office:value-type="float" office:value="25.4532" calcext:value-type="float">
            <text:p>25.4532</text:p>
          </table:table-cell>
          <table:table-cell table:number-columns-repeated="4"/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25.4532" calcext:value-type="float">
            <text:p>25.4532</text:p>
          </table:table-cell>
          <table:table-cell table:number-columns-repeated="4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25.3386" calcext:value-type="float">
            <text:p>25.3386</text:p>
          </table:table-cell>
          <table:table-cell table:number-columns-repeated="4"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25.3517" calcext:value-type="float">
            <text:p>25.3517</text:p>
          </table:table-cell>
          <table:table-cell table:number-columns-repeated="4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25.2633" calcext:value-type="float">
            <text:p>25.2633</text:p>
          </table:table-cell>
          <table:table-cell table:number-columns-repeated="4"/>
        </table:table-row>
        <table:table-row table:style-name="ro1">
          <table:table-cell office:value-type="date" office:date-value="2024-07-04" calcext:value-type="date">
            <text:p>2024-07-04</text:p>
          </table:table-cell>
          <table:table-cell office:value-type="float" office:value="25.2633" calcext:value-type="float">
            <text:p>25.2633</text:p>
          </table:table-cell>
          <table:table-cell table:number-columns-repeated="4"/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25.2109" calcext:value-type="float">
            <text:p>25.2109</text:p>
          </table:table-cell>
          <table:table-cell table:number-columns-repeated="4"/>
        </table:table-row>
        <table:table-row table:style-name="ro1">
          <table:table-cell office:value-type="date" office:date-value="2024-07-06" calcext:value-type="date">
            <text:p>2024-07-06</text:p>
          </table:table-cell>
          <table:table-cell office:value-type="float" office:value="25.2109" calcext:value-type="float">
            <text:p>25.2109</text:p>
          </table:table-cell>
          <table:table-cell table:number-columns-repeated="4"/>
        </table:table-row>
        <table:table-row table:style-name="ro1">
          <table:table-cell office:value-type="date" office:date-value="2024-07-07" calcext:value-type="date">
            <text:p>2024-07-07</text:p>
          </table:table-cell>
          <table:table-cell office:value-type="float" office:value="25.2109" calcext:value-type="float">
            <text:p>25.2109</text:p>
          </table:table-cell>
          <table:table-cell table:number-columns-repeated="4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25.2338" calcext:value-type="float">
            <text:p>25.2338</text:p>
          </table:table-cell>
          <table:table-cell table:number-columns-repeated="4"/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25.2404" calcext:value-type="float">
            <text:p>25.2404</text:p>
          </table:table-cell>
          <table:table-cell table:number-columns-repeated="4"/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25.4891" calcext:value-type="float">
            <text:p>25.4891</text:p>
          </table:table-cell>
          <table:table-cell table:number-columns-repeated="4"/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25.8001" calcext:value-type="float">
            <text:p>25.8001</text:p>
          </table:table-cell>
          <table:table-cell table:number-columns-repeated="4"/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26.0685" calcext:value-type="float">
            <text:p>26.0685</text:p>
          </table:table-cell>
          <table:table-cell table:number-columns-repeated="4"/>
        </table:table-row>
        <table:table-row table:style-name="ro1">
          <table:table-cell office:value-type="date" office:date-value="2024-07-13" calcext:value-type="date">
            <text:p>2024-07-13</text:p>
          </table:table-cell>
          <table:table-cell office:value-type="float" office:value="26.0685" calcext:value-type="float">
            <text:p>26.0685</text:p>
          </table:table-cell>
          <table:table-cell table:number-columns-repeated="4"/>
        </table:table-row>
        <table:table-row table:style-name="ro1">
          <table:table-cell office:value-type="date" office:date-value="2024-07-14" calcext:value-type="date">
            <text:p>2024-07-14</text:p>
          </table:table-cell>
          <table:table-cell office:value-type="float" office:value="26.0685" calcext:value-type="float">
            <text:p>26.0685</text:p>
          </table:table-cell>
          <table:table-cell table:number-columns-repeated="4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26.1635" calcext:value-type="float">
            <text:p>26.1635</text:p>
          </table:table-cell>
          <table:table-cell table:number-columns-repeated="4"/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26.5988" calcext:value-type="float">
            <text:p>26.5988</text:p>
          </table:table-cell>
          <table:table-cell table:number-columns-repeated="4"/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26.9458" calcext:value-type="float">
            <text:p>26.9458</text:p>
          </table:table-cell>
          <table:table-cell table:number-columns-repeated="4"/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26.7133" calcext:value-type="float">
            <text:p>26.7133</text:p>
          </table:table-cell>
          <table:table-cell table:number-columns-repeated="4"/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26.5497" calcext:value-type="float">
            <text:p>26.5497</text:p>
          </table:table-cell>
          <table:table-cell table:number-columns-repeated="4"/>
        </table:table-row>
        <table:table-row table:style-name="ro1">
          <table:table-cell office:value-type="date" office:date-value="2024-07-20" calcext:value-type="date">
            <text:p>2024-07-20</text:p>
          </table:table-cell>
          <table:table-cell office:value-type="float" office:value="26.5497" calcext:value-type="float">
            <text:p>26.5497</text:p>
          </table:table-cell>
          <table:table-cell table:number-columns-repeated="4"/>
        </table:table-row>
        <table:table-row table:style-name="ro1">
          <table:table-cell office:value-type="date" office:date-value="2024-07-21" calcext:value-type="date">
            <text:p>2024-07-21</text:p>
          </table:table-cell>
          <table:table-cell office:value-type="float" office:value="26.5497" calcext:value-type="float">
            <text:p>26.5497</text:p>
          </table:table-cell>
          <table:table-cell table:number-columns-repeated="4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26.5727" calcext:value-type="float">
            <text:p>26.5727</text:p>
          </table:table-cell>
          <table:table-cell table:number-columns-repeated="4"/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26.3435" calcext:value-type="float">
            <text:p>26.3435</text:p>
          </table:table-cell>
          <table:table-cell table:number-columns-repeated="4"/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26.4155" calcext:value-type="float">
            <text:p>26.4155</text:p>
          </table:table-cell>
          <table:table-cell table:number-columns-repeated="4"/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26.5727" calcext:value-type="float">
            <text:p>26.5727</text:p>
          </table:table-cell>
          <table:table-cell table:number-columns-repeated="4"/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26.9949" calcext:value-type="float">
            <text:p>26.9949</text:p>
          </table:table-cell>
          <table:table-cell table:number-columns-repeated="4"/>
        </table:table-row>
        <table:table-row table:style-name="ro1">
          <table:table-cell office:value-type="date" office:date-value="2024-07-27" calcext:value-type="date">
            <text:p>2024-07-27</text:p>
          </table:table-cell>
          <table:table-cell office:value-type="float" office:value="26.9949" calcext:value-type="float">
            <text:p>26.9949</text:p>
          </table:table-cell>
          <table:table-cell table:number-columns-repeated="4"/>
        </table:table-row>
        <table:table-row table:style-name="ro1">
          <table:table-cell office:value-type="date" office:date-value="2024-07-28" calcext:value-type="date">
            <text:p>2024-07-28</text:p>
          </table:table-cell>
          <table:table-cell office:value-type="float" office:value="26.9949" calcext:value-type="float">
            <text:p>26.9949</text:p>
          </table:table-cell>
          <table:table-cell table:number-columns-repeated="4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26.8901" calcext:value-type="float">
            <text:p>26.8901</text:p>
          </table:table-cell>
          <table:table-cell table:number-columns-repeated="4"/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27.1029" calcext:value-type="float">
            <text:p>27.1029</text:p>
          </table:table-cell>
          <table:table-cell table:number-columns-repeated="4"/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27.0309" calcext:value-type="float">
            <text:p>27.0309</text:p>
          </table:table-cell>
          <table:table-cell table:number-columns-repeated="4"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26.7625" calcext:value-type="float">
            <text:p>26.7625</text:p>
          </table:table-cell>
          <table:table-cell table:number-columns-repeated="4"/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26.4482" calcext:value-type="float">
            <text:p>26.4482</text:p>
          </table:table-cell>
          <table:table-cell table:number-columns-repeated="4"/>
        </table:table-row>
        <table:table-row table:style-name="ro1">
          <table:table-cell office:value-type="date" office:date-value="2024-08-03" calcext:value-type="date">
            <text:p>2024-08-03</text:p>
          </table:table-cell>
          <table:table-cell office:value-type="float" office:value="26.4482" calcext:value-type="float">
            <text:p>26.4482</text:p>
          </table:table-cell>
          <table:table-cell table:number-columns-repeated="4"/>
        </table:table-row>
        <table:table-row table:style-name="ro1">
          <table:table-cell office:value-type="date" office:date-value="2024-08-04" calcext:value-type="date">
            <text:p>2024-08-04</text:p>
          </table:table-cell>
          <table:table-cell office:value-type="float" office:value="26.4482" calcext:value-type="float">
            <text:p>26.4482</text:p>
          </table:table-cell>
          <table:table-cell table:number-columns-repeated="4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25.8525" calcext:value-type="float">
            <text:p>25.8525</text:p>
          </table:table-cell>
          <table:table-cell table:number-columns-repeated="4"/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25.9834" calcext:value-type="float">
            <text:p>25.9834</text:p>
          </table:table-cell>
          <table:table-cell table:number-columns-repeated="4"/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25.823" calcext:value-type="float">
            <text:p>25.823</text:p>
          </table:table-cell>
          <table:table-cell table:number-columns-repeated="4"/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26.2584" calcext:value-type="float">
            <text:p>26.2584</text:p>
          </table:table-cell>
          <table:table-cell table:number-columns-repeated="4"/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26.242" calcext:value-type="float">
            <text:p>26.242</text:p>
          </table:table-cell>
          <table:table-cell table:number-columns-repeated="4"/>
        </table:table-row>
        <table:table-row table:style-name="ro1">
          <table:table-cell office:value-type="date" office:date-value="2024-08-10" calcext:value-type="date">
            <text:p>2024-08-10</text:p>
          </table:table-cell>
          <table:table-cell office:value-type="float" office:value="26.242" calcext:value-type="float">
            <text:p>26.242</text:p>
          </table:table-cell>
          <table:table-cell table:number-columns-repeated="4"/>
        </table:table-row>
        <table:table-row table:style-name="ro1">
          <table:table-cell office:value-type="date" office:date-value="2024-08-11" calcext:value-type="date">
            <text:p>2024-08-11</text:p>
          </table:table-cell>
          <table:table-cell office:value-type="float" office:value="26.242" calcext:value-type="float">
            <text:p>26.242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26.1176" calcext:value-type="float">
            <text:p>26.1176</text:p>
          </table:table-cell>
          <table:table-cell table:number-columns-repeated="4"/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26.3959" calcext:value-type="float">
            <text:p>26.3959</text:p>
          </table:table-cell>
          <table:table-cell table:number-columns-repeated="4"/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26.4286" calcext:value-type="float">
            <text:p>26.4286</text:p>
          </table:table-cell>
          <table:table-cell table:number-columns-repeated="4"/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26.7068" calcext:value-type="float">
            <text:p>26.7068</text:p>
          </table:table-cell>
          <table:table-cell table:number-columns-repeated="4"/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26.828" calcext:value-type="float">
            <text:p>26.828</text:p>
          </table:table-cell>
          <table:table-cell table:number-columns-repeated="4"/>
        </table:table-row>
        <table:table-row table:style-name="ro1">
          <table:table-cell office:value-type="date" office:date-value="2024-08-17" calcext:value-type="date">
            <text:p>2024-08-17</text:p>
          </table:table-cell>
          <table:table-cell office:value-type="float" office:value="26.828" calcext:value-type="float">
            <text:p>26.828</text:p>
          </table:table-cell>
          <table:table-cell table:number-columns-repeated="4"/>
        </table:table-row>
        <table:table-row table:style-name="ro1">
          <table:table-cell office:value-type="date" office:date-value="2024-08-18" calcext:value-type="date">
            <text:p>2024-08-18</text:p>
          </table:table-cell>
          <table:table-cell office:value-type="float" office:value="26.828" calcext:value-type="float">
            <text:p>26.828</text:p>
          </table:table-cell>
          <table:table-cell table:number-columns-repeated="4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26.985" calcext:value-type="float">
            <text:p>26.985</text:p>
          </table:table-cell>
          <table:table-cell table:number-columns-repeated="4"/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26.9131" calcext:value-type="float">
            <text:p>26.9131</text:p>
          </table:table-cell>
          <table:table-cell table:number-columns-repeated="4"/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27.0276" calcext:value-type="float">
            <text:p>27.0276</text:p>
          </table:table-cell>
          <table:table-cell table:number-columns-repeated="4"/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26.9523" calcext:value-type="float">
            <text:p>26.9523</text:p>
          </table:table-cell>
          <table:table-cell table:number-columns-repeated="4"/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27.3386" calcext:value-type="float">
            <text:p>27.3386</text:p>
          </table:table-cell>
          <table:table-cell table:number-columns-repeated="4"/>
        </table:table-row>
        <table:table-row table:style-name="ro1">
          <table:table-cell office:value-type="date" office:date-value="2024-08-24" calcext:value-type="date">
            <text:p>2024-08-24</text:p>
          </table:table-cell>
          <table:table-cell office:value-type="float" office:value="27.3386" calcext:value-type="float">
            <text:p>27.3386</text:p>
          </table:table-cell>
          <table:table-cell table:number-columns-repeated="4"/>
        </table:table-row>
        <table:table-row table:style-name="ro1">
          <table:table-cell office:value-type="date" office:date-value="2024-08-25" calcext:value-type="date">
            <text:p>2024-08-25</text:p>
          </table:table-cell>
          <table:table-cell office:value-type="float" office:value="27.3386" calcext:value-type="float">
            <text:p>27.3386</text:p>
          </table:table-cell>
          <table:table-cell table:number-columns-repeated="4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27.3713" calcext:value-type="float">
            <text:p>27.3713</text:p>
          </table:table-cell>
          <table:table-cell table:number-columns-repeated="4"/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27.3254" calcext:value-type="float">
            <text:p>27.3254</text:p>
          </table:table-cell>
          <table:table-cell table:number-columns-repeated="4"/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27.332" calcext:value-type="float">
            <text:p>27.332</text:p>
          </table:table-cell>
          <table:table-cell table:number-columns-repeated="4"/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27.4499" calcext:value-type="float">
            <text:p>27.4499</text:p>
          </table:table-cell>
          <table:table-cell table:number-columns-repeated="4"/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27.6691" calcext:value-type="float">
            <text:p>27.6691</text:p>
          </table:table-cell>
          <table:table-cell table:number-columns-repeated="4"/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27.6691" calcext:value-type="float">
            <text:p>27.6691</text:p>
          </table:table-cell>
          <table:table-cell table:number-columns-repeated="4"/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float" office:value="27.6691" calcext:value-type="float">
            <text:p>27.6691</text:p>
          </table:table-cell>
          <table:table-cell table:number-columns-repeated="4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27.6691" calcext:value-type="float">
            <text:p>27.6691</text:p>
          </table:table-cell>
          <table:table-cell table:number-columns-repeated="4"/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27.4237" calcext:value-type="float">
            <text:p>27.4237</text:p>
          </table:table-cell>
          <table:table-cell table:number-columns-repeated="4"/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27.332" calcext:value-type="float">
            <text:p>27.332</text:p>
          </table:table-cell>
          <table:table-cell table:number-columns-repeated="4"/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27.0734" calcext:value-type="float">
            <text:p>27.0734</text:p>
          </table:table-cell>
          <table:table-cell table:number-columns-repeated="4"/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26.8411" calcext:value-type="float">
            <text:p>26.8411</text:p>
          </table:table-cell>
          <table:table-cell table:number-columns-repeated="4"/>
        </table:table-row>
        <table:table-row table:style-name="ro1">
          <table:table-cell office:value-type="date" office:date-value="2024-09-07" calcext:value-type="date">
            <text:p>2024-09-07</text:p>
          </table:table-cell>
          <table:table-cell office:value-type="float" office:value="26.8411" calcext:value-type="float">
            <text:p>26.8411</text:p>
          </table:table-cell>
          <table:table-cell table:number-columns-repeated="4"/>
        </table:table-row>
        <table:table-row table:style-name="ro1">
          <table:table-cell office:value-type="date" office:date-value="2024-09-08" calcext:value-type="date">
            <text:p>2024-09-08</text:p>
          </table:table-cell>
          <table:table-cell office:value-type="float" office:value="26.8411" calcext:value-type="float">
            <text:p>26.8411</text:p>
          </table:table-cell>
          <table:table-cell table:number-columns-repeated="4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27.1651" calcext:value-type="float">
            <text:p>27.1651</text:p>
          </table:table-cell>
          <table:table-cell table:number-columns-repeated="4"/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27.188" calcext:value-type="float">
            <text:p>27.188</text:p>
          </table:table-cell>
          <table:table-cell table:number-columns-repeated="4"/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27.0211" calcext:value-type="float">
            <text:p>27.0211</text:p>
          </table:table-cell>
          <table:table-cell table:number-columns-repeated="4"/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27.0472" calcext:value-type="float">
            <text:p>27.0472</text:p>
          </table:table-cell>
          <table:table-cell table:number-columns-repeated="4"/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27.2862" calcext:value-type="float">
            <text:p>27.2862</text:p>
          </table:table-cell>
          <table:table-cell table:number-columns-repeated="4"/>
        </table:table-row>
        <table:table-row table:style-name="ro1">
          <table:table-cell office:value-type="date" office:date-value="2024-09-14" calcext:value-type="date">
            <text:p>2024-09-14</text:p>
          </table:table-cell>
          <table:table-cell office:value-type="float" office:value="27.2862" calcext:value-type="float">
            <text:p>27.2862</text:p>
          </table:table-cell>
          <table:table-cell table:number-columns-repeated="4"/>
        </table:table-row>
        <table:table-row table:style-name="ro1">
          <table:table-cell office:value-type="date" office:date-value="2024-09-15" calcext:value-type="date">
            <text:p>2024-09-15</text:p>
          </table:table-cell>
          <table:table-cell office:value-type="float" office:value="27.2862" calcext:value-type="float">
            <text:p>27.2862</text:p>
          </table:table-cell>
          <table:table-cell table:number-columns-repeated="4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27.5448" calcext:value-type="float">
            <text:p>27.5448</text:p>
          </table:table-cell>
          <table:table-cell table:number-columns-repeated="4"/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27.5252" calcext:value-type="float">
            <text:p>27.5252</text:p>
          </table:table-cell>
          <table:table-cell table:number-columns-repeated="4"/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27.5415" calcext:value-type="float">
            <text:p>27.5415</text:p>
          </table:table-cell>
          <table:table-cell table:number-columns-repeated="4"/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27.7805" calcext:value-type="float">
            <text:p>27.7805</text:p>
          </table:table-cell>
          <table:table-cell table:number-columns-repeated="4"/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27.6528" calcext:value-type="float">
            <text:p>27.6528</text:p>
          </table:table-cell>
          <table:table-cell table:number-columns-repeated="4"/>
        </table:table-row>
        <table:table-row table:style-name="ro1">
          <table:table-cell office:value-type="date" office:date-value="2024-09-21" calcext:value-type="date">
            <text:p>2024-09-21</text:p>
          </table:table-cell>
          <table:table-cell office:value-type="float" office:value="27.6528" calcext:value-type="float">
            <text:p>27.6528</text:p>
          </table:table-cell>
          <table:table-cell table:number-columns-repeated="4"/>
        </table:table-row>
        <table:table-row table:style-name="ro1">
          <table:table-cell office:value-type="date" office:date-value="2024-09-22" calcext:value-type="date">
            <text:p>2024-09-22</text:p>
          </table:table-cell>
          <table:table-cell office:value-type="float" office:value="27.6528" calcext:value-type="float">
            <text:p>27.6528</text:p>
          </table:table-cell>
          <table:table-cell table:number-columns-repeated="4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27.8001" calcext:value-type="float">
            <text:p>27.8001</text:p>
          </table:table-cell>
          <table:table-cell table:number-columns-repeated="4"/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27.8426" calcext:value-type="float">
            <text:p>27.8426</text:p>
          </table:table-cell>
          <table:table-cell table:number-columns-repeated="4"/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27.5337" calcext:value-type="float">
            <text:p>27.5337</text:p>
          </table:table-cell>
          <table:table-cell table:number-columns-repeated="4"/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27.6559" calcext:value-type="float">
            <text:p>27.6559</text:p>
          </table:table-cell>
          <table:table-cell table:number-columns-repeated="4"/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27.8277" calcext:value-type="float">
            <text:p>27.8277</text:p>
          </table:table-cell>
          <table:table-cell table:number-columns-repeated="4"/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office:value-type="float" office:value="27.8277" calcext:value-type="float">
            <text:p>27.8277</text:p>
          </table:table-cell>
          <table:table-cell table:number-columns-repeated="4"/>
        </table:table-row>
        <table:table-row table:style-name="ro1">
          <table:table-cell office:value-type="date" office:date-value="2024-09-29" calcext:value-type="date">
            <text:p>2024-09-29</text:p>
          </table:table-cell>
          <table:table-cell office:value-type="float" office:value="27.8277" calcext:value-type="float">
            <text:p>27.8277</text:p>
          </table:table-cell>
          <table:table-cell table:number-columns-repeated="4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27.9168" calcext:value-type="float">
            <text:p>27.9168</text:p>
          </table:table-cell>
          <table:table-cell table:number-columns-repeated="4"/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27.9003" calcext:value-type="float">
            <text:p>27.9003</text:p>
          </table:table-cell>
          <table:table-cell table:number-columns-repeated="4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27.9201" calcext:value-type="float">
            <text:p>27.9201</text:p>
          </table:table-cell>
          <table:table-cell table:number-columns-repeated="4"/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27.8475" calcext:value-type="float">
            <text:p>27.8475</text:p>
          </table:table-cell>
          <table:table-cell table:number-columns-repeated="4"/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27.9565" calcext:value-type="float">
            <text:p>27.9565</text:p>
          </table:table-cell>
          <table:table-cell table:number-columns-repeated="4"/>
        </table:table-row>
        <table:table-row table:style-name="ro1">
          <table:table-cell office:value-type="date" office:date-value="2024-10-05" calcext:value-type="date">
            <text:p>2024-10-05</text:p>
          </table:table-cell>
          <table:table-cell office:value-type="float" office:value="27.9565" calcext:value-type="float">
            <text:p>27.9565</text:p>
          </table:table-cell>
          <table:table-cell table:number-columns-repeated="4"/>
        </table:table-row>
        <table:table-row table:style-name="ro1">
          <table:table-cell office:value-type="date" office:date-value="2024-10-06" calcext:value-type="date">
            <text:p>2024-10-06</text:p>
          </table:table-cell>
          <table:table-cell office:value-type="float" office:value="27.9565" calcext:value-type="float">
            <text:p>27.9565</text:p>
          </table:table-cell>
          <table:table-cell table:number-columns-repeated="4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27.8408" calcext:value-type="float">
            <text:p>27.8408</text:p>
          </table:table-cell>
          <table:table-cell table:number-columns-repeated="4"/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27.7946" calcext:value-type="float">
            <text:p>27.7946</text:p>
          </table:table-cell>
          <table:table-cell table:number-columns-repeated="4"/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28.0556" calcext:value-type="float">
            <text:p>28.0556</text:p>
          </table:table-cell>
          <table:table-cell table:number-columns-repeated="4"/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27.9466" calcext:value-type="float">
            <text:p>27.9466</text:p>
          </table:table-cell>
          <table:table-cell table:number-columns-repeated="4"/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28.2768" calcext:value-type="float">
            <text:p>28.2768</text:p>
          </table:table-cell>
          <table:table-cell table:number-columns-repeated="4"/>
        </table:table-row>
        <table:table-row table:style-name="ro1">
          <table:table-cell office:value-type="date" office:date-value="2024-10-12" calcext:value-type="date">
            <text:p>2024-10-12</text:p>
          </table:table-cell>
          <table:table-cell office:value-type="float" office:value="28.2768" calcext:value-type="float">
            <text:p>28.2768</text:p>
          </table:table-cell>
          <table:table-cell table:number-columns-repeated="4"/>
        </table:table-row>
        <table:table-row table:style-name="ro1">
          <table:table-cell office:value-type="date" office:date-value="2024-10-13" calcext:value-type="date">
            <text:p>2024-10-13</text:p>
          </table:table-cell>
          <table:table-cell office:value-type="float" office:value="28.2768" calcext:value-type="float">
            <text:p>28.2768</text:p>
          </table:table-cell>
          <table:table-cell table:number-columns-repeated="4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28.4254" calcext:value-type="float">
            <text:p>28.4254</text:p>
          </table:table-cell>
          <table:table-cell table:number-columns-repeated="4"/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28.3065" calcext:value-type="float">
            <text:p>28.3065</text:p>
          </table:table-cell>
          <table:table-cell table:number-columns-repeated="4"/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28.5344" calcext:value-type="float">
            <text:p>28.5344</text:p>
          </table:table-cell>
          <table:table-cell table:number-columns-repeated="4"/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28.5443" calcext:value-type="float">
            <text:p>28.5443</text:p>
          </table:table-cell>
          <table:table-cell table:number-columns-repeated="4"/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28.5443" calcext:value-type="float">
            <text:p>28.5443</text:p>
          </table:table-cell>
          <table:table-cell table:number-columns-repeated="4"/>
        </table:table-row>
        <table:table-row table:style-name="ro1">
          <table:table-cell office:value-type="date" office:date-value="2024-10-19" calcext:value-type="date">
            <text:p>2024-10-19</text:p>
          </table:table-cell>
          <table:table-cell office:value-type="float" office:value="28.5443" calcext:value-type="float">
            <text:p>28.5443</text:p>
          </table:table-cell>
          <table:table-cell table:number-columns-repeated="4"/>
        </table:table-row>
        <table:table-row table:style-name="ro1">
          <table:table-cell office:value-type="date" office:date-value="2024-10-20" calcext:value-type="date">
            <text:p>2024-10-20</text:p>
          </table:table-cell>
          <table:table-cell office:value-type="float" office:value="28.5443" calcext:value-type="float">
            <text:p>28.5443</text:p>
          </table:table-cell>
          <table:table-cell table:number-columns-repeated="4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28.2074" calcext:value-type="float">
            <text:p>28.2074</text:p>
          </table:table-cell>
          <table:table-cell table:number-columns-repeated="4"/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28.0687" calcext:value-type="float">
            <text:p>28.0687</text:p>
          </table:table-cell>
          <table:table-cell table:number-columns-repeated="4"/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28.0192" calcext:value-type="float">
            <text:p>28.0192</text:p>
          </table:table-cell>
          <table:table-cell table:number-columns-repeated="4"/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28.0687" calcext:value-type="float">
            <text:p>28.0687</text:p>
          </table:table-cell>
          <table:table-cell table:number-columns-repeated="4"/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27.8904" calcext:value-type="float">
            <text:p>27.8904</text:p>
          </table:table-cell>
          <table:table-cell table:number-columns-repeated="4"/>
        </table:table-row>
        <table:table-row table:style-name="ro1">
          <table:table-cell office:value-type="date" office:date-value="2024-10-26" calcext:value-type="date">
            <text:p>2024-10-26</text:p>
          </table:table-cell>
          <table:table-cell office:value-type="float" office:value="27.8904" calcext:value-type="float">
            <text:p>27.8904</text:p>
          </table:table-cell>
          <table:table-cell table:number-columns-repeated="4"/>
        </table:table-row>
        <table:table-row table:style-name="ro1">
          <table:table-cell office:value-type="date" office:date-value="2024-10-27" calcext:value-type="date">
            <text:p>2024-10-27</text:p>
          </table:table-cell>
          <table:table-cell office:value-type="float" office:value="27.8904" calcext:value-type="float">
            <text:p>27.8904</text:p>
          </table:table-cell>
          <table:table-cell table:number-columns-repeated="4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28.0588" calcext:value-type="float">
            <text:p>28.0588</text:p>
          </table:table-cell>
          <table:table-cell table:number-columns-repeated="4"/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27.8309" calcext:value-type="float">
            <text:p>27.8309</text:p>
          </table:table-cell>
          <table:table-cell table:number-columns-repeated="4"/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27.9201" calcext:value-type="float">
            <text:p>27.9201</text:p>
          </table:table-cell>
          <table:table-cell table:number-columns-repeated="4"/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27.9697" calcext:value-type="float">
            <text:p>27.9697</text:p>
          </table:table-cell>
          <table:table-cell table:number-columns-repeated="4"/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27.8408" calcext:value-type="float">
            <text:p>27.8408</text:p>
          </table:table-cell>
          <table:table-cell table:number-columns-repeated="4"/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float" office:value="27.8408" calcext:value-type="float">
            <text:p>27.8408</text:p>
          </table:table-cell>
          <table:table-cell table:number-columns-repeated="4"/>
        </table:table-row>
        <table:table-row table:style-name="ro1">
          <table:table-cell office:value-type="date" office:date-value="2024-11-03" calcext:value-type="date">
            <text:p>2024-11-03</text:p>
          </table:table-cell>
          <table:table-cell office:value-type="float" office:value="27.8408" calcext:value-type="float">
            <text:p>27.8408</text:p>
          </table:table-cell>
          <table:table-cell table:number-columns-repeated="4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27.8706" calcext:value-type="float">
            <text:p>27.8706</text:p>
          </table:table-cell>
          <table:table-cell table:number-columns-repeated="4"/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28.1183" calcext:value-type="float">
            <text:p>28.1183</text:p>
          </table:table-cell>
          <table:table-cell table:number-columns-repeated="4"/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28.7722" calcext:value-type="float">
            <text:p>28.7722</text:p>
          </table:table-cell>
          <table:table-cell table:number-columns-repeated="4"/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28.6434" calcext:value-type="float">
            <text:p>28.6434</text:p>
          </table:table-cell>
          <table:table-cell table:number-columns-repeated="4"/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28.8118" calcext:value-type="float">
            <text:p>28.8118</text:p>
          </table:table-cell>
          <table:table-cell table:number-columns-repeated="4"/>
        </table:table-row>
        <table:table-row table:style-name="ro1">
          <table:table-cell office:value-type="date" office:date-value="2024-11-09" calcext:value-type="date">
            <text:p>2024-11-09</text:p>
          </table:table-cell>
          <table:table-cell office:value-type="float" office:value="28.8118" calcext:value-type="float">
            <text:p>28.8118</text:p>
          </table:table-cell>
          <table:table-cell table:number-columns-repeated="4"/>
        </table:table-row>
        <table:table-row table:style-name="ro1">
          <table:table-cell office:value-type="date" office:date-value="2024-11-10" calcext:value-type="date">
            <text:p>2024-11-10</text:p>
          </table:table-cell>
          <table:table-cell office:value-type="float" office:value="28.8118" calcext:value-type="float">
            <text:p>28.8118</text:p>
          </table:table-cell>
          <table:table-cell table:number-columns-repeated="4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28.8911" calcext:value-type="float">
            <text:p>28.8911</text:p>
          </table:table-cell>
          <table:table-cell table:number-columns-repeated="4"/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28.6434" calcext:value-type="float">
            <text:p>28.6434</text:p>
          </table:table-cell>
          <table:table-cell table:number-columns-repeated="4"/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28.7425" calcext:value-type="float">
            <text:p>28.7425</text:p>
          </table:table-cell>
          <table:table-cell table:number-columns-repeated="4"/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28.6137" calcext:value-type="float">
            <text:p>28.6137</text:p>
          </table:table-cell>
          <table:table-cell table:number-columns-repeated="4"/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28.366" calcext:value-type="float">
            <text:p>28.366</text:p>
          </table:table-cell>
          <table:table-cell table:number-columns-repeated="4"/>
        </table:table-row>
        <table:table-row table:style-name="ro1">
          <table:table-cell office:value-type="date" office:date-value="2024-11-16" calcext:value-type="date">
            <text:p>2024-11-16</text:p>
          </table:table-cell>
          <table:table-cell office:value-type="float" office:value="28.366" calcext:value-type="float">
            <text:p>28.366</text:p>
          </table:table-cell>
          <table:table-cell table:number-columns-repeated="4"/>
        </table:table-row>
        <table:table-row table:style-name="ro1">
          <table:table-cell office:value-type="date" office:date-value="2024-11-17" calcext:value-type="date">
            <text:p>2024-11-17</text:p>
          </table:table-cell>
          <table:table-cell office:value-type="float" office:value="28.366" calcext:value-type="float">
            <text:p>28.366</text:p>
          </table:table-cell>
          <table:table-cell table:number-columns-repeated="4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28.5245" calcext:value-type="float">
            <text:p>28.5245</text:p>
          </table:table-cell>
          <table:table-cell table:number-columns-repeated="4"/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28.3759" calcext:value-type="float">
            <text:p>28.3759</text:p>
          </table:table-cell>
          <table:table-cell table:number-columns-repeated="4"/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28.4452" calcext:value-type="float">
            <text:p>28.4452</text:p>
          </table:table-cell>
          <table:table-cell table:number-columns-repeated="4"/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28.7127" calcext:value-type="float">
            <text:p>28.7127</text:p>
          </table:table-cell>
          <table:table-cell table:number-columns-repeated="4"/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29.0793" calcext:value-type="float">
            <text:p>29.0793</text:p>
          </table:table-cell>
          <table:table-cell table:number-columns-repeated="4"/>
        </table:table-row>
        <table:table-row table:style-name="ro1">
          <table:table-cell office:value-type="date" office:date-value="2024-11-23" calcext:value-type="date">
            <text:p>2024-11-23</text:p>
          </table:table-cell>
          <table:table-cell office:value-type="float" office:value="29.0793" calcext:value-type="float">
            <text:p>29.0793</text:p>
          </table:table-cell>
          <table:table-cell table:number-columns-repeated="4"/>
        </table:table-row>
        <table:table-row table:style-name="ro1">
          <table:table-cell office:value-type="date" office:date-value="2024-11-24" calcext:value-type="date">
            <text:p>2024-11-24</text:p>
          </table:table-cell>
          <table:table-cell office:value-type="float" office:value="29.0793" calcext:value-type="float">
            <text:p>29.0793</text:p>
          </table:table-cell>
          <table:table-cell table:number-columns-repeated="4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29.2378" calcext:value-type="float">
            <text:p>29.2378</text:p>
          </table:table-cell>
          <table:table-cell table:number-columns-repeated="4"/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29.1784" calcext:value-type="float">
            <text:p>29.1784</text:p>
          </table:table-cell>
          <table:table-cell table:number-columns-repeated="4"/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29.1685" calcext:value-type="float">
            <text:p>29.1685</text:p>
          </table:table-cell>
          <table:table-cell table:number-columns-repeated="4"/>
        </table:table-row>
        <table:table-row table:style-name="ro1">
          <table:table-cell office:value-type="date" office:date-value="2024-11-28" calcext:value-type="date">
            <text:p>2024-11-28</text:p>
          </table:table-cell>
          <table:table-cell office:value-type="float" office:value="29.1685" calcext:value-type="float">
            <text:p>29.1685</text:p>
          </table:table-cell>
          <table:table-cell table:number-columns-repeated="4"/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29.2577" calcext:value-type="float">
            <text:p>29.2577</text:p>
          </table:table-cell>
          <table:table-cell table:number-columns-repeated="4"/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29.2577" calcext:value-type="float">
            <text:p>29.2577</text:p>
          </table:table-cell>
          <table:table-cell table:number-columns-repeated="4"/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float" office:value="29.2577" calcext:value-type="float">
            <text:p>29.2577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29.0694" calcext:value-type="float">
            <text:p>29.0694</text:p>
          </table:table-cell>
          <table:table-cell table:number-columns-repeated="4"/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28.9109" calcext:value-type="float">
            <text:p>28.9109</text:p>
          </table:table-cell>
          <table:table-cell table:number-columns-repeated="4"/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28.6731" calcext:value-type="float">
            <text:p>28.6731</text:p>
          </table:table-cell>
          <table:table-cell table:number-columns-repeated="4"/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28.683" calcext:value-type="float">
            <text:p>28.683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28.5542" calcext:value-type="float">
            <text:p>28.5542</text:p>
          </table:table-cell>
          <table:table-cell table:number-columns-repeated="4"/>
        </table:table-row>
        <table:table-row table:style-name="ro1">
          <table:table-cell office:value-type="date" office:date-value="2024-12-07" calcext:value-type="date">
            <text:p>2024-12-07</text:p>
          </table:table-cell>
          <table:table-cell office:value-type="float" office:value="28.5542" calcext:value-type="float">
            <text:p>28.5542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2024-12-08</text:p>
          </table:table-cell>
          <table:table-cell office:value-type="float" office:value="28.5542" calcext:value-type="float">
            <text:p>28.5542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28.5245" calcext:value-type="float">
            <text:p>28.5245</text:p>
          </table:table-cell>
          <table:table-cell table:number-columns-repeated="4"/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28.4155" calcext:value-type="float">
            <text:p>28.4155</text:p>
          </table:table-cell>
          <table:table-cell table:number-columns-repeated="4"/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28.2" calcext:value-type="float">
            <text:p>28.2</text:p>
          </table:table-cell>
          <table:table-cell table:number-columns-repeated="4"/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28.13" calcext:value-type="float">
            <text:p>28.13</text:p>
          </table:table-cell>
          <table:table-cell table:number-columns-repeated="4"/>
        </table:table-row>
        <table:table-row table:style-name="ro1">
          <table:table-cell office:value-type="date" office:date-value="2024-12-14" calcext:value-type="date">
            <text:p>2024-12-14</text:p>
          </table:table-cell>
          <table:table-cell office:value-type="float" office:value="28.13" calcext:value-type="float">
            <text:p>28.13</text:p>
          </table:table-cell>
          <table:table-cell table:number-columns-repeated="4"/>
        </table:table-row>
        <table:table-row table:style-name="ro1">
          <table:table-cell office:value-type="date" office:date-value="2024-12-15" calcext:value-type="date">
            <text:p>2024-12-15</text:p>
          </table:table-cell>
          <table:table-cell office:value-type="float" office:value="28.13" calcext:value-type="float">
            <text:p>28.13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27.87" calcext:value-type="float">
            <text:p>27.87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27.81" calcext:value-type="float">
            <text:p>27.81</text:p>
          </table:table-cell>
          <table:table-cell table:number-columns-repeated="4"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27.08" calcext:value-type="float">
            <text:p>27.08</text:p>
          </table:table-cell>
          <table:table-cell table:number-columns-repeated="4"/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26.93" calcext:value-type="float">
            <text:p>26.93</text:p>
          </table:table-cell>
          <table:table-cell table:number-columns-repeated="4"/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27.29" calcext:value-type="float">
            <text:p>27.29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2024-12-21</text:p>
          </table:table-cell>
          <table:table-cell office:value-type="float" office:value="27.29" calcext:value-type="float">
            <text:p>27.29</text:p>
          </table:table-cell>
          <table:table-cell table:number-columns-repeated="4"/>
        </table:table-row>
        <table:table-row table:style-name="ro1">
          <table:table-cell office:value-type="date" office:date-value="2024-12-22" calcext:value-type="date">
            <text:p>2024-12-22</text:p>
          </table:table-cell>
          <table:table-cell office:value-type="float" office:value="27.29" calcext:value-type="float">
            <text:p>27.29</text:p>
          </table:table-cell>
          <table:table-cell table:number-columns-repeated="4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27.37" calcext:value-type="float">
            <text:p>27.37</text:p>
          </table:table-cell>
          <table:table-cell table:number-columns-repeated="4"/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27.58" calcext:value-type="float">
            <text:p>27.58</text:p>
          </table:table-cell>
          <table:table-cell table:number-columns-repeated="4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float" office:value="27.58" calcext:value-type="float">
            <text:p>27.58</text:p>
          </table:table-cell>
          <table:table-cell table:number-columns-repeated="4"/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27.59" calcext:value-type="float">
            <text:p>27.59</text:p>
          </table:table-cell>
          <table:table-cell table:number-columns-repeated="4"/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27.47" calcext:value-type="float">
            <text:p>27.47</text:p>
          </table:table-cell>
          <table:table-cell table:number-columns-repeated="4"/>
        </table:table-row>
        <table:table-row table:style-name="ro1">
          <table:table-cell office:value-type="date" office:date-value="2024-12-28" calcext:value-type="date">
            <text:p>2024-12-28</text:p>
          </table:table-cell>
          <table:table-cell office:value-type="float" office:value="27.47" calcext:value-type="float">
            <text:p>27.47</text:p>
          </table:table-cell>
          <table:table-cell table:number-columns-repeated="4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float" office:value="27.47" calcext:value-type="float">
            <text:p>27.47</text:p>
          </table:table-cell>
          <table:table-cell table:number-columns-repeated="4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27.23" calcext:value-type="float">
            <text:p>27.23</text:p>
          </table:table-cell>
          <table:table-cell table:number-columns-repeated="4"/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27.26" calcext:value-type="float">
            <text:p>27.26</text:p>
          </table:table-cell>
          <table:table-cell table:number-columns-repeated="4"/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27.44" calcext:value-type="float">
            <text:p>27.44</text:p>
          </table:table-cell>
          <table:table-cell table:number-columns-repeated="4"/>
        </table:table-row>
        <table:table-row table:style-name="ro1">
          <table:table-cell office:value-type="date" office:date-value="2025-01-04" calcext:value-type="date">
            <text:p>2025-01-04</text:p>
          </table:table-cell>
          <table:table-cell office:value-type="float" office:value="27.44" calcext:value-type="float">
            <text:p>27.44</text:p>
          </table:table-cell>
          <table:table-cell table:number-columns-repeated="4"/>
        </table:table-row>
        <table:table-row table:style-name="ro1">
          <table:table-cell office:value-type="date" office:date-value="2025-01-05" calcext:value-type="date">
            <text:p>2025-01-05</text:p>
          </table:table-cell>
          <table:table-cell office:value-type="float" office:value="27.44" calcext:value-type="float">
            <text:p>27.44</text:p>
          </table:table-cell>
          <table:table-cell table:number-columns-repeated="4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27.27" calcext:value-type="float">
            <text:p>27.27</text:p>
          </table:table-cell>
          <table:table-cell table:number-columns-repeated="4"/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27.26" calcext:value-type="float">
            <text:p>27.26</text:p>
          </table:table-cell>
          <table:table-cell table:number-columns-repeated="4"/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1-09" calcext:value-type="date">
            <text:p>2025-01-09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27.01" calcext:value-type="float">
            <text:p>27.01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2025-01-11</text:p>
          </table:table-cell>
          <table:table-cell office:value-type="float" office:value="27.01" calcext:value-type="float">
            <text:p>27.01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2025-01-12</text:p>
          </table:table-cell>
          <table:table-cell office:value-type="float" office:value="27.01" calcext:value-type="float">
            <text:p>27.01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27.3" calcext:value-type="float">
            <text:p>27.3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27.52" calcext:value-type="float">
            <text:p>27.52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27.82" calcext:value-type="float">
            <text:p>27.82</text:p>
          </table:table-cell>
          <table:table-cell table:number-columns-repeated="4"/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27.83" calcext:value-type="float">
            <text:p>27.83</text:p>
          </table:table-cell>
          <table:table-cell table:number-columns-repeated="4"/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27.99" calcext:value-type="float">
            <text:p>27.99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2025-01-18</text:p>
          </table:table-cell>
          <table:table-cell office:value-type="float" office:value="27.99" calcext:value-type="float">
            <text:p>27.99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2025-01-19</text:p>
          </table:table-cell>
          <table:table-cell office:value-type="float" office:value="27.99" calcext:value-type="float">
            <text:p>27.99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27.99" calcext:value-type="float">
            <text:p>27.99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28.22" calcext:value-type="float">
            <text:p>28.22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27.92" calcext:value-type="float">
            <text:p>27.92</text:p>
          </table:table-cell>
          <table:table-cell table:number-columns-repeated="4"/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28.09" calcext:value-type="float">
            <text:p>28.09</text:p>
          </table:table-cell>
          <table:table-cell table:number-columns-repeated="4"/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28.07" calcext:value-type="float">
            <text:p>28.07</text:p>
          </table:table-cell>
          <table:table-cell table:number-columns-repeated="4"/>
        </table:table-row>
        <table:table-row table:style-name="ro1">
          <table:table-cell office:value-type="date" office:date-value="2025-01-25" calcext:value-type="date">
            <text:p>2025-01-25</text:p>
          </table:table-cell>
          <table:table-cell office:value-type="float" office:value="28.07" calcext:value-type="float">
            <text:p>28.07</text:p>
          </table:table-cell>
          <table:table-cell table:number-columns-repeated="4"/>
        </table:table-row>
        <table:table-row table:style-name="ro1">
          <table:table-cell office:value-type="date" office:date-value="2025-01-26" calcext:value-type="date">
            <text:p>2025-01-26</text:p>
          </table:table-cell>
          <table:table-cell office:value-type="float" office:value="28.07" calcext:value-type="float">
            <text:p>28.07</text:p>
          </table:table-cell>
          <table:table-cell table:number-columns-repeated="4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28.45" calcext:value-type="float">
            <text:p>28.45</text:p>
          </table:table-cell>
          <table:table-cell table:number-columns-repeated="4"/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28.07" calcext:value-type="float">
            <text:p>28.07</text:p>
          </table:table-cell>
          <table:table-cell table:number-columns-repeated="4"/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28.01" calcext:value-type="float">
            <text:p>28.01</text:p>
          </table:table-cell>
          <table:table-cell table:number-columns-repeated="4"/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27.98" calcext:value-type="float">
            <text:p>27.98</text:p>
          </table:table-cell>
          <table:table-cell table:number-columns-repeated="4"/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27.83" calcext:value-type="float">
            <text:p>27.83</text:p>
          </table:table-cell>
          <table:table-cell table:number-columns-repeated="4"/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27.83" calcext:value-type="float">
            <text:p>27.83</text:p>
          </table:table-cell>
          <table:table-cell table:number-columns-repeated="4"/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float" office:value="27.83" calcext:value-type="float">
            <text:p>27.83</text:p>
          </table:table-cell>
          <table:table-cell table:number-columns-repeated="4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27.72" calcext:value-type="float">
            <text:p>27.72</text:p>
          </table:table-cell>
          <table:table-cell table:number-columns-repeated="4"/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27.76" calcext:value-type="float">
            <text:p>27.76</text:p>
          </table:table-cell>
          <table:table-cell table:number-columns-repeated="4"/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27.95" calcext:value-type="float">
            <text:p>27.95</text:p>
          </table:table-cell>
          <table:table-cell table:number-columns-repeated="4"/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27.75" calcext:value-type="float">
            <text:p>27.75</text:p>
          </table:table-cell>
          <table:table-cell table:number-columns-repeated="4"/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27.56" calcext:value-type="float">
            <text:p>27.56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2025-02-08</text:p>
          </table:table-cell>
          <table:table-cell office:value-type="float" office:value="27.56" calcext:value-type="float">
            <text:p>27.56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2025-02-09</text:p>
          </table:table-cell>
          <table:table-cell office:value-type="float" office:value="27.56" calcext:value-type="float">
            <text:p>27.56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27.68" calcext:value-type="float">
            <text:p>27.68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27.87" calcext:value-type="float">
            <text:p>27.87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27.65" calcext:value-type="float">
            <text:p>27.6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27.85" calcext:value-type="float">
            <text:p>27.8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27.79" calcext:value-type="float">
            <text:p>27.79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float" office:value="27.79" calcext:value-type="float">
            <text:p>27.79</text:p>
          </table:table-cell>
          <table:table-cell table:number-columns-repeated="4"/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float" office:value="27.79" calcext:value-type="float">
            <text:p>27.79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27.79" calcext:value-type="float">
            <text:p>27.79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27.99" calcext:value-type="float">
            <text:p>27.99</text:p>
          </table:table-cell>
          <table:table-cell table:number-columns-repeated="4"/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28.18" calcext:value-type="float">
            <text:p>28.18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28.32" calcext:value-type="float">
            <text:p>28.32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28.21" calcext:value-type="float">
            <text:p>28.21</text:p>
          </table:table-cell>
          <table:table-cell table:number-columns-repeated="4"/>
        </table:table-row>
        <table:table-row table:style-name="ro1">
          <table:table-cell office:value-type="date" office:date-value="2025-02-22" calcext:value-type="date">
            <text:p>2025-02-22</text:p>
          </table:table-cell>
          <table:table-cell office:value-type="float" office:value="28.21" calcext:value-type="float">
            <text:p>28.21</text:p>
          </table:table-cell>
          <table:table-cell table:number-columns-repeated="4"/>
        </table:table-row>
        <table:table-row table:style-name="ro1">
          <table:table-cell office:value-type="date" office:date-value="2025-02-23" calcext:value-type="date">
            <text:p>2025-02-23</text:p>
          </table:table-cell>
          <table:table-cell office:value-type="float" office:value="28.21" calcext:value-type="float">
            <text:p>28.21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28.26" calcext:value-type="float">
            <text:p>28.26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28.45" calcext:value-type="float">
            <text:p>28.4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28.15" calcext:value-type="float">
            <text:p>28.15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28.17" calcext:value-type="float">
            <text:p>28.17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28.54" calcext:value-type="float">
            <text:p>28.54</text:p>
          </table:table-cell>
          <table:table-cell table:number-columns-repeated="4"/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float" office:value="28.54" calcext:value-type="float">
            <text:p>28.54</text:p>
          </table:table-cell>
          <table:table-cell table:number-columns-repeated="4"/>
        </table:table-row>
        <table:table-row table:style-name="ro1">
          <table:table-cell office:value-type="date" office:date-value="2025-03-02" calcext:value-type="date">
            <text:p>2025-03-02</text:p>
          </table:table-cell>
          <table:table-cell office:value-type="float" office:value="28.54" calcext:value-type="float">
            <text:p>28.54</text:p>
          </table:table-cell>
          <table:table-cell table:number-columns-repeated="4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28.4" calcext:value-type="float">
            <text:p>28.4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float" office:value="27.92" calcext:value-type="float">
            <text:p>27.92</text:p>
          </table:table-cell>
          <table:table-cell table:number-columns-repeated="4"/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float" office:value="28.05" calcext:value-type="float">
            <text:p>28.0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float" office:value="28.07" calcext:value-type="float">
            <text:p>28.07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float" office:value="28.46" calcext:value-type="float">
            <text:p>28.46</text:p>
          </table:table-cell>
          <table:table-cell table:number-columns-repeated="4"/>
        </table:table-row>
        <table:table-row table:style-name="ro1">
          <table:table-cell office:value-type="date" office:date-value="2025-03-08" calcext:value-type="date">
            <text:p>2025-03-08</text:p>
          </table:table-cell>
          <table:table-cell office:value-type="float" office:value="28.46" calcext:value-type="float">
            <text:p>28.46</text:p>
          </table:table-cell>
          <table:table-cell table:number-columns-repeated="4"/>
        </table:table-row>
        <table:table-row table:style-name="ro1">
          <table:table-cell office:value-type="date" office:date-value="2025-03-09" calcext:value-type="date">
            <text:p>2025-03-09</text:p>
          </table:table-cell>
          <table:table-cell office:value-type="float" office:value="28.46" calcext:value-type="float">
            <text:p>28.46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28.38" calcext:value-type="float">
            <text:p>28.38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float" office:value="27.74" calcext:value-type="float">
            <text:p>27.74</text:p>
          </table:table-cell>
          <table:table-cell table:number-columns-repeated="4"/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float" office:value="27.44" calcext:value-type="float">
            <text:p>27.44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27.29" calcext:value-type="float">
            <text:p>27.29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03-15" calcext:value-type="date">
            <text:p>2025-03-15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03-16" calcext:value-type="date">
            <text:p>2025-03-16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27.96" calcext:value-type="float">
            <text:p>27.96</text:p>
          </table:table-cell>
          <table:table-cell table:number-columns-repeated="4"/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float" office:value="27.92" calcext:value-type="float">
            <text:p>27.92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float" office:value="28.03" calcext:value-type="float">
            <text:p>28.03</text:p>
          </table:table-cell>
          <table:table-cell table:number-columns-repeated="4"/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float" office:value="27.95" calcext:value-type="float">
            <text:p>27.9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27.76" calcext:value-type="float">
            <text:p>27.76</text:p>
          </table:table-cell>
          <table:table-cell table:number-columns-repeated="4"/>
        </table:table-row>
        <table:table-row table:style-name="ro1">
          <table:table-cell office:value-type="date" office:date-value="2025-03-22" calcext:value-type="date">
            <text:p>2025-03-22</text:p>
          </table:table-cell>
          <table:table-cell office:value-type="float" office:value="27.76" calcext:value-type="float">
            <text:p>27.76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2025-03-23</text:p>
          </table:table-cell>
          <table:table-cell office:value-type="float" office:value="27.76" calcext:value-type="float">
            <text:p>27.76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28.09" calcext:value-type="float">
            <text:p>28.09</text:p>
          </table:table-cell>
          <table:table-cell table:number-columns-repeated="4"/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float" office:value="27.84" calcext:value-type="float">
            <text:p>27.84</text:p>
          </table:table-cell>
          <table:table-cell table:number-columns-repeated="4"/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float" office:value="27.8" calcext:value-type="float">
            <text:p>27.8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float" office:value="27.75" calcext:value-type="float">
            <text:p>27.75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27.58" calcext:value-type="float">
            <text:p>27.58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2025-03-29</text:p>
          </table:table-cell>
          <table:table-cell office:value-type="float" office:value="27.58" calcext:value-type="float">
            <text:p>27.58</text:p>
          </table:table-cell>
          <table:table-cell table:number-columns-repeated="4"/>
        </table:table-row>
        <table:table-row table:style-name="ro1">
          <table:table-cell office:value-type="date" office:date-value="2025-03-30" calcext:value-type="date">
            <text:p>2025-03-30</text:p>
          </table:table-cell>
          <table:table-cell office:value-type="float" office:value="27.58" calcext:value-type="float">
            <text:p>27.58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27.96" calcext:value-type="float">
            <text:p>27.96</text:p>
          </table:table-cell>
          <table:table-cell table:number-columns-repeated="4"/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27.87" calcext:value-type="float">
            <text:p>27.87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27.87" calcext:value-type="float">
            <text:p>27.87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float" office:value="26.73" calcext:value-type="float">
            <text:p>26.73</text:p>
          </table:table-cell>
          <table:table-cell table:number-columns-repeated="4"/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date" office:date-value="2025-04-05" calcext:value-type="date">
            <text:p>2025-04-05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date" office:date-value="2025-04-06" calcext:value-type="date">
            <text:p>2025-04-06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24.94" calcext:value-type="float">
            <text:p>24.94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float" office:value="24.32" calcext:value-type="float">
            <text:p>24.32</text:p>
          </table:table-cell>
          <table:table-cell table:number-columns-repeated="4"/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25.87" calcext:value-type="float">
            <text:p>25.87</text:p>
          </table:table-cell>
          <table:table-cell table:number-columns-repeated="4"/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float" office:value="24.97" calcext:value-type="float">
            <text:p>24.97</text:p>
          </table:table-cell>
          <table:table-cell table:number-columns-repeated="4"/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office:value-type="date" office:date-value="2025-04-12" calcext:value-type="date">
            <text:p>2025-04-12</text:p>
          </table:table-cell>
          <table:table-cell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office:value-type="date" office:date-value="2025-04-13" calcext:value-type="date">
            <text:p>2025-04-13</text:p>
          </table:table-cell>
          <table:table-cell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25.6" calcext:value-type="float">
            <text:p>25.6</text:p>
          </table:table-cell>
          <table:table-cell table:number-columns-repeated="4"/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25.43" calcext:value-type="float">
            <text:p>25.43</text:p>
          </table:table-cell>
          <table:table-cell table:number-columns-repeated="4"/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25.13" calcext:value-type="float">
            <text:p>25.13</text:p>
          </table:table-cell>
          <table:table-cell table:number-columns-repeated="4"/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25.42" calcext:value-type="float">
            <text:p>25.42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float" office:value="25.42" calcext:value-type="float">
            <text:p>25.42</text:p>
          </table:table-cell>
          <table:table-cell table:number-columns-repeated="4"/>
        </table:table-row>
        <table:table-row table:style-name="ro1">
          <table:table-cell office:value-type="date" office:date-value="2025-04-19" calcext:value-type="date">
            <text:p>2025-04-19</text:p>
          </table:table-cell>
          <table:table-cell office:value-type="float" office:value="25.42" calcext:value-type="float">
            <text:p>25.42</text:p>
          </table:table-cell>
          <table:table-cell table:number-columns-repeated="4"/>
        </table:table-row>
        <table:table-row table:style-name="ro1">
          <table:table-cell office:value-type="date" office:date-value="2025-04-20" calcext:value-type="date">
            <text:p>2025-04-20</text:p>
          </table:table-cell>
          <table:table-cell office:value-type="float" office:value="25.42" calcext:value-type="float">
            <text:p>25.42</text:p>
          </table:table-cell>
          <table:table-cell table:number-columns-repeated="4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25.03" calcext:value-type="float">
            <text:p>25.03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25.44" calcext:value-type="float">
            <text:p>25.44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25.42" calcext:value-type="float">
            <text:p>25.42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25.71" calcext:value-type="float">
            <text:p>25.71</text:p>
          </table:table-cell>
          <table:table-cell table:number-columns-repeated="4"/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25.67" calcext:value-type="float">
            <text:p>25.67</text:p>
          </table:table-cell>
          <table:table-cell table:number-columns-repeated="4"/>
        </table:table-row>
        <table:table-row table:style-name="ro1">
          <table:table-cell office:value-type="date" office:date-value="2025-04-26" calcext:value-type="date">
            <text:p>2025-04-26</text:p>
          </table:table-cell>
          <table:table-cell office:value-type="float" office:value="25.67" calcext:value-type="float">
            <text:p>25.67</text:p>
          </table:table-cell>
          <table:table-cell table:number-columns-repeated="4"/>
        </table:table-row>
        <table:table-row table:style-name="ro1">
          <table:table-cell office:value-type="date" office:date-value="2025-04-27" calcext:value-type="date">
            <text:p>2025-04-27</text:p>
          </table:table-cell>
          <table:table-cell office:value-type="float" office:value="25.67" calcext:value-type="float">
            <text:p>25.67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25.79" calcext:value-type="float">
            <text:p>25.79</text:p>
          </table:table-cell>
          <table:table-cell table:number-columns-repeated="4"/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25.89" calcext:value-type="float">
            <text:p>25.89</text:p>
          </table:table-cell>
          <table:table-cell table:number-columns-repeated="4"/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25.82" calcext:value-type="float">
            <text:p>25.82</text:p>
          </table:table-cell>
          <table:table-cell table:number-columns-repeated="4"/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25.71" calcext:value-type="float">
            <text:p>25.71</text:p>
          </table:table-cell>
          <table:table-cell table:number-columns-repeated="4"/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26.06" calcext:value-type="float">
            <text:p>26.06</text:p>
          </table:table-cell>
          <table:table-cell table:number-columns-repeated="4"/>
        </table:table-row>
        <table:table-row table:style-name="ro1">
          <table:table-cell office:value-type="date" office:date-value="2025-05-03" calcext:value-type="date">
            <text:p>2025-05-03</text:p>
          </table:table-cell>
          <table:table-cell office:value-type="float" office:value="26.06" calcext:value-type="float">
            <text:p>26.06</text:p>
          </table:table-cell>
          <table:table-cell table:number-columns-repeated="4"/>
        </table:table-row>
        <table:table-row table:style-name="ro1">
          <table:table-cell office:value-type="date" office:date-value="2025-05-04" calcext:value-type="date">
            <text:p>2025-05-04</text:p>
          </table:table-cell>
          <table:table-cell office:value-type="float" office:value="26.06" calcext:value-type="float">
            <text:p>26.06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25.8" calcext:value-type="float">
            <text:p>25.8</text:p>
          </table:table-cell>
          <table:table-cell table:number-columns-repeated="4"/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25.55" calcext:value-type="float">
            <text:p>25.55</text:p>
          </table:table-cell>
          <table:table-cell table:number-columns-repeated="4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25.64" calcext:value-type="float">
            <text:p>25.64</text:p>
          </table:table-cell>
          <table:table-cell table:number-columns-repeated="4"/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float" office:value="25.78" calcext:value-type="float">
            <text:p>25.78</text:p>
          </table:table-cell>
          <table:table-cell table:number-columns-repeated="4"/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25.73" calcext:value-type="float">
            <text:p>25.73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2025-05-10</text:p>
          </table:table-cell>
          <table:table-cell office:value-type="float" office:value="25.73" calcext:value-type="float">
            <text:p>25.73</text:p>
          </table:table-cell>
          <table:table-cell table:number-columns-repeated="4"/>
        </table:table-row>
        <table:table-row table:style-name="ro1">
          <table:table-cell office:value-type="date" office:date-value="2025-05-11" calcext:value-type="date">
            <text:p>2025-05-11</text:p>
          </table:table-cell>
          <table:table-cell office:value-type="float" office:value="25.73" calcext:value-type="float">
            <text:p>25.73</text:p>
          </table:table-cell>
          <table:table-cell table:number-columns-repeated="4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26.43" calcext:value-type="float">
            <text:p>26.43</text:p>
          </table:table-cell>
          <table:table-cell table:number-columns-repeated="4"/>
        </table:table-row>
        <table:table-row table:style-name="ro1">
          <table:table-cell office:value-type="date" office:date-value="2025-05-13" calcext:value-type="date">
            <text:p>2025-05-13</text:p>
          </table:table-cell>
          <table:table-cell office:value-type="float" office:value="26.31" calcext:value-type="float">
            <text:p>26.31</text:p>
          </table:table-cell>
          <table:table-cell table:number-columns-repeated="4"/>
        </table:table-row>
        <table:table-row table:style-name="ro1">
          <table:table-cell office:value-type="date" office:date-value="2025-05-14" calcext:value-type="date">
            <text:p>2025-05-1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26.42" calcext:value-type="float">
            <text:p>26.42</text:p>
          </table:table-cell>
          <table:table-cell table:number-columns-repeated="4"/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26.6" calcext:value-type="float">
            <text:p>26.6</text:p>
          </table:table-cell>
          <table:table-cell table:number-columns-repeated="4"/>
        </table:table-row>
        <table:table-row table:style-name="ro1">
          <table:table-cell office:value-type="date" office:date-value="2025-05-17" calcext:value-type="date">
            <text:p>2025-05-17</text:p>
          </table:table-cell>
          <table:table-cell office:value-type="float" office:value="26.6" calcext:value-type="float">
            <text:p>26.6</text:p>
          </table:table-cell>
          <table:table-cell table:number-columns-repeated="4"/>
        </table:table-row>
        <table:table-row table:style-name="ro1">
          <table:table-cell office:value-type="date" office:date-value="2025-05-18" calcext:value-type="date">
            <text:p>2025-05-18</text:p>
          </table:table-cell>
          <table:table-cell office:value-type="float" office:value="26.6" calcext:value-type="float">
            <text:p>26.6</text:p>
          </table:table-cell>
          <table:table-cell table:number-columns-repeated="4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26.58" calcext:value-type="float">
            <text:p>26.58</text:p>
          </table:table-cell>
          <table:table-cell table:number-columns-repeated="4"/>
        </table:table-row>
        <table:table-row table:style-name="ro1">
          <table:table-cell office:value-type="date" office:date-value="2025-05-20" calcext:value-type="date">
            <text:p>2025-05-20</text:p>
          </table:table-cell>
          <table:table-cell office:value-type="float" office:value="26.48" calcext:value-type="float">
            <text:p>26.48</text:p>
          </table:table-cell>
          <table:table-cell table:number-columns-repeated="4"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26.01" calcext:value-type="float">
            <text:p>26.01</text:p>
          </table:table-cell>
          <table:table-cell table:number-columns-repeated="4"/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25.96" calcext:value-type="float">
            <text:p>25.96</text:p>
          </table:table-cell>
          <table:table-cell table:number-columns-repeated="4"/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25.89" calcext:value-type="float">
            <text:p>25.89</text:p>
          </table:table-cell>
          <table:table-cell table:number-columns-repeated="4"/>
        </table:table-row>
        <table:table-row table:style-name="ro1">
          <table:table-cell office:value-type="date" office:date-value="2025-05-24" calcext:value-type="date">
            <text:p>2025-05-24</text:p>
          </table:table-cell>
          <table:table-cell office:value-type="float" office:value="25.89" calcext:value-type="float">
            <text:p>25.89</text:p>
          </table:table-cell>
          <table:table-cell table:number-columns-repeated="4"/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float" office:value="25.89" calcext:value-type="float">
            <text:p>25.89</text:p>
          </table:table-cell>
          <table:table-cell table:number-columns-repeated="4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25.89" calcext:value-type="float">
            <text:p>25.89</text:p>
          </table:table-cell>
          <table:table-cell table:number-columns-repeated="4"/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26.27" calcext:value-type="float">
            <text:p>26.27</text:p>
          </table:table-cell>
          <table:table-cell table:number-columns-repeated="4"/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26.04" calcext:value-type="float">
            <text:p>26.04</text:p>
          </table:table-cell>
          <table:table-cell table:number-columns-repeated="4"/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26.19" calcext:value-type="float">
            <text:p>26.19</text:p>
          </table:table-cell>
          <table:table-cell table:number-columns-repeated="4"/>
        </table:table-row>
        <table:table-row table:style-name="ro1">
          <table:table-cell office:value-type="date" office:date-value="2025-05-30" calcext:value-type="date">
            <text:p>2025-05-30</text:p>
          </table:table-cell>
          <table:table-cell office:value-type="float" office:value="26.17" calcext:value-type="float">
            <text:p>26.17</text:p>
          </table:table-cell>
          <table:table-cell table:number-columns-repeated="4"/>
        </table:table-row>
        <table:table-row table:style-name="ro1">
          <table:table-cell office:value-type="date" office:date-value="2025-05-31" calcext:value-type="date">
            <text:p>2025-05-31</text:p>
          </table:table-cell>
          <table:table-cell office:value-type="float" office:value="26.17" calcext:value-type="float">
            <text:p>26.17</text:p>
          </table:table-cell>
          <table:table-cell table:number-columns-repeated="4"/>
        </table:table-row>
        <table:table-row table:style-name="ro1">
          <table:table-cell office:value-type="date" office:date-value="2025-06-01" calcext:value-type="date">
            <text:p>2025-06-01</text:p>
          </table:table-cell>
          <table:table-cell office:value-type="float" office:value="26.17" calcext:value-type="float">
            <text:p>26.17</text:p>
          </table:table-cell>
          <table:table-cell table:number-columns-repeated="4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26.25" calcext:value-type="float">
            <text:p>26.25</text:p>
          </table:table-cell>
          <table:table-cell table:number-columns-repeated="4"/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26.44" calcext:value-type="float">
            <text:p>26.44</text:p>
          </table:table-cell>
          <table:table-cell table:number-columns-repeated="4"/>
        </table:table-row>
        <table:table-row table:style-name="ro1">
          <table:table-cell office:value-type="date" office:date-value="2025-06-04" calcext:value-type="date">
            <text:p>2025-06-04</text:p>
          </table:table-cell>
          <table:table-cell office:value-type="float" office:value="26.29" calcext:value-type="float">
            <text:p>26.29</text:p>
          </table:table-cell>
          <table:table-cell table:number-columns-repeated="4"/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26.23" calcext:value-type="float">
            <text:p>26.23</text:p>
          </table:table-cell>
          <table:table-cell table:number-columns-repeated="4"/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26.54" calcext:value-type="float">
            <text:p>26.54</text:p>
          </table:table-cell>
          <table:table-cell table:number-columns-repeated="4"/>
        </table:table-row>
        <table:table-row table:style-name="ro1">
          <table:table-cell office:value-type="date" office:date-value="2025-06-07" calcext:value-type="date">
            <text:p>2025-06-07</text:p>
          </table:table-cell>
          <table:table-cell office:value-type="float" office:value="26.54" calcext:value-type="float">
            <text:p>26.54</text:p>
          </table:table-cell>
          <table:table-cell table:number-columns-repeated="4"/>
        </table:table-row>
        <table:table-row table:style-name="ro1">
          <table:table-cell office:value-type="date" office:date-value="2025-06-08" calcext:value-type="date">
            <text:p>2025-06-08</text:p>
          </table:table-cell>
          <table:table-cell office:value-type="float" office:value="26.54" calcext:value-type="float">
            <text:p>26.54</text:p>
          </table:table-cell>
          <table:table-cell table:number-columns-repeated="4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26.65" calcext:value-type="float">
            <text:p>26.65</text:p>
          </table:table-cell>
          <table:table-cell table:number-columns-repeated="4"/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26.95" calcext:value-type="float">
            <text:p>26.95</text:p>
          </table:table-cell>
          <table:table-cell table:number-columns-repeated="4"/>
        </table:table-row>
        <table:table-row table:style-name="ro1">
          <table:table-cell office:value-type="date" office:date-value="2025-06-11" calcext:value-type="date">
            <text:p>2025-06-11</text:p>
          </table:table-cell>
          <table:table-cell office:value-type="float" office:value="26.86" calcext:value-type="float">
            <text:p>26.86</text:p>
          </table:table-cell>
          <table:table-cell table:number-columns-repeated="4"/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27.02" calcext:value-type="float">
            <text:p>27.02</text:p>
          </table:table-cell>
          <table:table-cell table:number-columns-repeated="4"/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26.9" calcext:value-type="float">
            <text:p>26.9</text:p>
          </table:table-cell>
          <table:table-cell table:number-columns-repeated="4"/>
        </table:table-row>
        <table:table-row table:style-name="ro1">
          <table:table-cell office:value-type="date" office:date-value="2025-06-14" calcext:value-type="date">
            <text:p>2025-06-14</text:p>
          </table:table-cell>
          <table:table-cell office:value-type="float" office:value="26.9" calcext:value-type="float">
            <text:p>26.9</text:p>
          </table:table-cell>
          <table:table-cell table:number-columns-repeated="4"/>
        </table:table-row>
        <table:table-row table:style-name="ro1">
          <table:table-cell office:value-type="date" office:date-value="2025-06-15" calcext:value-type="date">
            <text:p>2025-06-15</text:p>
          </table:table-cell>
          <table:table-cell office:value-type="float" office:value="26.9" calcext:value-type="float">
            <text:p>26.9</text:p>
          </table:table-cell>
          <table:table-cell table:number-columns-repeated="4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26.92" calcext:value-type="float">
            <text:p>26.92</text:p>
          </table:table-cell>
          <table:table-cell table:number-columns-repeated="4"/>
        </table:table-row>
        <table:table-row table:style-name="ro1">
          <table:table-cell office:value-type="date" office:date-value="2025-06-17" calcext:value-type="date">
            <text:p>2025-06-17</text:p>
          </table:table-cell>
          <table:table-cell office:value-type="float" office:value="26.72" calcext:value-type="float">
            <text:p>26.72</text:p>
          </table:table-cell>
          <table:table-cell table:number-columns-repeated="4"/>
        </table:table-row>
        <table:table-row table:style-name="ro1">
          <table:table-cell office:value-type="date" office:date-value="2025-06-18" calcext:value-type="date">
            <text:p>2025-06-18</text:p>
          </table:table-cell>
          <table:table-cell office:value-type="float" office:value="26.64" calcext:value-type="float">
            <text:p>26.64</text:p>
          </table:table-cell>
          <table:table-cell table:number-columns-repeated="4"/>
        </table:table-row>
        <table:table-row table:style-name="ro1">
          <table:table-cell office:value-type="date" office:date-value="2025-06-19" calcext:value-type="date">
            <text:p>2025-06-19</text:p>
          </table:table-cell>
          <table:table-cell office:value-type="float" office:value="26.64" calcext:value-type="float">
            <text:p>26.64</text:p>
          </table:table-cell>
          <table:table-cell table:number-columns-repeated="4"/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float" office:value="26.7" calcext:value-type="float">
            <text:p>26.7</text:p>
          </table:table-cell>
          <table:table-cell table:number-columns-repeated="4"/>
        </table:table-row>
        <table:table-row table:style-name="ro1">
          <table:table-cell office:value-type="date" office:date-value="2025-06-21" calcext:value-type="date">
            <text:p>2025-06-21</text:p>
          </table:table-cell>
          <table:table-cell office:value-type="float" office:value="26.7" calcext:value-type="float">
            <text:p>26.7</text:p>
          </table:table-cell>
          <table:table-cell table:number-columns-repeated="4"/>
        </table:table-row>
        <table:table-row table:style-name="ro1">
          <table:table-cell office:value-type="date" office:date-value="2025-06-22" calcext:value-type="date">
            <text:p>2025-06-22</text:p>
          </table:table-cell>
          <table:table-cell office:value-type="float" office:value="26.7" calcext:value-type="float">
            <text:p>26.7</text:p>
          </table:table-cell>
          <table:table-cell table:number-columns-repeated="4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26.7" calcext:value-type="float">
            <text:p>26.7</text:p>
          </table:table-cell>
          <table:table-cell table:number-columns-repeated="4"/>
        </table:table-row>
        <table:table-row table:style-name="ro1">
          <table:table-cell office:value-type="date" office:date-value="2025-06-24" calcext:value-type="date">
            <text:p>2025-06-24</text:p>
          </table:table-cell>
          <table:table-cell office:value-type="float" office:value="26.74" calcext:value-type="float">
            <text:p>26.74</text:p>
          </table:table-cell>
          <table:table-cell table:number-columns-repeated="4"/>
        </table:table-row>
        <table:table-row table:style-name="ro1">
          <table:table-cell office:value-type="date" office:date-value="2025-06-25" calcext:value-type="date">
            <text:p>2025-06-25</text:p>
          </table:table-cell>
          <table:table-cell office:value-type="float" office:value="26.2" calcext:value-type="float">
            <text:p>26.2</text:p>
          </table:table-cell>
          <table:table-cell table:number-columns-repeated="4"/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26.39" calcext:value-type="float">
            <text:p>26.39</text:p>
          </table:table-cell>
          <table:table-cell table:number-columns-repeated="4"/>
        </table:table-row>
        <table:table-row table:style-name="ro1">
          <table:table-cell office:value-type="date" office:date-value="2025-06-27" calcext:value-type="date">
            <text:p>2025-06-27</text:p>
          </table:table-cell>
          <table:table-cell office:value-type="float" office:value="26.39" calcext:value-type="float">
            <text:p>26.39</text:p>
          </table:table-cell>
          <table:table-cell table:number-columns-repeated="4"/>
        </table:table-row>
        <table:table-row table:style-name="ro1">
          <table:table-cell office:value-type="date" office:date-value="2025-06-28" calcext:value-type="date">
            <text:p>2025-06-28</text:p>
          </table:table-cell>
          <table:table-cell office:value-type="float" office:value="26.39" calcext:value-type="float">
            <text:p>26.39</text:p>
          </table:table-cell>
          <table:table-cell table:number-columns-repeated="4"/>
        </table:table-row>
        <table:table-row table:style-name="ro1">
          <table:table-cell office:value-type="date" office:date-value="2025-06-29" calcext:value-type="date">
            <text:p>2025-06-29</text:p>
          </table:table-cell>
          <table:table-cell office:value-type="float" office:value="26.39" calcext:value-type="float">
            <text:p>26.39</text:p>
          </table:table-cell>
          <table:table-cell table:number-columns-repeated="4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26.5" calcext:value-type="float">
            <text:p>26.5</text:p>
          </table:table-cell>
          <table:table-cell table:number-columns-repeated="4"/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27.05" calcext:value-type="float">
            <text:p>27.05</text:p>
          </table:table-cell>
          <table:table-cell table:number-columns-repeated="4"/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27.31" calcext:value-type="float">
            <text:p>27.31</text:p>
          </table:table-cell>
          <table:table-cell table:number-columns-repeated="4"/>
        </table:table-row>
        <table:table-row table:style-name="ro1">
          <table:table-cell office:value-type="date" office:date-value="2025-07-03" calcext:value-type="date">
            <text:p>2025-07-03</text:p>
          </table:table-cell>
          <table:table-cell office:value-type="float" office:value="27.35" calcext:value-type="float">
            <text:p>27.35</text:p>
          </table:table-cell>
          <table:table-cell table:number-columns-repeated="4"/>
        </table:table-row>
        <table:table-row table:style-name="ro1">
          <table:table-cell office:value-type="date" office:date-value="2025-07-04" calcext:value-type="date">
            <text:p>2025-07-04</text:p>
          </table:table-cell>
          <table:table-cell office:value-type="float" office:value="27.35" calcext:value-type="float">
            <text:p>27.35</text:p>
          </table:table-cell>
          <table:table-cell table:number-columns-repeated="4"/>
        </table:table-row>
        <table:table-row table:style-name="ro1">
          <table:table-cell office:value-type="date" office:date-value="2025-07-05" calcext:value-type="date">
            <text:p>2025-07-05</text:p>
          </table:table-cell>
          <table:table-cell office:value-type="float" office:value="27.35" calcext:value-type="float">
            <text:p>27.35</text:p>
          </table:table-cell>
          <table:table-cell table:number-columns-repeated="4"/>
        </table:table-row>
        <table:table-row table:style-name="ro1">
          <table:table-cell office:value-type="date" office:date-value="2025-07-06" calcext:value-type="date">
            <text:p>2025-07-06</text:p>
          </table:table-cell>
          <table:table-cell office:value-type="float" office:value="27.35" calcext:value-type="float">
            <text:p>27.35</text:p>
          </table:table-cell>
          <table:table-cell table:number-columns-repeated="4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27.06" calcext:value-type="float">
            <text:p>27.06</text:p>
          </table:table-cell>
          <table:table-cell table:number-columns-repeated="4"/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27.29" calcext:value-type="float">
            <text:p>27.29</text:p>
          </table:table-cell>
          <table:table-cell table:number-columns-repeated="4"/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27.51" calcext:value-type="float">
            <text:p>27.51</text:p>
          </table:table-cell>
          <table:table-cell table:number-columns-repeated="4"/>
        </table:table-row>
        <table:table-row table:style-name="ro1">
          <table:table-cell office:value-type="date" office:date-value="2025-07-11" calcext:value-type="date">
            <text:p>2025-07-11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7-12" calcext:value-type="date">
            <text:p>2025-07-12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7-13" calcext:value-type="date">
            <text:p>2025-07-13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27.31" calcext:value-type="float">
            <text:p>27.31</text:p>
          </table:table-cell>
          <table:table-cell table:number-columns-repeated="4"/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26.87" calcext:value-type="float">
            <text:p>26.87</text:p>
          </table:table-cell>
          <table:table-cell table:number-columns-repeated="4"/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26.93" calcext:value-type="float">
            <text:p>26.93</text:p>
          </table:table-cell>
          <table:table-cell table:number-columns-repeated="4"/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27.14" calcext:value-type="float">
            <text:p>27.14</text:p>
          </table:table-cell>
          <table:table-cell table:number-columns-repeated="4"/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27.02" calcext:value-type="float">
            <text:p>27.02</text:p>
          </table:table-cell>
          <table:table-cell table:number-columns-repeated="4"/>
        </table:table-row>
        <table:table-row table:style-name="ro1">
          <table:table-cell office:value-type="date" office:date-value="2025-07-19" calcext:value-type="date">
            <text:p>2025-07-19</text:p>
          </table:table-cell>
          <table:table-cell office:value-type="float" office:value="27.02" calcext:value-type="float">
            <text:p>27.02</text:p>
          </table:table-cell>
          <table:table-cell table:number-columns-repeated="4"/>
        </table:table-row>
        <table:table-row table:style-name="ro1">
          <table:table-cell office:value-type="date" office:date-value="2025-07-20" calcext:value-type="date">
            <text:p>2025-07-20</text:p>
          </table:table-cell>
          <table:table-cell office:value-type="float" office:value="27.02" calcext:value-type="float">
            <text:p>27.02</text:p>
          </table:table-cell>
          <table:table-cell table:number-columns-repeated="4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26.95" calcext:value-type="float">
            <text:p>26.95</text:p>
          </table:table-cell>
          <table:table-cell table:number-columns-repeated="4"/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27.24" calcext:value-type="float">
            <text:p>27.24</text:p>
          </table:table-cell>
          <table:table-cell table:number-columns-repeated="4"/>
        </table:table-row>
        <table:table-row table:style-name="ro1">
          <table:table-cell office:value-type="date" office:date-value="2025-07-23" calcext:value-type="date">
            <text:p>2025-07-23</text:p>
          </table:table-cell>
          <table:table-cell office:value-type="float" office:value="27.38" calcext:value-type="float">
            <text:p>27.38</text:p>
          </table:table-cell>
          <table:table-cell table:number-columns-repeated="4"/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27.28" calcext:value-type="float">
            <text:p>27.28</text:p>
          </table:table-cell>
          <table:table-cell table:number-columns-repeated="4"/>
        </table:table-row>
        <table:table-row table:style-name="ro1">
          <table:table-cell office:value-type="date" office:date-value="2025-07-25" calcext:value-type="date">
            <text:p>2025-07-25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7-26" calcext:value-type="date">
            <text:p>2025-07-26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7-27" calcext:value-type="date">
            <text:p>2025-07-27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27.2" calcext:value-type="float">
            <text:p>27.2</text:p>
          </table:table-cell>
          <table:table-cell table:number-columns-repeated="4"/>
        </table:table-row>
        <table:table-row table:style-name="ro1">
          <table:table-cell office:value-type="date" office:date-value="2025-07-29" calcext:value-type="date">
            <text:p>2025-07-29</text:p>
          </table:table-cell>
          <table:table-cell office:value-type="float" office:value="27.17" calcext:value-type="float">
            <text:p>27.17</text:p>
          </table:table-cell>
          <table:table-cell table:number-columns-repeated="4"/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26.84" calcext:value-type="float">
            <text:p>26.84</text:p>
          </table:table-cell>
          <table:table-cell table:number-columns-repeated="4"/>
        </table:table-row>
        <table:table-row table:style-name="ro1">
          <table:table-cell office:value-type="date" office:date-value="2025-07-31" calcext:value-type="date">
            <text:p>2025-07-31</text:p>
          </table:table-cell>
          <table:table-cell office:value-type="float" office:value="26.5" calcext:value-type="float">
            <text:p>26.5</text:p>
          </table:table-cell>
          <table:table-cell table:number-columns-repeated="4"/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26.38" calcext:value-type="float">
            <text:p>26.38</text:p>
          </table:table-cell>
          <table:table-cell table:number-columns-repeated="4"/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float" office:value="26.38" calcext:value-type="float">
            <text:p>26.38</text:p>
          </table:table-cell>
          <table:table-cell table:number-columns-repeated="4"/>
        </table:table-row>
        <table:table-row table:style-name="ro1">
          <table:table-cell office:value-type="date" office:date-value="2025-08-03" calcext:value-type="date">
            <text:p>2025-08-03</text:p>
          </table:table-cell>
          <table:table-cell office:value-type="float" office:value="26.38" calcext:value-type="float">
            <text:p>26.38</text:p>
          </table:table-cell>
          <table:table-cell table:number-columns-repeated="4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26.61" calcext:value-type="float">
            <text:p>26.61</text:p>
          </table:table-cell>
          <table:table-cell table:number-columns-repeated="4"/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26.74" calcext:value-type="float">
            <text:p>26.74</text:p>
          </table:table-cell>
          <table:table-cell table:number-columns-repeated="4"/>
        </table:table-row>
        <table:table-row table:style-name="ro1">
          <table:table-cell office:value-type="date" office:date-value="2025-08-06" calcext:value-type="date">
            <text:p>2025-08-06</text:p>
          </table:table-cell>
          <table:table-cell office:value-type="float" office:value="26.68" calcext:value-type="float">
            <text:p>26.68</text:p>
          </table:table-cell>
          <table:table-cell table:number-columns-repeated="4"/>
        </table:table-row>
        <table:table-row table:style-name="ro1">
          <table:table-cell office:value-type="date" office:date-value="2025-08-07" calcext:value-type="date">
            <text:p>2025-08-07</text:p>
          </table:table-cell>
          <table:table-cell office:value-type="float" office:value="26.75" calcext:value-type="float">
            <text:p>26.75</text:p>
          </table:table-cell>
          <table:table-cell table:number-columns-repeated="4"/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26.88" calcext:value-type="float">
            <text:p>26.88</text:p>
          </table:table-cell>
          <table:table-cell table:number-columns-repeated="4"/>
        </table:table-row>
        <table:table-row table:style-name="ro1">
          <table:table-cell office:value-type="date" office:date-value="2025-08-09" calcext:value-type="date">
            <text:p>2025-08-09</text:p>
          </table:table-cell>
          <table:table-cell office:value-type="float" office:value="26.88" calcext:value-type="float">
            <text:p>26.88</text:p>
          </table:table-cell>
          <table:table-cell table:number-columns-repeated="4"/>
        </table:table-row>
        <table:table-row table:style-name="ro1">
          <table:table-cell office:value-type="date" office:date-value="2025-08-10" calcext:value-type="date">
            <text:p>2025-08-10</text:p>
          </table:table-cell>
          <table:table-cell office:value-type="float" office:value="26.88" calcext:value-type="float">
            <text:p>26.88</text:p>
          </table:table-cell>
          <table:table-cell table:number-columns-repeated="4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26.79" calcext:value-type="float">
            <text:p>26.79</text:p>
          </table:table-cell>
          <table:table-cell table:number-columns-repeated="4"/>
        </table:table-row>
        <table:table-row table:style-name="ro1">
          <table:table-cell office:value-type="date" office:date-value="2025-08-12" calcext:value-type="date">
            <text:p>2025-08-12</text:p>
          </table:table-cell>
          <table:table-cell office:value-type="float" office:value="27.1" calcext:value-type="float">
            <text:p>27.1</text:p>
          </table:table-cell>
          <table:table-cell table:number-columns-repeated="4"/>
        </table:table-row>
        <table:table-row table:style-name="ro1">
          <table:table-cell office:value-type="date" office:date-value="2025-08-13" calcext:value-type="date">
            <text:p>2025-08-13</text:p>
          </table:table-cell>
          <table:table-cell office:value-type="float" office:value="27.46" calcext:value-type="float">
            <text:p>27.46</text:p>
          </table:table-cell>
          <table:table-cell table:number-columns-repeated="4"/>
        </table:table-row>
        <table:table-row table:style-name="ro1">
          <table:table-cell office:value-type="date" office:date-value="2025-08-14" calcext:value-type="date">
            <text:p>2025-08-14</text:p>
          </table:table-cell>
          <table:table-cell office:value-type="float" office:value="27.34" calcext:value-type="float">
            <text:p>27.34</text:p>
          </table:table-cell>
          <table:table-cell table:number-columns-repeated="4"/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8-16" calcext:value-type="date">
            <text:p>2025-08-16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27.26" calcext:value-type="float">
            <text:p>27.26</text:p>
          </table:table-cell>
          <table:table-cell table:number-columns-repeated="4"/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27.45" calcext:value-type="float">
            <text:p>27.45</text:p>
          </table:table-cell>
          <table:table-cell table:number-columns-repeated="4"/>
        </table:table-row>
        <table:table-row table:style-name="ro1">
          <table:table-cell office:value-type="date" office:date-value="2025-08-20" calcext:value-type="date">
            <text:p>2025-08-20</text:p>
          </table:table-cell>
          <table:table-cell office:value-type="float" office:value="27.51" calcext:value-type="float">
            <text:p>27.51</text:p>
          </table:table-cell>
          <table:table-cell table:number-columns-repeated="4"/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27.52" calcext:value-type="float">
            <text:p>27.52</text:p>
          </table:table-cell>
          <table:table-cell table:number-columns-repeated="4"/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27.95" calcext:value-type="float">
            <text:p>27.95</text:p>
          </table:table-cell>
          <table:table-cell table:number-columns-repeated="4"/>
        </table:table-row>
        <table:table-row table:style-name="ro1">
          <table:table-cell office:value-type="date" office:date-value="2025-08-23" calcext:value-type="date">
            <text:p>2025-08-23</text:p>
          </table:table-cell>
          <table:table-cell office:value-type="float" office:value="27.95" calcext:value-type="float">
            <text:p>27.95</text:p>
          </table:table-cell>
          <table:table-cell table:number-columns-repeated="4"/>
        </table:table-row>
        <table:table-row table:style-name="ro1">
          <table:table-cell office:value-type="date" office:date-value="2025-08-24" calcext:value-type="date">
            <text:p>2025-08-24</text:p>
          </table:table-cell>
          <table:table-cell office:value-type="float" office:value="27.95" calcext:value-type="float">
            <text:p>27.95</text:p>
          </table:table-cell>
          <table:table-cell table:number-columns-repeated="4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27.77" calcext:value-type="float">
            <text:p>27.77</text:p>
          </table:table-cell>
          <table:table-cell table:number-columns-repeated="4"/>
        </table:table-row>
        <table:table-row table:style-name="ro1">
          <table:table-cell office:value-type="date" office:date-value="2025-08-26" calcext:value-type="date">
            <text:p>2025-08-26</text:p>
          </table:table-cell>
          <table:table-cell office:value-type="float" office:value="27.75" calcext:value-type="float">
            <text:p>27.75</text:p>
          </table:table-cell>
          <table:table-cell table:number-columns-repeated="4"/>
        </table:table-row>
        <table:table-row table:style-name="ro1">
          <table:table-cell office:value-type="date" office:date-value="2025-08-27" calcext:value-type="date">
            <text:p>2025-08-27</text:p>
          </table:table-cell>
          <table:table-cell office:value-type="float" office:value="27.87" calcext:value-type="float">
            <text:p>27.87</text:p>
          </table:table-cell>
          <table:table-cell table:number-columns-repeated="4"/>
        </table:table-row>
        <table:table-row table:style-name="ro1">
          <table:table-cell office:value-type="date" office:date-value="2025-08-28" calcext:value-type="date">
            <text:p>2025-08-28</text:p>
          </table:table-cell>
          <table:table-cell office:value-type="float" office:value="27.82" calcext:value-type="float">
            <text:p>27.82</text:p>
          </table:table-cell>
          <table:table-cell table:number-columns-repeated="4"/>
        </table:table-row>
        <table:table-row table:style-name="ro1">
          <table:table-cell office:value-type="date" office:date-value="2025-08-29" calcext:value-type="date">
            <text:p>2025-08-29</text:p>
          </table:table-cell>
          <table:table-cell office:value-type="float" office:value="27.92" calcext:value-type="float">
            <text:p>27.92</text:p>
          </table:table-cell>
          <table:table-cell table:number-columns-repeated="4"/>
        </table:table-row>
        <table:table-row table:style-name="ro1">
          <table:table-cell office:value-type="date" office:date-value="2025-08-30" calcext:value-type="date">
            <text:p>2025-08-30</text:p>
          </table:table-cell>
          <table:table-cell office:value-type="float" office:value="27.92" calcext:value-type="float">
            <text:p>27.92</text:p>
          </table:table-cell>
          <table:table-cell table:number-columns-repeated="4"/>
        </table:table-row>
        <table:table-row table:style-name="ro1">
          <table:table-cell office:value-type="date" office:date-value="2025-08-31" calcext:value-type="date">
            <text:p>2025-08-31</text:p>
          </table:table-cell>
          <table:table-cell office:value-type="float" office:value="27.92" calcext:value-type="float">
            <text:p>27.92</text:p>
          </table:table-cell>
          <table:table-cell table:number-columns-repeated="4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27.92" calcext:value-type="float">
            <text:p>27.92</text:p>
          </table:table-cell>
          <table:table-cell table:number-columns-repeated="4"/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float" office:value="27.84" calcext:value-type="float">
            <text:p>27.84</text:p>
          </table:table-cell>
          <table:table-cell table:number-columns-repeated="4"/>
        </table:table-row>
        <table:table-row table:style-name="ro1">
          <table:table-cell office:value-type="date" office:date-value="2025-09-03" calcext:value-type="date">
            <text:p>2025-09-03</text:p>
          </table:table-cell>
          <table:table-cell office:value-type="float" office:value="27.6" calcext:value-type="float">
            <text:p>27.6</text:p>
          </table:table-cell>
          <table:table-cell table:number-columns-repeated="4"/>
        </table:table-row>
        <table:table-row table:style-name="ro1">
          <table:table-cell office:value-type="date" office:date-value="2025-09-04" calcext:value-type="date">
            <text:p>2025-09-04</text:p>
          </table:table-cell>
          <table:table-cell office:value-type="float" office:value="27.69" calcext:value-type="float">
            <text:p>27.69</text:p>
          </table:table-cell>
          <table:table-cell table:number-columns-repeated="4"/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09-06" calcext:value-type="date">
            <text:p>2025-09-06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09-07" calcext:value-type="date">
            <text:p>2025-09-07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27.44" calcext:value-type="float">
            <text:p>27.44</text:p>
          </table:table-cell>
          <table:table-cell table:number-columns-repeated="4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7.45" calcext:value-type="float">
            <text:p>27.45</text:p>
          </table:table-cell>
          <table:table-cell table:number-columns-repeated="4"/>
        </table:table-row>
        <table:table-row table:style-name="ro1">
          <table:table-cell office:value-type="date" office:date-value="2025-09-10" calcext:value-type="date">
            <text:p>2025-09-10</text:p>
          </table:table-cell>
          <table:table-cell office:value-type="float" office:value="27.5" calcext:value-type="float">
            <text:p>27.5</text:p>
          </table:table-cell>
          <table:table-cell table:number-columns-repeated="4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7.72" calcext:value-type="float">
            <text:p>27.72</text:p>
          </table:table-cell>
          <table:table-cell table:number-columns-repeated="4"/>
        </table:table-row>
        <table:table-row table:style-name="ro1">
          <table:table-cell office:value-type="date" office:date-value="2025-09-12" calcext:value-type="date">
            <text:p>2025-09-12</text:p>
          </table:table-cell>
          <table:table-cell office:value-type="float" office:value="27.48" calcext:value-type="float">
            <text:p>27.48</text:p>
          </table:table-cell>
          <table:table-cell table:number-columns-repeated="4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7.48" calcext:value-type="float">
            <text:p>27.48</text:p>
          </table:table-cell>
          <table:table-cell table:number-columns-repeated="4"/>
        </table:table-row>
        <table:table-row table:style-name="ro1">
          <table:table-cell office:value-type="date" office:date-value="2025-09-14" calcext:value-type="date">
            <text:p>2025-09-14</text:p>
          </table:table-cell>
          <table:table-cell office:value-type="float" office:value="27.48" calcext:value-type="float">
            <text:p>27.48</text:p>
          </table:table-cell>
          <table:table-cell table:number-columns-repeated="4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27.34" calcext:value-type="float">
            <text:p>27.34</text:p>
          </table:table-cell>
          <table:table-cell table:number-columns-repeated="4"/>
        </table:table-row>
        <table:table-row table:style-name="ro1">
          <table:table-cell office:value-type="date" office:date-value="2025-09-16" calcext:value-type="date">
            <text:p>2025-09-16</text:p>
          </table:table-cell>
          <table:table-cell office:value-type="float" office:value="27.42" calcext:value-type="float">
            <text:p>27.42</text:p>
          </table:table-cell>
          <table:table-cell table:number-columns-repeated="4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7.47" calcext:value-type="float">
            <text:p>27.47</text:p>
          </table:table-cell>
          <table:table-cell table:number-columns-repeated="4"/>
        </table:table-row>
        <table:table-row table:style-name="ro1">
          <table:table-cell office:value-type="date" office:date-value="2025-09-18" calcext:value-type="date">
            <text:p>2025-09-18</text:p>
          </table:table-cell>
          <table:table-cell office:value-type="float" office:value="27.45" calcext:value-type="float">
            <text:p>27.45</text:p>
          </table:table-cell>
          <table:table-cell table:number-columns-repeated="4"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9-20" calcext:value-type="date">
            <text:p>2025-09-20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9-21" calcext:value-type="date">
            <text:p>2025-09-21</text:p>
          </table:table-cell>
          <table:table-cell office:value-type="float" office:value="27.33" calcext:value-type="float">
            <text:p>27.33</text:p>
          </table:table-cell>
          <table:table-cell table:number-columns-repeated="4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27.25" calcext:value-type="float">
            <text:p>27.25</text:p>
          </table:table-cell>
          <table:table-cell table:number-columns-repeated="4"/>
        </table:table-row>
        <table:table-row table:style-name="ro1">
          <table:table-cell office:value-type="date" office:date-value="2025-09-23" calcext:value-type="date">
            <text:p>2025-09-23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float" office:value="27.16" calcext:value-type="float">
            <text:p>27.16</text:p>
          </table:table-cell>
          <table:table-cell table:number-columns-repeated="4"/>
        </table:table-row>
        <table:table-row table:style-name="ro1">
          <table:table-cell office:value-type="date" office:date-value="2025-09-25" calcext:value-type="date">
            <text:p>2025-09-25</text:p>
          </table:table-cell>
          <table:table-cell office:value-type="float" office:value="26.99" calcext:value-type="float">
            <text:p>26.99</text:p>
          </table:table-cell>
          <table:table-cell table:number-columns-repeated="4"/>
        </table:table-row>
        <table:table-row table:style-name="ro1">
          <table:table-cell office:value-type="date" office:date-value="2025-09-26" calcext:value-type="date">
            <text:p>2025-09-26</text:p>
          </table:table-cell>
          <table:table-cell office:value-type="float" office:value="27.21" calcext:value-type="float">
            <text:p>27.21</text:p>
          </table:table-cell>
          <table:table-cell table:number-columns-repeated="4"/>
        </table:table-row>
        <table:table-row table:style-name="ro1">
          <table:table-cell office:value-type="date" office:date-value="2025-09-27" calcext:value-type="date">
            <text:p>2025-09-27</text:p>
          </table:table-cell>
          <table:table-cell office:value-type="float" office:value="27.21" calcext:value-type="float">
            <text:p>27.21</text:p>
          </table:table-cell>
          <table:table-cell table:number-columns-repeated="4"/>
        </table:table-row>
        <table:table-row table:style-name="ro1">
          <table:table-cell office:value-type="date" office:date-value="2025-09-28" calcext:value-type="date">
            <text:p>2025-09-28</text:p>
          </table:table-cell>
          <table:table-cell office:value-type="float" office:value="27.21" calcext:value-type="float">
            <text:p>27.21</text:p>
          </table:table-cell>
          <table:table-cell table:number-columns-repeated="4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27.1" calcext:value-type="float">
            <text:p>27.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float" office:value="27.3" calcext:value-type="float">
            <text:p>27.3</text:p>
          </table:table-cell>
          <table:table-cell table:number-columns-repeated="4"/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27.53" calcext:value-type="float">
            <text:p>27.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float" office:value="27.34" calcext:value-type="float">
            <text:p>27.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float" office:value="27.41" calcext:value-type="float">
            <text:p>27.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float" office:value="27.41" calcext:value-type="float">
            <text:p>27.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2025-10-05</text:p>
          </table:table-cell>
          <table:table-cell office:value-type="float" office:value="27.41" calcext:value-type="float">
            <text:p>27.41</text:p>
          </table:table-cell>
          <table:table-cell table:number-columns-repeated="4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27.34" calcext:value-type="float">
            <text:p>27.34</text:p>
          </table:table-cell>
          <table:table-cell table:number-columns-repeated="4"/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float" office:value="27.28" calcext:value-type="float">
            <text:p>27.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float" office:value="27.18" calcext:value-type="float">
            <text:p>27.18</text:p>
          </table:table-cell>
          <table:table-cell table:number-columns-repeated="4"/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float" office:value="26.54" calcext:value-type="float">
            <text:p>26.54</text:p>
          </table:table-cell>
          <table:table-cell table:number-columns-repeated="4"/>
        </table:table-row>
        <table:table-row table:style-name="ro1">
          <table:table-cell office:value-type="date" office:date-value="2025-10-11" calcext:value-type="date">
            <text:p>2025-10-11</text:p>
          </table:table-cell>
          <table:table-cell office:value-type="float" office:value="26.54" calcext:value-type="float">
            <text:p>26.54</text:p>
          </table:table-cell>
          <table:table-cell table:number-columns-repeated="4"/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float" office:value="26.54" calcext:value-type="float">
            <text:p>26.54</text:p>
          </table:table-cell>
          <table:table-cell table:number-columns-repeated="4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26.63" calcext:value-type="float">
            <text:p>26.63</text:p>
          </table:table-cell>
          <table:table-cell table:number-columns-repeated="4"/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float" office:value="26.87" calcext:value-type="float">
            <text:p>26.87</text:p>
          </table:table-cell>
          <table:table-cell table:number-columns-repeated="4"/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float" office:value="26.78" calcext:value-type="float">
            <text:p>26.78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float" office:value="26.57" calcext:value-type="float">
            <text:p>26.57</text:p>
          </table:table-cell>
          <table:table-cell table:number-columns-repeated="4"/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float" office:value="26.79" calcext:value-type="float">
            <text:p>26.79</text:p>
          </table:table-cell>
          <table:table-cell table:number-columns-repeated="4"/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float" office:value="26.79" calcext:value-type="float">
            <text:p>26.79</text:p>
          </table:table-cell>
          <table:table-cell table:number-columns-repeated="4"/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float" office:value="26.79" calcext:value-type="float">
            <text:p>26.79</text:p>
          </table:table-cell>
          <table:table-cell table:number-columns-repeated="4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26.99" calcext:value-type="float">
            <text:p>26.99</text:p>
          </table:table-cell>
          <table:table-cell table:number-columns-repeated="4"/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float" office:value="27.07" calcext:value-type="float">
            <text:p>27.07</text:p>
          </table:table-cell>
          <table:table-cell table:number-columns-repeated="4"/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float" office:value="26.99" calcext:value-type="float">
            <text:p>26.99</text:p>
          </table:table-cell>
          <table:table-cell table:number-columns-repeated="4"/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float" office:value="27.03" calcext:value-type="float">
            <text:p>27.03</text:p>
          </table:table-cell>
          <table:table-cell table:number-columns-repeated="4"/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float" office:value="27.03" calcext:value-type="float">
            <text:p>27.03</text:p>
          </table:table-cell>
          <table:table-cell table:number-columns-repeated="4"/>
        </table:table-row>
        <table:table-row table:style-name="ro1">
          <table:table-cell office:value-type="date" office:date-value="2025-10-25" calcext:value-type="date">
            <text:p>2025-10-25</text:p>
          </table:table-cell>
          <table:table-cell office:value-type="float" office:value="27.03" calcext:value-type="float">
            <text:p>27.03</text:p>
          </table:table-cell>
          <table:table-cell table:number-columns-repeated="4"/>
        </table:table-row>
        <table:table-row table:style-name="ro1">
          <table:table-cell office:value-type="date" office:date-value="2025-10-26" calcext:value-type="date">
            <text:p>2025-10-26</text:p>
          </table:table-cell>
          <table:table-cell office:value-type="float" office:value="27.03" calcext:value-type="float">
            <text:p>27.03</text:p>
          </table:table-cell>
          <table:table-cell table:number-columns-repeated="4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27.12" calcext:value-type="float">
            <text:p>27.12</text:p>
          </table:table-cell>
          <table:table-cell table:number-columns-repeated="4"/>
        </table:table-row>
        <table:table-row table:style-name="ro1">
          <table:table-cell office:value-type="date" office:date-value="2025-10-28" calcext:value-type="date">
            <text:p>2025-10-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date" office:date-value="2025-10-29" calcext:value-type="date">
            <text:p>2025-10-29</text:p>
          </table:table-cell>
          <table:table-cell office:value-type="float" office:value="26.74" calcext:value-type="float">
            <text:p>26.74</text:p>
          </table:table-cell>
          <table:table-cell table:number-columns-repeated="4"/>
        </table:table-row>
        <table:table-row table:style-name="ro1">
          <table:table-cell office:value-type="date" office:date-value="2025-10-30" calcext:value-type="date">
            <text:p>2025-10-30</text:p>
          </table:table-cell>
          <table:table-cell office:value-type="float" office:value="26.68" calcext:value-type="float">
            <text:p>26.68</text:p>
          </table:table-cell>
          <table:table-cell table:number-columns-repeated="4"/>
        </table:table-row>
        <table:table-row table:style-name="ro1">
          <table:table-cell office:value-type="date" office:date-value="2025-10-31" calcext:value-type="date">
            <text:p>2025-10-31</text:p>
          </table:table-cell>
          <table:table-cell office:value-type="float" office:value="26.75" calcext:value-type="float">
            <text:p>26.75</text:p>
          </table:table-cell>
          <table:table-cell table:number-columns-repeated="4"/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float" office:value="26.75" calcext:value-type="float">
            <text:p>26.75</text:p>
          </table:table-cell>
          <table:table-cell table:number-columns-repeated="4"/>
        </table:table-row>
        <table:table-row table:style-name="ro1">
          <table:table-cell office:value-type="date" office:date-value="2025-11-02" calcext:value-type="date">
            <text:p>2025-11-02</text:p>
          </table:table-cell>
          <table:table-cell office:value-type="float" office:value="26.75" calcext:value-type="float">
            <text:p>26.75</text:p>
          </table:table-cell>
          <table:table-cell table:number-columns-repeated="4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26.47" calcext:value-type="float">
            <text:p>26.47</text:p>
          </table:table-cell>
          <table:table-cell table:number-columns-repeated="4"/>
        </table:table-row>
        <table:table-row table:style-name="ro1">
          <table:table-cell office:value-type="date" office:date-value="2025-11-04" calcext:value-type="date">
            <text:p>2025-11-04</text:p>
          </table:table-cell>
          <table:table-cell office:value-type="float" office:value="26.44" calcext:value-type="float">
            <text:p>26.44</text:p>
          </table:table-cell>
          <table:table-cell table:number-columns-repeated="4"/>
        </table:table-row>
        <table:table-row table:style-name="ro1">
          <table:table-cell office:value-type="date" office:date-value="2025-11-05" calcext:value-type="date">
            <text:p>2025-11-05</text:p>
          </table:table-cell>
          <table:table-cell office:value-type="float" office:value="26.57" calcext:value-type="float">
            <text:p>26.57</text:p>
          </table:table-cell>
          <table:table-cell table:number-columns-repeated="4"/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float" office:value="26.52" calcext:value-type="float">
            <text:p>26.52</text:p>
          </table:table-cell>
          <table:table-cell table:number-columns-repeated="4"/>
        </table:table-row>
        <table:table-row table:style-name="ro1">
          <table:table-cell office:value-type="date" office:date-value="2025-11-07" calcext:value-type="date">
            <text:p>2025-11-07</text:p>
          </table:table-cell>
          <table:table-cell office:value-type="float" office:value="26.72" calcext:value-type="float">
            <text:p>26.72</text:p>
          </table:table-cell>
          <table:table-cell table:number-columns-repeated="4"/>
        </table:table-row>
        <table:table-row table:style-name="ro1">
          <table:table-cell office:value-type="date" office:date-value="2025-11-08" calcext:value-type="date">
            <text:p>2025-11-08</text:p>
          </table:table-cell>
          <table:table-cell office:value-type="float" office:value="26.72" calcext:value-type="float">
            <text:p>26.72</text:p>
          </table:table-cell>
          <table:table-cell table:number-columns-repeated="4"/>
        </table:table-row>
        <table:table-row table:style-name="ro1">
          <table:table-cell office:value-type="date" office:date-value="2025-11-09" calcext:value-type="date">
            <text:p>2025-11-09</text:p>
          </table:table-cell>
          <table:table-cell office:value-type="float" office:value="26.72" calcext:value-type="float">
            <text:p>26.72</text:p>
          </table:table-cell>
          <table:table-cell table:number-columns-repeated="4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26.77" calcext:value-type="float">
            <text:p>26.77</text:p>
          </table:table-cell>
          <table:table-cell table:number-columns-repeated="4"/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float" office:value="27.18" calcext:value-type="float">
            <text:p>27.18</text:p>
          </table:table-cell>
          <table:table-cell table:number-columns-repeated="4"/>
        </table:table-row>
        <table:table-row table:style-name="ro1">
          <table:table-cell office:value-type="date" office:date-value="2025-11-12" calcext:value-type="date">
            <text:p>2025-11-12</text:p>
          </table:table-cell>
          <table:table-cell office:value-type="float" office:value="27.19" calcext:value-type="float">
            <text:p>27.19</text:p>
          </table:table-cell>
          <table:table-cell table:number-columns-repeated="4"/>
        </table:table-row>
        <table:table-row table:style-name="ro1">
          <table:table-cell office:value-type="date" office:date-value="2025-11-13" calcext:value-type="date">
            <text:p>2025-11-13</text:p>
          </table:table-cell>
          <table:table-cell office:value-type="float" office:value="27.22" calcext:value-type="float">
            <text:p>27.22</text:p>
          </table:table-cell>
          <table:table-cell table:number-columns-repeated="4"/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float" office:value="27.24" calcext:value-type="float">
            <text:p>27.24</text:p>
          </table:table-cell>
          <table:table-cell table:number-columns-repeated="4"/>
        </table:table-row>
        <table:table-row table:style-name="ro1">
          <table:table-cell office:value-type="date" office:date-value="2025-11-15" calcext:value-type="date">
            <text:p>2025-11-15</text:p>
          </table:table-cell>
          <table:table-cell office:value-type="float" office:value="27.24" calcext:value-type="float">
            <text:p>27.24</text:p>
          </table:table-cell>
          <table:table-cell table:number-columns-repeated="4"/>
        </table:table-row>
        <table:table-row table:style-name="ro1">
          <table:table-cell office:value-type="date" office:date-value="2025-11-16" calcext:value-type="date">
            <text:p>2025-11-16</text:p>
          </table:table-cell>
          <table:table-cell office:value-type="float" office:value="27.24" calcext:value-type="float">
            <text:p>27.24</text:p>
          </table:table-cell>
          <table:table-cell table:number-columns-repeated="4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float" office:value="27.16" calcext:value-type="float">
            <text:p>27.16</text:p>
          </table:table-cell>
          <table:table-cell table:number-columns-repeated="4"/>
        </table:table-row>
        <table:table-row table:style-name="ro1">
          <table:table-cell office:value-type="date" office:date-value="2025-11-19" calcext:value-type="date">
            <text:p>2025-11-19</text:p>
          </table:table-cell>
          <table:table-cell office:value-type="float" office:value="26.93" calcext:value-type="float">
            <text:p>26.93</text:p>
          </table:table-cell>
          <table:table-cell table:number-columns-repeated="4"/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float" office:value="26.62" calcext:value-type="float">
            <text:p>26.62</text:p>
          </table:table-cell>
          <table:table-cell table:number-columns-repeated="4"/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float" office:value="27.1" calcext:value-type="float">
            <text:p>27.1</text:p>
          </table:table-cell>
          <table:table-cell table:number-columns-repeated="4"/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float" office:value="27.1" calcext:value-type="float">
            <text:p>27.1</text:p>
          </table:table-cell>
          <table:table-cell table:number-columns-repeated="4"/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float" office:value="27.1" calcext:value-type="float">
            <text:p>27.1</text:p>
          </table:table-cell>
          <table:table-cell table:number-columns-repeated="4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26.95" calcext:value-type="float">
            <text:p>26.95</text:p>
          </table:table-cell>
          <table:table-cell table:number-columns-repeated="4"/>
        </table:table-row>
        <table:table-row table:style-name="ro1">
          <table:table-cell office:value-type="date" office:date-value="2025-11-25" calcext:value-type="date">
            <text:p>2025-11-25</text:p>
          </table:table-cell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 office:value-type="date" office:date-value="2025-11-26" calcext:value-type="date">
            <text:p>2025-11-26</text:p>
          </table:table-cell>
          <table:table-cell office:value-type="float" office:value="27.45" calcext:value-type="float">
            <text:p>27.45</text:p>
          </table:table-cell>
          <table:table-cell table:number-columns-repeated="4"/>
        </table:table-row>
        <table:table-row table:style-name="ro1">
          <table:table-cell office:value-type="date" office:date-value="2025-11-27" calcext:value-type="date">
            <text:p>2025-11-27</text:p>
          </table:table-cell>
          <table:table-cell office:value-type="float" office:value="27.45" calcext:value-type="float">
            <text:p>27.45</text:p>
          </table:table-cell>
          <table:table-cell table:number-columns-repeated="4"/>
        </table:table-row>
        <table:table-row table:style-name="ro1">
          <table:table-cell office:value-type="date" office:date-value="2025-11-28" calcext:value-type="date">
            <text:p>2025-11-28</text:p>
          </table:table-cell>
          <table:table-cell office:value-type="float" office:value="27.59" calcext:value-type="float">
            <text:p>27.59</text:p>
          </table:table-cell>
          <table:table-cell table:number-columns-repeated="4"/>
        </table:table-row>
        <table:table-row table:style-name="ro1">
          <table:table-cell office:value-type="date" office:date-value="2025-11-29" calcext:value-type="date">
            <text:p>2025-11-29</text:p>
          </table:table-cell>
          <table:table-cell office:value-type="float" office:value="27.59" calcext:value-type="float">
            <text:p>27.59</text:p>
          </table:table-cell>
          <table:table-cell table:number-columns-repeated="4"/>
        </table:table-row>
        <table:table-row table:style-name="ro1">
          <table:table-cell office:value-type="date" office:date-value="2025-11-30" calcext:value-type="date">
            <text:p>2025-11-30</text:p>
          </table:table-cell>
          <table:table-cell office:value-type="float" office:value="27.59" calcext:value-type="float">
            <text:p>27.59</text:p>
          </table:table-cell>
          <table:table-cell table:number-columns-repeated="4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27.53" calcext:value-type="float">
            <text:p>27.53</text:p>
          </table:table-cell>
          <table:table-cell table:number-columns-repeated="4"/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office:value-type="date" office:date-value="2025-12-03" calcext:value-type="date">
            <text:p>2025-12-03</text:p>
          </table:table-cell>
          <table:table-cell office:value-type="float" office:value="27.8" calcext:value-type="float">
            <text:p>27.8</text:p>
          </table:table-cell>
          <table:table-cell table:number-columns-repeated="4"/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float" office:value="27.75" calcext:value-type="float">
            <text:p>27.75</text:p>
          </table:table-cell>
          <table:table-cell table:number-columns-repeated="4"/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float" office:value="27.71" calcext:value-type="float">
            <text:p>27.71</text:p>
          </table:table-cell>
          <table:table-cell table:number-columns-repeated="4"/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float" office:value="27.71" calcext:value-type="float">
            <text:p>27.71</text:p>
          </table:table-cell>
          <table:table-cell table:number-columns-repeated="4"/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float" office:value="27.71" calcext:value-type="float">
            <text:p>27.71</text:p>
          </table:table-cell>
          <table:table-cell table:number-columns-repeated="4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27.58" calcext:value-type="float">
            <text:p>27.58</text:p>
          </table:table-cell>
          <table:table-cell table:number-columns-repeated="4"/>
        </table:table-row>
        <table:table-row table:style-name="ro1">
          <table:table-cell office:value-type="date" office:date-value="2025-12-09" calcext:value-type="date">
            <text:p>2025-12-09</text:p>
          </table:table-cell>
          <table:table-cell office:value-type="float" office:value="27.46" calcext:value-type="float">
            <text:p>27.46</text:p>
          </table:table-cell>
          <table:table-cell table:number-columns-repeated="4"/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float" office:value="27.57" calcext:value-type="float">
            <text:p>27.57</text:p>
          </table:table-cell>
          <table:table-cell table:number-columns-repeated="4"/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float" office:value="27.68" calcext:value-type="float">
            <text:p>27.68</text:p>
          </table:table-cell>
          <table:table-cell table:number-columns-repeated="4"/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float" office:value="27.68" calcext:value-type="float">
            <text:p>27.68</text:p>
          </table:table-cell>
          <table:table-cell table:number-columns-repeated="4"/>
        </table:table-row>
        <table:table-row table:style-name="ro1">
          <table:table-cell office:value-type="date" office:date-value="2025-12-13" calcext:value-type="date">
            <text:p>2025-12-13</text:p>
          </table:table-cell>
          <table:table-cell office:value-type="float" office:value="27.68" calcext:value-type="float">
            <text:p>27.68</text:p>
          </table:table-cell>
          <table:table-cell table:number-columns-repeated="4"/>
        </table:table-row>
        <table:table-row table:style-name="ro1">
          <table:table-cell office:value-type="date" office:date-value="2025-12-14" calcext:value-type="date">
            <text:p>2025-12-14</text:p>
          </table:table-cell>
          <table:table-cell office:value-type="float" office:value="27.68" calcext:value-type="float">
            <text:p>27.68</text:p>
          </table:table-cell>
          <table:table-cell table:number-columns-repeated="4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27.76" calcext:value-type="float">
            <text:p>27.76</text:p>
          </table:table-cell>
          <table:table-cell table:number-columns-repeated="4"/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float" office:value="27.47" calcext:value-type="float">
            <text:p>27.47</text:p>
          </table:table-cell>
          <table:table-cell table:number-columns-repeated="4"/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float" office:value="27.6" calcext:value-type="float">
            <text:p>27.6</text:p>
          </table:table-cell>
          <table:table-cell table:number-columns-repeated="4"/>
        </table:table-row>
        <table:table-row table:style-name="ro1">
          <table:table-cell office:value-type="date" office:date-value="2025-12-18" calcext:value-type="date">
            <text:p>2025-12-18</text:p>
          </table:table-cell>
          <table:table-cell office:value-type="float" office:value="27.48" calcext:value-type="float">
            <text:p>27.48</text:p>
          </table:table-cell>
          <table:table-cell table:number-columns-repeated="4"/>
        </table:table-row>
        <table:table-row table:style-name="ro1">
          <table:table-cell office:value-type="date" office:date-value="2025-12-19" calcext:value-type="date">
            <text:p>2025-12-19</text:p>
          </table:table-cell>
          <table:table-cell office:value-type="float" office:value="27.46" calcext:value-type="float">
            <text:p>27.46</text:p>
          </table:table-cell>
          <table:table-cell table:number-columns-repeated="4"/>
        </table:table-row>
        <table:table-row table:style-name="ro1">
          <table:table-cell office:value-type="date" office:date-value="2025-12-20" calcext:value-type="date">
            <text:p>2025-12-20</text:p>
          </table:table-cell>
          <table:table-cell office:value-type="float" office:value="27.46" calcext:value-type="float">
            <text:p>27.46</text:p>
          </table:table-cell>
          <table:table-cell table:number-columns-repeated="4"/>
        </table:table-row>
        <table:table-row table:style-name="ro1">
          <table:table-cell office:value-type="date" office:date-value="2025-12-21" calcext:value-type="date">
            <text:p>2025-12-21</text:p>
          </table:table-cell>
          <table:table-cell office:value-type="float" office:value="27.46" calcext:value-type="float">
            <text:p>27.46</text:p>
          </table:table-cell>
          <table:table-cell table:number-columns-repeated="4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27.62" calcext:value-type="float">
            <text:p>27.62</text:p>
          </table:table-cell>
          <table:table-cell table:number-columns-repeated="4"/>
        </table:table-row>
        <table:table-row table:style-name="ro1">
          <table:table-cell office:value-type="date" office:date-value="2025-12-23" calcext:value-type="date">
            <text:p>2025-12-23</text:p>
          </table:table-cell>
          <table:table-cell office:value-type="float" office:value="27.54" calcext:value-type="float">
            <text:p>27.54</text:p>
          </table:table-cell>
          <table:table-cell table:number-columns-repeated="4"/>
        </table:table-row>
        <table:table-row table:style-name="ro1">
          <table:table-cell office:value-type="date" office:date-value="2025-12-24" calcext:value-type="date">
            <text:p>2025-12-24</text:p>
          </table:table-cell>
          <table:table-cell office:value-type="float" office:value="27.66" calcext:value-type="float">
            <text:p>27.66</text:p>
          </table:table-cell>
          <table:table-cell table:number-columns-repeated="4"/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float" office:value="27.66" calcext:value-type="float">
            <text:p>27.66</text:p>
          </table:table-cell>
          <table:table-cell table:number-columns-repeated="4"/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12-27" calcext:value-type="date">
            <text:p>2025-12-27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12-28" calcext:value-type="date">
            <text:p>2025-12-28</text:p>
          </table:table-cell>
          <table:table-cell office:value-type="float" office:value="27.64" calcext:value-type="float">
            <text:p>27.64</text:p>
          </table:table-cell>
          <table:table-cell table:number-columns-repeated="4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27.62" calcext:value-type="float">
            <text:p>27.62</text:p>
          </table:table-cell>
          <table:table-cell table:number-columns-repeated="4"/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27.63" calcext:value-type="float">
            <text:p>27.63</text:p>
          </table:table-cell>
          <table:table-cell table:number-columns-repeated="4"/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27.43" calcext:value-type="float">
            <text:p>27.43</text:p>
          </table:table-cell>
          <table:table-cell table:number-columns-repeated="4"/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27.43" calcext:value-type="float">
            <text:p>27.43</text:p>
          </table:table-cell>
          <table:table-cell table:number-columns-repeated="4"/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27.73" calcext:value-type="float">
            <text:p>27.73</text:p>
          </table:table-cell>
          <table:table-cell table:number-columns-repeated="4"/>
        </table:table-row>
        <table:table-row table:style-name="ro1">
          <table:table-cell office:value-type="date" office:date-value="2026-01-03" calcext:value-type="date">
            <text:p>2026-01-03</text:p>
          </table:table-cell>
          <table:table-cell office:value-type="float" office:value="27.73" calcext:value-type="float">
            <text:p>27.73</text:p>
          </table:table-cell>
          <table:table-cell table:number-columns-repeated="4"/>
        </table:table-row>
        <table:table-row table:style-name="ro1">
          <table:table-cell office:value-type="date" office:date-value="2026-01-04" calcext:value-type="date">
            <text:p>2026-01-04</text:p>
          </table:table-cell>
          <table:table-cell office:value-type="float" office:value="27.73" calcext:value-type="float">
            <text:p>27.73</text:p>
          </table:table-cell>
          <table:table-cell table:number-columns-repeated="4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27.91" calcext:value-type="float">
            <text:p>27.91</text:p>
          </table:table-cell>
          <table:table-cell table:number-columns-repeated="4"/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28.09" calcext:value-type="float">
            <text:p>28.09</text:p>
          </table:table-cell>
          <table:table-cell table:number-columns-repeated="4"/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27.9" calcext:value-type="float">
            <text:p>27.9</text:p>
          </table:table-cell>
          <table:table-cell table:number-columns-repeated="4"/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28.42" calcext:value-type="float">
            <text:p>28.42</text:p>
          </table:table-cell>
          <table:table-cell table:number-columns-repeated="4"/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28.55" calcext:value-type="float">
            <text:p>28.55</text:p>
          </table:table-cell>
          <table:table-cell table:number-columns-repeated="4"/>
        </table:table-row>
        <table:table-row table:style-name="ro1">
          <table:table-cell office:value-type="date" office:date-value="2026-01-10" calcext:value-type="date">
            <text:p>2026-01-10</text:p>
          </table:table-cell>
          <table:table-cell office:value-type="float" office:value="28.55" calcext:value-type="float">
            <text:p>28.55</text:p>
          </table:table-cell>
          <table:table-cell table:number-columns-repeated="4"/>
        </table:table-row>
        <table:table-row table:style-name="ro1">
          <table:table-cell office:value-type="date" office:date-value="2026-01-11" calcext:value-type="date">
            <text:p>2026-01-11</text:p>
          </table:table-cell>
          <table:table-cell office:value-type="float" office:value="28.55" calcext:value-type="float">
            <text:p>28.55</text:p>
          </table:table-cell>
          <table:table-cell table:number-columns-repeated="4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28.5" calcext:value-type="float">
            <text:p>28.5</text:p>
          </table:table-cell>
          <table:table-cell table:number-columns-repeated="4"/>
        </table:table-row>
        <table:table-row table:style-name="ro1">
          <table:table-cell office:value-type="date" office:date-value="2026-01-13" calcext:value-type="date">
            <text:p>2026-01-13</text:p>
          </table:table-cell>
          <table:table-cell office:value-type="float" office:value="28.62" calcext:value-type="float">
            <text:p>28.62</text:p>
          </table:table-cell>
          <table:table-cell table:number-columns-repeated="4"/>
        </table:table-row>
        <table:table-row table:style-name="ro1">
          <table:table-cell office:value-type="date" office:date-value="2026-01-14" calcext:value-type="date">
            <text:p>2026-01-14</text:p>
          </table:table-cell>
          <table:table-cell office:value-type="float" office:value="29.04" calcext:value-type="float">
            <text:p>29.04</text:p>
          </table:table-cell>
          <table:table-cell table:number-columns-repeated="4"/>
        </table:table-row>
        <table:table-row table:style-name="ro1">
          <table:table-cell office:value-type="date" office:date-value="2026-01-15" calcext:value-type="date">
            <text:p>2026-01-15</text:p>
          </table:table-cell>
          <table:table-cell office:value-type="float" office:value="29.03" calcext:value-type="float">
            <text:p>29.03</text:p>
          </table:table-cell>
          <table:table-cell table:number-columns-repeated="4"/>
        </table:table-row>
        <table:table-row table:style-name="ro1">
          <table:table-cell office:value-type="date" office:date-value="2026-01-16" calcext:value-type="date">
            <text:p>2026-01-16</text:p>
          </table:table-cell>
          <table:table-cell office:value-type="float" office:value="28.9" calcext:value-type="float">
            <text:p>28.9</text:p>
          </table:table-cell>
          <table:table-cell table:number-columns-repeated="4"/>
        </table:table-row>
        <table:table-row table:style-name="ro1">
          <table:table-cell office:value-type="date" office:date-value="2026-01-17" calcext:value-type="date">
            <text:p>2026-01-17</text:p>
          </table:table-cell>
          <table:table-cell office:value-type="float" office:value="28.9" calcext:value-type="float">
            <text:p>28.9</text:p>
          </table:table-cell>
          <table:table-cell table:number-columns-repeated="4"/>
        </table:table-row>
        <table:table-row table:style-name="ro1">
          <table:table-cell office:value-type="date" office:date-value="2026-01-18" calcext:value-type="date">
            <text:p>2026-01-18</text:p>
          </table:table-cell>
          <table:table-cell office:value-type="float" office:value="28.9" calcext:value-type="float">
            <text:p>28.9</text:p>
          </table:table-cell>
          <table:table-cell table:number-columns-repeated="4"/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28.9" calcext:value-type="float">
            <text:p>28.9</text:p>
          </table:table-cell>
          <table:table-cell table:number-columns-repeated="4"/>
        </table:table-row>
        <table:table-row table:style-name="ro1">
          <table:table-cell office:value-type="date" office:date-value="2026-01-20" calcext:value-type="date">
            <text:p>2026-01-20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office:value-type="date" office:date-value="2026-01-21" calcext:value-type="date">
            <text:p>2026-01-21</text:p>
          </table:table-cell>
          <table:table-cell office:value-type="float" office:value="29.15" calcext:value-type="float">
            <text:p>29.15</text:p>
          </table:table-cell>
          <table:table-cell table:number-columns-repeated="4"/>
        </table:table-row>
        <table:table-row table:style-name="ro1">
          <table:table-cell office:value-type="date" office:date-value="2026-01-22" calcext:value-type="date">
            <text:p>2026-01-22</text:p>
          </table:table-cell>
          <table:table-cell office:value-type="float" office:value="29.17" calcext:value-type="float">
            <text:p>29.17</text:p>
          </table:table-cell>
          <table:table-cell table:number-columns-repeated="4"/>
        </table:table-row>
        <table:table-row table:style-name="ro1">
          <table:table-cell office:value-type="date" office:date-value="2026-01-23" calcext:value-type="date">
            <text:p>2026-01-23</text:p>
          </table:table-cell>
          <table:table-cell office:value-type="float" office:value="29.14" calcext:value-type="float">
            <text:p>29.14</text:p>
          </table:table-cell>
          <table:table-cell table:number-columns-repeated="4"/>
        </table:table-row>
        <table:table-row table:style-name="ro1">
          <table:table-cell office:value-type="date" office:date-value="2026-01-24" calcext:value-type="date">
            <text:p>2026-01-24</text:p>
          </table:table-cell>
          <table:table-cell office:value-type="float" office:value="29.14" calcext:value-type="float">
            <text:p>29.14</text:p>
          </table:table-cell>
          <table:table-cell table:number-columns-repeated="4"/>
        </table:table-row>
        <table:table-row table:style-name="ro1">
          <table:table-cell office:value-type="date" office:date-value="2026-01-25" calcext:value-type="date">
            <text:p>2026-01-25</text:p>
          </table:table-cell>
          <table:table-cell office:value-type="float" office:value="29.14" calcext:value-type="float">
            <text:p>29.14</text:p>
          </table:table-cell>
          <table:table-cell table:number-columns-repeated="4"/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float" office:value="29.18" calcext:value-type="float">
            <text:p>29.18</text:p>
          </table:table-cell>
          <table:table-cell table:number-columns-repeated="4"/>
        </table:table-row>
        <table:table-row table:style-name="ro1">
          <table:table-cell office:value-type="date" office:date-value="2026-01-27" calcext:value-type="date">
            <text:p>2026-01-27</text:p>
          </table:table-cell>
          <table:table-cell office:value-type="float" office:value="29.37" calcext:value-type="float">
            <text:p>29.37</text:p>
          </table:table-cell>
          <table:table-cell table:number-columns-repeated="4"/>
        </table:table-row>
        <table:table-row table:style-name="ro1">
          <table:table-cell office:value-type="date" office:date-value="2026-01-28" calcext:value-type="date">
            <text:p>2026-01-28</text:p>
          </table:table-cell>
          <table:table-cell office:value-type="float" office:value="29.3" calcext:value-type="float">
            <text:p>29.3</text:p>
          </table:table-cell>
          <table:table-cell table:number-columns-repeated="4"/>
        </table:table-row>
        <table:table-row table:style-name="ro1">
          <table:table-cell office:value-type="date" office:date-value="2026-01-29" calcext:value-type="date">
            <text:p>2026-01-29</text:p>
          </table:table-cell>
          <table:table-cell office:value-type="float" office:value="29.37" calcext:value-type="float">
            <text:p>29.37</text:p>
          </table:table-cell>
          <table:table-cell table:number-columns-repeated="4"/>
        </table:table-row>
        <table:table-row table:style-name="ro1">
          <table:table-cell office:value-type="date" office:date-value="2026-01-30" calcext:value-type="date">
            <text:p>2026-01-30</text:p>
          </table:table-cell>
          <table:table-cell office:value-type="float" office:value="29.82" calcext:value-type="float">
            <text:p>29.82</text:p>
          </table:table-cell>
          <table:table-cell table:number-columns-repeated="4"/>
        </table:table-row>
        <table:table-row table:style-name="ro1">
          <table:table-cell office:value-type="date" office:date-value="2026-01-31" calcext:value-type="date">
            <text:p>2026-01-31</text:p>
          </table:table-cell>
          <table:table-cell office:value-type="float" office:value="29.82" calcext:value-type="float">
            <text:p>29.82</text:p>
          </table:table-cell>
          <table:table-cell table:number-columns-repeated="4"/>
        </table:table-row>
        <table:table-row table:style-name="ro1">
          <table:table-cell office:value-type="date" office:date-value="2026-02-01" calcext:value-type="date">
            <text:p>2026-02-01</text:p>
          </table:table-cell>
          <table:table-cell office:value-type="float" office:value="29.82" calcext:value-type="float">
            <text:p>29.82</text:p>
          </table:table-cell>
          <table:table-cell table:number-columns-repeated="4"/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6-02-03" calcext:value-type="date">
            <text:p>2026-02-03</text:p>
          </table:table-cell>
          <table:table-cell office:value-type="float" office:value="30.5" calcext:value-type="float">
            <text:p>30.5</text:p>
          </table:table-cell>
          <table:table-cell table:number-columns-repeated="4"/>
        </table:table-row>
        <table:table-row table:style-name="ro1">
          <table:table-cell office:value-type="date" office:date-value="2026-02-04" calcext:value-type="date">
            <text:p>2026-02-04</text:p>
          </table:table-cell>
          <table:table-cell office:value-type="float" office:value="31.01" calcext:value-type="float">
            <text:p>31.01</text:p>
          </table:table-cell>
          <table:table-cell table:number-columns-repeated="4"/>
        </table:table-row>
        <table:table-row table:style-name="ro1">
          <table:table-cell office:value-type="date" office:date-value="2026-02-05" calcext:value-type="date">
            <text:p>2026-02-05</text:p>
          </table:table-cell>
          <table:table-cell office:value-type="float" office:value="30.97" calcext:value-type="float">
            <text:p>30.97</text:p>
          </table:table-cell>
          <table:table-cell table:number-columns-repeated="4"/>
        </table:table-row>
        <table:table-row table:style-name="ro1">
          <table:table-cell office:value-type="date" office:date-value="2026-02-06" calcext:value-type="date">
            <text:p>2026-02-06</text:p>
          </table:table-cell>
          <table:table-cell office:value-type="float" office:value="31.47" calcext:value-type="float">
            <text:p>31.47</text:p>
          </table:table-cell>
          <table:table-cell table:number-columns-repeated="4"/>
        </table:table-row>
        <table:table-row table:style-name="ro1">
          <table:table-cell office:value-type="date" office:date-value="2026-02-07" calcext:value-type="date">
            <text:p>2026-02-07</text:p>
          </table:table-cell>
          <table:table-cell office:value-type="float" office:value="31.47" calcext:value-type="float">
            <text:p>31.47</text:p>
          </table:table-cell>
          <table:table-cell table:number-columns-repeated="4"/>
        </table:table-row>
        <table:table-row table:style-name="ro1">
          <table:table-cell office:value-type="date" office:date-value="2026-02-08" calcext:value-type="date">
            <text:p>2026-02-08</text:p>
          </table:table-cell>
          <table:table-cell office:value-type="float" office:value="31.47" calcext:value-type="float">
            <text:p>31.47</text:p>
          </table:table-cell>
          <table:table-cell table:number-columns-repeated="4"/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office:value-type="float" office:value="31.35" calcext:value-type="float">
            <text:p>31.35</text:p>
          </table:table-cell>
          <table:table-cell table:number-columns-repeated="4"/>
        </table:table-row>
        <table:table-row table:style-name="ro1">
          <table:table-cell office:value-type="date" office:date-value="2026-02-10" calcext:value-type="date">
            <text:p>2026-02-10</text:p>
          </table:table-cell>
          <table:table-cell office:value-type="float" office:value="31.3" calcext:value-type="float">
            <text:p>31.3</text:p>
          </table:table-cell>
          <table:table-cell table:number-columns-repeated="4"/>
        </table:table-row>
        <table:table-row table:style-name="ro1">
          <table:table-cell office:value-type="date" office:date-value="2026-02-11" calcext:value-type="date">
            <text:p>2026-02-11</text:p>
          </table:table-cell>
          <table:table-cell office:value-type="float" office:value="31.64" calcext:value-type="float">
            <text:p>31.64</text:p>
          </table:table-cell>
          <table:table-cell table:number-columns-repeated="4"/>
        </table:table-row>
        <table:table-row table:style-name="ro1">
          <table:table-cell office:value-type="date" office:date-value="2026-02-12" calcext:value-type="date">
            <text:p>2026-02-12</text:p>
          </table:table-cell>
          <table:table-cell office:value-type="float" office:value="31.34" calcext:value-type="float">
            <text:p>31.34</text:p>
          </table:table-cell>
          <table:table-cell table:number-columns-repeated="4"/>
        </table:table-row>
        <table:table-row table:style-name="ro1">
          <table:table-cell office:value-type="date" office:date-value="2026-02-13" calcext:value-type="date">
            <text:p>2026-02-13</text:p>
          </table:table-cell>
          <table:table-cell office:value-type="float" office:value="31.61" calcext:value-type="float">
            <text:p>31.61</text:p>
          </table:table-cell>
          <table:table-cell table:number-columns-repeated="4"/>
        </table:table-row>
        <table:table-row table:style-name="ro1">
          <table:table-cell office:value-type="date" office:date-value="2026-02-14" calcext:value-type="date">
            <text:p>2026-02-14</text:p>
          </table:table-cell>
          <table:table-cell office:value-type="float" office:value="31.61" calcext:value-type="float">
            <text:p>31.61</text:p>
          </table:table-cell>
          <table:table-cell table:number-columns-repeated="4"/>
        </table:table-row>
        <table:table-row table:style-name="ro1">
          <table:table-cell office:value-type="date" office:date-value="2026-02-15" calcext:value-type="date">
            <text:p>2026-02-15</text:p>
          </table:table-cell>
          <table:table-cell office:value-type="float" office:value="31.61" calcext:value-type="float">
            <text:p>31.61</text:p>
          </table:table-cell>
          <table:table-cell table:number-columns-repeated="4"/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float" office:value="31.61" calcext:value-type="float">
            <text:p>31.61</text:p>
          </table:table-cell>
          <table:table-cell table:number-columns-repeated="4"/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float" office:value="31.42" calcext:value-type="float">
            <text:p>31.42</text:p>
          </table:table-cell>
          <table:table-cell table:number-columns-repeated="4"/>
        </table:table-row>
        <table:table-row table:style-name="ro1">
          <table:table-cell office:value-type="date" office:date-value="2026-02-18" calcext:value-type="date">
            <text:p>2026-02-18</text:p>
          </table:table-cell>
          <table:table-cell office:value-type="float" office:value="31.56" calcext:value-type="float">
            <text:p>31.56</text:p>
          </table:table-cell>
          <table:table-cell table:number-columns-repeated="4"/>
        </table:table-row>
        <table:table-row table:style-name="ro1">
          <table:table-cell office:value-type="date" office:date-value="2026-02-19" calcext:value-type="date">
            <text:p>2026-02-19</text:p>
          </table:table-cell>
          <table:table-cell office:value-type="float" office:value="31.57" calcext:value-type="float">
            <text:p>31.57</text:p>
          </table:table-cell>
          <table:table-cell table:number-columns-repeated="4"/>
        </table:table-row>
        <table:table-row table:style-name="ro1">
          <table:table-cell office:value-type="date" office:date-value="2026-02-20" calcext:value-type="date">
            <text:p>2026-02-20</text:p>
          </table:table-cell>
          <table:table-cell office:value-type="float" office:value="31.61" calcext:value-type="float">
            <text:p>31.61</text:p>
          </table:table-cell>
          <table:table-cell table:number-columns-repeated="4"/>
        </table:table-row>
        <table:table-row table:style-name="ro1">
          <table:table-cell office:value-type="date" office:date-value="2026-02-21" calcext:value-type="date">
            <text:p>2026-02-21</text:p>
          </table:table-cell>
          <table:table-cell office:value-type="float" office:value="31.61" calcext:value-type="float">
            <text:p>31.61</text:p>
          </table:table-cell>
          <table:table-cell table:number-columns-repeated="4"/>
        </table:table-row>
        <table:table-row table:style-name="ro1">
          <table:table-cell office:value-type="date" office:date-value="2026-02-22" calcext:value-type="date">
            <text:p>2026-02-22</text:p>
          </table:table-cell>
          <table:table-cell office:value-type="float" office:value="31.61" calcext:value-type="float">
            <text:p>31.61</text:p>
          </table:table-cell>
          <table:table-cell table:number-columns-repeated="4"/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office:value-type="float" office:value="31.53" calcext:value-type="float">
            <text:p>31.53</text:p>
          </table:table-cell>
          <table:table-cell table:number-columns-repeated="4"/>
        </table:table-row>
        <table:table-row table:style-name="ro1">
          <table:table-cell office:value-type="date" office:date-value="2026-02-24" calcext:value-type="date">
            <text:p>2026-02-24</text:p>
          </table:table-cell>
          <table:table-cell office:value-type="float" office:value="31.64" calcext:value-type="float">
            <text:p>31.64</text:p>
          </table:table-cell>
          <table:table-cell table:number-columns-repeated="4"/>
        </table:table-row>
        <table:table-row table:style-name="ro1">
          <table:table-cell office:value-type="date" office:date-value="2026-02-25" calcext:value-type="date">
            <text:p>2026-02-25</text:p>
          </table:table-cell>
          <table:table-cell office:value-type="float" office:value="31.51" calcext:value-type="float">
            <text:p>31.51</text:p>
          </table:table-cell>
          <table:table-cell table:number-columns-repeated="4"/>
        </table:table-row>
        <table:table-row table:style-name="ro1">
          <table:table-cell office:value-type="date" office:date-value="2026-02-26" calcext:value-type="date">
            <text:p>2026-02-26</text:p>
          </table:table-cell>
          <table:table-cell office:value-type="float" office:value="31.51" calcext:value-type="float">
            <text:p>31.51</text:p>
          </table:table-cell>
          <table:table-cell table:number-columns-repeated="4"/>
        </table:table-row>
        <table:table-row table:style-name="ro1">
          <table:table-cell office:value-type="date" office:date-value="2026-02-27" calcext:value-type="date">
            <text:p>2026-02-27</text:p>
          </table:table-cell>
          <table:table-cell office:value-type="float" office:value="31.77" calcext:value-type="float">
            <text:p>31.77</text:p>
          </table:table-cell>
          <table:table-cell table:number-columns-repeated="4"/>
        </table:table-row>
        <table:table-row table:style-name="ro1">
          <table:table-cell office:value-type="date" office:date-value="2026-02-28" calcext:value-type="date">
            <text:p>2026-02-28</text:p>
          </table:table-cell>
          <table:table-cell office:value-type="float" office:value="31.77" calcext:value-type="float">
            <text:p>31.77</text:p>
          </table:table-cell>
          <table:table-cell table:number-columns-repeated="4"/>
        </table:table-row>
        <table:table-row table:style-name="ro1">
          <table:table-cell office:value-type="date" office:date-value="2026-03-01" calcext:value-type="date">
            <text:p>2026-03-01</text:p>
          </table:table-cell>
          <table:table-cell office:value-type="float" office:value="31.77" calcext:value-type="float">
            <text:p>31.77</text:p>
          </table:table-cell>
          <table:table-cell table:number-columns-repeated="4"/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float" office:value="31.86" calcext:value-type="float">
            <text:p>31.86</text:p>
          </table:table-cell>
          <table:table-cell table:number-columns-repeated="4"/>
        </table:table-row>
        <table:table-row table:style-name="ro1">
          <table:table-cell office:value-type="date" office:date-value="2026-03-03" calcext:value-type="date">
            <text:p>2026-03-03</text:p>
          </table:table-cell>
          <table:table-cell office:value-type="float" office:value="31.59" calcext:value-type="float">
            <text:p>31.59</text:p>
          </table:table-cell>
          <table:table-cell table:number-columns-repeated="4"/>
        </table:table-row>
        <table:table-row table:style-name="ro1">
          <table:table-cell office:value-type="date" office:date-value="2026-03-04" calcext:value-type="date">
            <text:p>2026-03-04</text:p>
          </table:table-cell>
          <table:table-cell office:value-type="float" office:value="31.54" calcext:value-type="float">
            <text:p>31.54</text:p>
          </table:table-cell>
          <table:table-cell table:number-columns-repeated="4"/>
        </table:table-row>
        <table:table-row table:style-name="ro1">
          <table:table-cell office:value-type="date" office:date-value="2026-03-05" calcext:value-type="date">
            <text:p>2026-03-05</text:p>
          </table:table-cell>
          <table:table-cell office:value-type="float" office:value="31.26" calcext:value-type="float">
            <text:p>31.26</text:p>
          </table:table-cell>
          <table:table-cell table:number-columns-repeated="4"/>
        </table:table-row>
        <table:table-row table:style-name="ro1">
          <table:table-cell office:value-type="date" office:date-value="2026-03-06" calcext:value-type="date">
            <text:p>2026-03-06</text:p>
          </table:table-cell>
          <table:table-cell office:value-type="float" office:value="31.13" calcext:value-type="float">
            <text:p>31.13</text:p>
          </table:table-cell>
          <table:table-cell table:number-columns-repeated="4"/>
        </table:table-row>
        <table:table-row table:style-name="ro1">
          <table:table-cell office:value-type="date" office:date-value="2026-03-07" calcext:value-type="date">
            <text:p>2026-03-07</text:p>
          </table:table-cell>
          <table:table-cell office:value-type="float" office:value="31.13" calcext:value-type="float">
            <text:p>31.13</text:p>
          </table:table-cell>
          <table:table-cell table:number-columns-repeated="4"/>
        </table:table-row>
        <table:table-row table:style-name="ro1">
          <table:table-cell office:value-type="date" office:date-value="2026-03-08" calcext:value-type="date">
            <text:p>2026-03-08</text:p>
          </table:table-cell>
          <table:table-cell office:value-type="float" office:value="31.13" calcext:value-type="float">
            <text:p>31.13</text:p>
          </table:table-cell>
          <table:table-cell table:number-columns-repeated="4"/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office:value-type="float" office:value="31.02" calcext:value-type="float">
            <text:p>31.02</text:p>
          </table:table-cell>
          <table:table-cell table:number-columns-repeated="4"/>
        </table:table-row>
        <table:table-row table:style-name="ro1">
          <table:table-cell office:value-type="date" office:date-value="2026-03-10" calcext:value-type="date">
            <text:p>2026-03-10</text:p>
          </table:table-cell>
          <table:table-cell office:value-type="float" office:value="30.9" calcext:value-type="float">
            <text:p>30.9</text:p>
          </table:table-cell>
          <table:table-cell table:number-columns-repeated="4"/>
        </table:table-row>
        <table:table-row table:style-name="ro1">
          <table:table-cell office:value-type="date" office:date-value="2026-03-11" calcext:value-type="date">
            <text:p>2026-03-1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date" office:date-value="2026-03-12" calcext:value-type="date">
            <text:p>2026-03-12</text:p>
          </table:table-cell>
          <table:table-cell office:value-type="float" office:value="30.82" calcext:value-type="float">
            <text:p>30.82</text:p>
          </table:table-cell>
          <table:table-cell table:number-columns-repeated="4"/>
        </table:table-row>
        <table:table-row table:style-name="ro1">
          <table:table-cell office:value-type="date" office:date-value="2026-03-13" calcext:value-type="date">
            <text:p>2026-03-13</text:p>
          </table:table-cell>
          <table:table-cell office:value-type="float" office:value="30.8" calcext:value-type="float">
            <text:p>30.8</text:p>
          </table:table-cell>
          <table:table-cell table:number-columns-repeated="4"/>
        </table:table-row>
        <table:table-row table:style-name="ro1">
          <table:table-cell office:value-type="date" office:date-value="2026-03-14" calcext:value-type="date">
            <text:p>2026-03-14</text:p>
          </table:table-cell>
          <table:table-cell office:value-type="float" office:value="30.8" calcext:value-type="float">
            <text:p>30.8</text:p>
          </table:table-cell>
          <table:table-cell table:number-columns-repeated="4"/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float" office:value="30.8" calcext:value-type="float">
            <text:p>30.8</text:p>
          </table:table-cell>
          <table:table-cell table:number-columns-repeated="4"/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office:value-type="float" office:value="30.87" calcext:value-type="float">
            <text:p>30.87</text:p>
          </table:table-cell>
          <table:table-cell table:number-columns-repeated="4"/>
        </table:table-row>
        <table:table-row table:style-name="ro1">
          <table:table-cell office:value-type="date" office:date-value="2026-03-17" calcext:value-type="date">
            <text:p>2026-03-17</text:p>
          </table:table-cell>
          <table:table-cell office:value-type="float" office:value="30.95" calcext:value-type="float">
            <text:p>30.95</text:p>
          </table:table-cell>
          <table:table-cell table:number-columns-repeated="4"/>
        </table:table-row>
        <table:table-row table:style-name="ro1">
          <table:table-cell office:value-type="date" office:date-value="2026-03-18" calcext:value-type="date">
            <text:p>2026-03-18</text:p>
          </table:table-cell>
          <table:table-cell office:value-type="float" office:value="30.58" calcext:value-type="float">
            <text:p>30.58</text:p>
          </table:table-cell>
          <table:table-cell table:number-columns-repeated="4"/>
        </table:table-row>
        <table:table-row table:style-name="ro1">
          <table:table-cell office:value-type="date" office:date-value="2026-03-19" calcext:value-type="date">
            <text:p>2026-03-19</text:p>
          </table:table-cell>
          <table:table-cell office:value-type="float" office:value="30.59" calcext:value-type="float">
            <text:p>30.59</text:p>
          </table:table-cell>
          <table:table-cell table:number-columns-repeated="4"/>
        </table:table-row>
        <table:table-row table:style-name="ro1">
          <table:table-cell office:value-type="date" office:date-value="2026-03-20" calcext:value-type="date">
            <text:p>2026-03-20</text:p>
          </table:table-cell>
          <table:table-cell office:value-type="float" office:value="30.39" calcext:value-type="float">
            <text:p>30.39</text:p>
          </table:table-cell>
          <table:table-cell table:number-columns-repeated="4"/>
        </table:table-row>
        <table:table-row table:style-name="ro1">
          <table:table-cell office:value-type="date" office:date-value="2026-03-21" calcext:value-type="date">
            <text:p>2026-03-21</text:p>
          </table:table-cell>
          <table:table-cell office:value-type="float" office:value="30.39" calcext:value-type="float">
            <text:p>30.39</text:p>
          </table:table-cell>
          <table:table-cell table:number-columns-repeated="4"/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float" office:value="30.39" calcext:value-type="float">
            <text:p>30.39</text:p>
          </table:table-cell>
          <table:table-cell table:number-columns-repeated="4"/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office:value-type="float" office:value="30.54" calcext:value-type="float">
            <text:p>30.54</text:p>
          </table:table-cell>
          <table:table-cell table:number-columns-repeated="4"/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float" office:value="30.64" calcext:value-type="float">
            <text:p>30.64</text:p>
          </table:table-cell>
          <table:table-cell table:number-columns-repeated="4"/>
        </table:table-row>
        <table:table-row table:style-name="ro1">
          <table:table-cell office:value-type="date" office:date-value="2026-03-25" calcext:value-type="date">
            <text:p>2026-03-25</text:p>
          </table:table-cell>
          <table:table-cell office:value-type="float" office:value="30.54" calcext:value-type="float">
            <text:p>30.54</text:p>
          </table:table-cell>
          <table:table-cell table:number-columns-repeated="4"/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float" office:value="30.62" calcext:value-type="float">
            <text:p>30.62</text:p>
          </table:table-cell>
          <table:table-cell table:number-columns-repeated="4"/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office:value-type="float" office:value="30.44" calcext:value-type="float">
            <text:p>30.44</text:p>
          </table:table-cell>
          <table:table-cell table:number-columns-repeated="4"/>
        </table:table-row>
        <table:table-row table:style-name="ro1">
          <table:table-cell office:value-type="date" office:date-value="2026-03-28" calcext:value-type="date">
            <text:p>2026-03-28</text:p>
          </table:table-cell>
          <table:table-cell office:value-type="float" office:value="30.44" calcext:value-type="float">
            <text:p>30.44</text:p>
          </table:table-cell>
          <table:table-cell table:number-columns-repeated="4"/>
        </table:table-row>
        <table:table-row table:style-name="ro1">
          <table:table-cell office:value-type="date" office:date-value="2026-03-29" calcext:value-type="date">
            <text:p>2026-03-29</text:p>
          </table:table-cell>
          <table:table-cell office:value-type="float" office:value="30.44" calcext:value-type="float">
            <text:p>30.44</text:p>
          </table:table-cell>
          <table:table-cell table:number-columns-repeated="4"/>
        </table:table-row>
        <table:table-row table:style-name="ro1">
          <table:table-cell office:value-type="date" office:date-value="2026-03-30" calcext:value-type="date">
            <text:p>2026-03-30</text:p>
          </table:table-cell>
          <table:table-cell office:value-type="float" office:value="30.48" calcext:value-type="float">
            <text:p>30.48</text:p>
          </table:table-cell>
          <table:table-cell table:number-columns-repeated="4"/>
        </table:table-row>
        <table:table-row table:style-name="ro1">
          <table:table-cell office:value-type="date" office:date-value="2026-03-31" calcext:value-type="date">
            <text:p>2026-03-31</text:p>
          </table:table-cell>
          <table:table-cell office:value-type="float" office:value="30.68" calcext:value-type="float">
            <text:p>30.68</text:p>
          </table:table-cell>
          <table:table-cell table:number-columns-repeated="4"/>
        </table:table-row>
        <table:table-row table:style-name="ro1">
          <table:table-cell office:value-type="date" office:date-value="2026-04-01" calcext:value-type="date">
            <text:p>2026-04-01</text:p>
          </table:table-cell>
          <table:table-cell office:value-type="float" office:value="30.51" calcext:value-type="float">
            <text:p>30.51</text:p>
          </table:table-cell>
          <table:table-cell table:number-columns-repeated="4"/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05" calcext:value-type="date">
            <text:p>2026-04-05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office:value-type="float" office:value="30.64" calcext:value-type="float">
            <text:p>30.64</text:p>
          </table:table-cell>
          <table:table-cell table:number-columns-repeated="4"/>
        </table:table-row>
        <table:table-row table:style-name="ro1">
          <table:table-cell office:value-type="date" office:date-value="2026-04-07" calcext:value-type="date">
            <text:p>2026-04-07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float" office:value="30.86" calcext:value-type="float">
            <text:p>30.86</text:p>
          </table:table-cell>
          <table:table-cell table:number-columns-repeated="4"/>
        </table:table-row>
        <table:table-row table:style-name="ro1">
          <table:table-cell office:value-type="date" office:date-value="2026-04-09" calcext:value-type="date">
            <text:p>2026-04-09</text:p>
          </table:table-cell>
          <table:table-cell office:value-type="float" office:value="30.94" calcext:value-type="float">
            <text:p>30.94</text:p>
          </table:table-cell>
          <table:table-cell table:number-columns-repeated="4"/>
        </table:table-row>
        <table:table-row table:style-name="ro1">
          <table:table-cell office:value-type="date" office:date-value="2026-04-10" calcext:value-type="date">
            <text:p>2026-04-10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11" calcext:value-type="date">
            <text:p>2026-04-11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float" office:value="30.56" calcext:value-type="float">
            <text:p>30.56</text:p>
          </table:table-cell>
          <table:table-cell table:number-columns-repeated="4"/>
        </table:table-row>
        <table:table-row table:style-name="ro1">
          <table:table-cell office:value-type="date" office:date-value="2026-04-13" calcext:value-type="date">
            <text:p>2026-04-13</text:p>
          </table:table-cell>
          <table:table-cell office:value-type="float" office:value="30.74" calcext:value-type="float">
            <text:p>30.74</text:p>
          </table:table-cell>
          <table:table-cell table:number-columns-repeated="4"/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float" office:value="30.71" calcext:value-type="float">
            <text:p>30.71</text:p>
          </table:table-cell>
          <table:table-cell table:number-columns-repeated="4"/>
        </table:table-row>
        <table:table-row table:style-name="ro1">
          <table:table-cell office:value-type="date" office:date-value="2026-04-15" calcext:value-type="date">
            <text:p>2026-04-15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date" office:date-value="2026-04-16" calcext:value-type="date">
            <text:p>2026-04-16</text:p>
          </table:table-cell>
          <table:table-cell office:value-type="float" office:value="30.81" calcext:value-type="float">
            <text:p>30.81</text:p>
          </table:table-cell>
          <table:table-cell table:number-columns-repeated="4"/>
        </table:table-row>
        <table:table-row table:style-name="ro1">
          <table:table-cell office:value-type="date" office:date-value="2026-04-17" calcext:value-type="date">
            <text:p>2026-04-17</text:p>
          </table:table-cell>
          <table:table-cell office:value-type="float" office:value="31.05" calcext:value-type="float">
            <text:p>31.05</text:p>
          </table:table-cell>
          <table:table-cell table:number-columns-repeated="4"/>
        </table:table-row>
        <table:table-row table:style-name="ro1">
          <table:table-cell office:value-type="date" office:date-value="2026-04-18" calcext:value-type="date">
            <text:p>2026-04-18</text:p>
          </table:table-cell>
          <table:table-cell office:value-type="float" office:value="31.05" calcext:value-type="float">
            <text:p>31.05</text:p>
          </table:table-cell>
          <table:table-cell table:number-columns-repeated="4"/>
        </table:table-row>
        <table:table-row table:style-name="ro1">
          <table:table-cell office:value-type="date" office:date-value="2026-04-19" calcext:value-type="date">
            <text:p>2026-04-19</text:p>
          </table:table-cell>
          <table:table-cell office:value-type="float" office:value="31.05" calcext:value-type="float">
            <text:p>31.05</text:p>
          </table:table-cell>
          <table:table-cell table:number-columns-repeated="4"/>
        </table:table-row>
        <table:table-row table:style-name="ro1">
          <table:table-cell office:value-type="date" office:date-value="2026-04-20" calcext:value-type="date">
            <text:p>2026-04-20</text:p>
          </table:table-cell>
          <table:table-cell office:value-type="float" office:value="31.03" calcext:value-type="float">
            <text:p>31.03</text:p>
          </table:table-cell>
          <table:table-cell table:number-columns-repeated="4"/>
        </table:table-row>
        <table:table-row table:style-name="ro1">
          <table:table-cell office:value-type="date" office:date-value="2026-04-21" calcext:value-type="date">
            <text:p>2026-04-21</text:p>
          </table:table-cell>
          <table:table-cell office:value-type="float" office:value="30.98" calcext:value-type="float">
            <text:p>30.98</text:p>
          </table:table-cell>
          <table:table-cell table:number-columns-repeated="4"/>
        </table:table-row>
        <table:table-row table:style-name="ro1">
          <table:table-cell office:value-type="date" office:date-value="2026-04-22" calcext:value-type="date">
            <text:p>2026-04-22</text:p>
          </table:table-cell>
          <table:table-cell office:value-type="float" office:value="31.01" calcext:value-type="float">
            <text:p>31.01</text:p>
          </table:table-cell>
          <table:table-cell table:number-columns-repeated="4"/>
        </table:table-row>
        <table:table-row table:style-name="ro1">
          <table:table-cell office:value-type="date" office:date-value="2026-04-23" calcext:value-type="date">
            <text:p>2026-04-23</text:p>
          </table:table-cell>
          <table:table-cell office:value-type="float" office:value="31.42" calcext:value-type="float">
            <text:p>31.42</text:p>
          </table:table-cell>
          <table:table-cell table:number-columns-repeated="4"/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float" office:value="31.2" calcext:value-type="float">
            <text:p>31.2</text:p>
          </table:table-cell>
          <table:table-cell table:number-columns-repeated="4"/>
        </table:table-row>
        <table:table-row table:style-name="ro1">
          <table:table-cell office:value-type="date" office:date-value="2026-04-25" calcext:value-type="date">
            <text:p>2026-04-25</text:p>
          </table:table-cell>
          <table:table-cell office:value-type="float" office:value="31.2" calcext:value-type="float">
            <text:p>31.2</text:p>
          </table:table-cell>
          <table:table-cell table:number-columns-repeated="4"/>
        </table:table-row>
        <table:table-row table:style-name="ro1">
          <table:table-cell office:value-type="date" office:date-value="2026-04-26" calcext:value-type="date">
            <text:p>2026-04-26</text:p>
          </table:table-cell>
          <table:table-cell office:value-type="float" office:value="31.2" calcext:value-type="float">
            <text:p>31.2</text:p>
          </table:table-cell>
          <table:table-cell table:number-columns-repeated="4"/>
        </table:table-row>
        <table:table-row table:style-name="ro1">
          <table:table-cell office:value-type="date" office:date-value="2026-04-27" calcext:value-type="date">
            <text:p>2026-04-27</text:p>
          </table:table-cell>
          <table:table-cell office:value-type="float" office:value="31.13" calcext:value-type="float">
            <text:p>31.13</text:p>
          </table:table-cell>
          <table:table-cell table:number-columns-repeated="4"/>
        </table:table-row>
        <table:table-row table:style-name="ro1">
          <table:table-cell office:value-type="date" office:date-value="2026-04-28" calcext:value-type="date">
            <text:p>2026-04-28</text:p>
          </table:table-cell>
          <table:table-cell office:value-type="float" office:value="31.31" calcext:value-type="float">
            <text:p>31.31</text:p>
          </table:table-cell>
          <table:table-cell table:number-columns-repeated="4"/>
        </table:table-row>
        <table:table-row table:style-name="ro1">
          <table:table-cell office:value-type="date" office:date-value="2026-04-29" calcext:value-type="date">
            <text:p>2026-04-29</text:p>
          </table:table-cell>
          <table:table-cell office:value-type="float" office:value="31.45" calcext:value-type="float">
            <text:p>31.45</text:p>
          </table:table-cell>
          <table:table-cell table:number-columns-repeated="4"/>
        </table:table-row>
        <table:table-row table:style-name="ro1">
          <table:table-cell office:value-type="date" office:date-value="2026-04-30" calcext:value-type="date">
            <text:p>2026-04-30</text:p>
          </table:table-cell>
          <table:table-cell office:value-type="float" office:value="32.07" calcext:value-type="float">
            <text:p>32.07</text:p>
          </table:table-cell>
          <table:table-cell table:number-columns-repeated="4"/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float" office:value="31.86" calcext:value-type="float">
            <text:p>31.86</text:p>
          </table:table-cell>
          <table:table-cell table:number-columns-repeated="4"/>
        </table:table-row>
        <table:table-row table:style-name="ro1">
          <table:table-cell office:value-type="date" office:date-value="2026-05-02" calcext:value-type="date">
            <text:p>2026-05-02</text:p>
          </table:table-cell>
          <table:table-cell office:value-type="float" office:value="31.86" calcext:value-type="float">
            <text:p>31.86</text:p>
          </table:table-cell>
          <table:table-cell table:number-columns-repeated="4"/>
        </table:table-row>
        <table:table-row table:style-name="ro1">
          <table:table-cell office:value-type="date" office:date-value="2026-05-03" calcext:value-type="date">
            <text:p>2026-05-03</text:p>
          </table:table-cell>
          <table:table-cell office:value-type="float" office:value="31.86" calcext:value-type="float">
            <text:p>31.86</text:p>
          </table:table-cell>
          <table:table-cell table:number-columns-repeated="4"/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float" office:value="31.52" calcext:value-type="float">
            <text:p>31.52</text:p>
          </table:table-cell>
          <table:table-cell table:number-columns-repeated="4"/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float" office:value="31.69" calcext:value-type="float">
            <text:p>31.69</text:p>
          </table:table-cell>
          <table:table-cell table:number-columns-repeated="4"/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float" office:value="31.66" calcext:value-type="float">
            <text:p>31.66</text:p>
          </table:table-cell>
          <table:table-cell table:number-columns-repeated="4"/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float" office:value="31.54" calcext:value-type="float">
            <text:p>31.54</text:p>
          </table:table-cell>
          <table:table-cell table:number-columns-repeated="4"/>
        </table:table-row>
        <table:table-row table:style-name="ro1">
          <table:table-cell office:value-type="date" office:date-value="2026-05-08" calcext:value-type="date">
            <text:p>2026-05-08</text:p>
          </table:table-cell>
          <table:table-cell office:value-type="float" office:value="31.62" calcext:value-type="float">
            <text:p>31.62</text:p>
          </table:table-cell>
          <table:table-cell table:number-columns-repeated="4"/>
        </table:table-row>
        <table:table-row table:style-name="ro1">
          <table:table-cell office:value-type="date" office:date-value="2026-05-09" calcext:value-type="date">
            <text:p>2026-05-09</text:p>
          </table:table-cell>
          <table:table-cell office:value-type="float" office:value="31.62" calcext:value-type="float">
            <text:p>31.62</text:p>
          </table:table-cell>
          <table:table-cell table:number-columns-repeated="4"/>
        </table:table-row>
        <table:table-row table:style-name="ro1">
          <table:table-cell office:value-type="date" office:date-value="2026-05-10" calcext:value-type="date">
            <text:p>2026-05-10</text:p>
          </table:table-cell>
          <table:table-cell office:value-type="float" office:value="31.62" calcext:value-type="float">
            <text:p>31.62</text:p>
          </table:table-cell>
          <table:table-cell table:number-columns-repeated="4"/>
        </table:table-row>
        <table:table-row table:style-name="ro1">
          <table:table-cell office:value-type="date" office:date-value="2026-05-11" calcext:value-type="date">
            <text:p>2026-05-11</text:p>
          </table:table-cell>
          <table:table-cell office:value-type="float" office:value="31.75" calcext:value-type="float">
            <text:p>31.75</text:p>
          </table:table-cell>
          <table:table-cell table:number-columns-repeated="4"/>
        </table:table-row>
        <table:table-row table:style-name="ro1">
          <table:table-cell office:value-type="date" office:date-value="2026-05-12" calcext:value-type="date">
            <text:p>2026-05-12</text:p>
          </table:table-cell>
          <table:table-cell office:value-type="float" office:value="31.76" calcext:value-type="float">
            <text:p>31.76</text:p>
          </table:table-cell>
          <table:table-cell table:number-columns-repeated="4"/>
        </table:table-row>
        <table:table-row table:style-name="ro1">
          <table:table-cell office:value-type="date" office:date-value="2026-05-13" calcext:value-type="date">
            <text:p>2026-05-13</text:p>
          </table:table-cell>
          <table:table-cell office:value-type="float" office:value="31.75" calcext:value-type="float">
            <text:p>31.75</text:p>
          </table:table-cell>
          <table:table-cell table:number-columns-repeated="4"/>
        </table:table-row>
        <table:table-row table:style-name="ro1">
          <table:table-cell office:value-type="date" office:date-value="2026-05-14" calcext:value-type="date">
            <text:p>2026-05-14</text:p>
          </table:table-cell>
          <table:table-cell office:value-type="float" office:value="31.8" calcext:value-type="float">
            <text:p>31.8</text:p>
          </table:table-cell>
          <table:table-cell table:number-columns-repeated="4"/>
        </table:table-row>
        <table:table-row table:style-name="ro1">
          <table:table-cell office:value-type="date" office:date-value="2026-05-15" calcext:value-type="date">
            <text:p>2026-05-15</text:p>
          </table:table-cell>
          <table:table-cell office:value-type="float" office:value="31.72" calcext:value-type="float">
            <text:p>31.72</text:p>
          </table:table-cell>
          <table:table-cell table:number-columns-repeated="4"/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float" office:value="31.72" calcext:value-type="float">
            <text:p>31.72</text:p>
          </table:table-cell>
          <table:table-cell table:number-columns-repeated="4"/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float" office:value="31.72" calcext:value-type="float">
            <text:p>31.72</text:p>
          </table:table-cell>
          <table:table-cell table:number-columns-repeated="4"/>
        </table:table-row>
        <table:table-row table:style-name="ro1">
          <table:table-cell office:value-type="date" office:date-value="2026-05-18" calcext:value-type="date">
            <text:p>2026-05-18</text:p>
          </table:table-cell>
          <table:table-cell office:value-type="float" office:value="32.04" calcext:value-type="float">
            <text:p>32.04</text:p>
          </table:table-cell>
          <table:table-cell table:number-columns-repeated="4"/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float" office:value="32.1" calcext:value-type="float">
            <text:p>32.1</text:p>
          </table:table-cell>
          <table:table-cell table:number-columns-repeated="4"/>
        </table:table-row>
        <table:table-row table:style-name="ro1">
          <table:table-cell office:value-type="date" office:date-value="2026-05-20" calcext:value-type="date">
            <text:p>2026-05-20</text:p>
          </table:table-cell>
          <table:table-cell office:value-type="float" office:value="32.12" calcext:value-type="float">
            <text:p>32.12</text:p>
          </table:table-cell>
          <table:table-cell table:number-columns-repeated="4"/>
        </table:table-row>
        <table:table-row table:style-name="ro1">
          <table:table-cell office:value-type="date" office:date-value="2026-05-21" calcext:value-type="date">
            <text:p>2026-05-21</text:p>
          </table:table-cell>
          <table:table-cell office:value-type="float" office:value="32.25" calcext:value-type="float">
            <text:p>32.25</text:p>
          </table:table-cell>
          <table:table-cell table:number-columns-repeated="4"/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float" office:value="32.83" calcext:value-type="float">
            <text:p>32.83</text:p>
          </table:table-cell>
          <table:table-cell table:number-columns-repeated="4"/>
        </table:table-row>
        <table:table-row table:style-name="ro1">
          <table:table-cell office:value-type="date" office:date-value="2026-05-23" calcext:value-type="date">
            <text:p>2026-05-23</text:p>
          </table:table-cell>
          <table:table-cell office:value-type="float" office:value="32.83" calcext:value-type="float">
            <text:p>32.83</text:p>
          </table:table-cell>
          <table:table-cell table:number-columns-repeated="4"/>
        </table:table-row>
        <table:table-row table:style-name="ro1">
          <table:table-cell office:value-type="date" office:date-value="2026-05-24" calcext:value-type="date">
            <text:p>2026-05-24</text:p>
          </table:table-cell>
          <table:table-cell office:value-type="float" office:value="32.83" calcext:value-type="float">
            <text:p>32.83</text:p>
          </table:table-cell>
          <table:table-cell table:number-columns-repeated="4"/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float" office:value="32.83" calcext:value-type="float">
            <text:p>32.83</text:p>
          </table:table-cell>
          <table:table-cell table:number-columns-repeated="4"/>
        </table:table-row>
        <table:table-row table:style-name="ro1">
          <table:table-cell office:value-type="date" office:date-value="2026-05-26" calcext:value-type="date">
            <text:p>2026-05-26</text:p>
          </table:table-cell>
          <table:table-cell office:value-type="float" office:value="32.67" calcext:value-type="float">
            <text:p>32.67</text:p>
          </table:table-cell>
          <table:table-cell table:number-columns-repeated="4"/>
        </table:table-row>
        <table:table-row table:style-name="ro1">
          <table:table-cell office:value-type="date" office:date-value="2026-05-27" calcext:value-type="date">
            <text:p>2026-05-27</text:p>
          </table:table-cell>
          <table:table-cell office:value-type="float" office:value="32.55" calcext:value-type="float">
            <text:p>32.55</text:p>
          </table:table-cell>
          <table:table-cell table:number-columns-repeated="4"/>
        </table:table-row>
        <table:table-row table:style-name="ro1">
          <table:table-cell office:value-type="date" office:date-value="2026-05-28" calcext:value-type="date">
            <text:p>2026-05-28</text:p>
          </table:table-cell>
          <table:table-cell office:value-type="float" office:value="32.63" calcext:value-type="float">
            <text:p>32.63</text:p>
          </table:table-cell>
          <table:table-cell table:number-columns-repeated="4"/>
        </table:table-row>
        <table:table-row table:style-name="ro1">
          <table:table-cell office:value-type="date" office:date-value="2026-05-29" calcext:value-type="date">
            <text:p>2026-05-29</text:p>
          </table:table-cell>
          <table:table-cell office:value-type="float" office:value="32.5" calcext:value-type="float">
            <text:p>32.5</text:p>
          </table:table-cell>
          <table:table-cell table:number-columns-repeated="4"/>
        </table:table-row>
        <table:table-row table:style-name="ro1">
          <table:table-cell office:value-type="date" office:date-value="2026-05-30" calcext:value-type="date">
            <text:p>2026-05-30</text:p>
          </table:table-cell>
          <table:table-cell office:value-type="float" office:value="32.5" calcext:value-type="float">
            <text:p>32.5</text:p>
          </table:table-cell>
          <table:table-cell table:number-columns-repeated="4"/>
        </table:table-row>
        <table:table-row table:style-name="ro1">
          <table:table-cell office:value-type="date" office:date-value="2026-05-31" calcext:value-type="date">
            <text:p>2026-05-31</text:p>
          </table:table-cell>
          <table:table-cell office:value-type="float" office:value="32.5" calcext:value-type="float">
            <text:p>32.5</text:p>
          </table:table-cell>
          <table:table-cell table:number-columns-repeated="4"/>
        </table:table-row>
        <table:table-row table:style-name="ro1">
          <table:table-cell office:value-type="date" office:date-value="2026-06-01" calcext:value-type="date">
            <text:p>2026-06-01</text:p>
          </table:table-cell>
          <table:table-cell office:value-type="float" office:value="32.18" calcext:value-type="float">
            <text:p>32.18</text:p>
          </table:table-cell>
          <table:table-cell table:number-columns-repeated="4"/>
        </table:table-row>
        <table:table-row table:style-name="ro1">
          <table:table-cell office:value-type="date" office:date-value="2026-06-02" calcext:value-type="date">
            <text:p>2026-06-02</text:p>
          </table:table-cell>
          <table:table-cell office:value-type="float" office:value="32.37" calcext:value-type="float">
            <text:p>32.37</text:p>
          </table:table-cell>
          <table:table-cell table:number-columns-repeated="4"/>
        </table:table-row>
        <table:table-row table:style-name="ro1">
          <table:table-cell office:value-type="date" office:date-value="2026-06-03" calcext:value-type="date">
            <text:p>2026-06-03</text:p>
          </table:table-cell>
          <table:table-cell office:value-type="float" office:value="32.37" calcext:value-type="float">
            <text:p>32.37</text:p>
          </table:table-cell>
          <table:table-cell table:number-columns-repeated="4"/>
        </table:table-row>
        <table:table-row table:style-name="ro1">
          <table:table-cell office:value-type="date" office:date-value="2026-06-04" calcext:value-type="date">
            <text:p>2026-06-04</text:p>
          </table:table-cell>
          <table:table-cell office:value-type="float" office:value="32.59" calcext:value-type="float">
            <text:p>32.59</text:p>
          </table:table-cell>
          <table:table-cell table:number-columns-repeated="4"/>
        </table:table-row>
        <table:table-row table:style-name="ro1">
          <table:table-cell office:value-type="date" office:date-value="2026-06-05" calcext:value-type="date">
            <text:p>2026-06-05</text:p>
          </table:table-cell>
          <table:table-cell office:value-type="float" office:value="32.3" calcext:value-type="float">
            <text:p>32.3</text:p>
          </table:table-cell>
          <table:table-cell table:number-columns-repeated="4"/>
        </table:table-row>
        <table:table-row table:style-name="ro1">
          <table:table-cell office:value-type="date" office:date-value="2026-06-06" calcext:value-type="date">
            <text:p>2026-06-06</text:p>
          </table:table-cell>
          <table:table-cell/>
          <table:table-cell table:formula="of:=COM.MICROSOFT.FORECAST.ETS([.A734];[.B$2:.B$733];[.A$2:.A$733];1;1;1)" office:value-type="float" office:value="32.3334785033798" calcext:value-type="float">
            <text:p>32.3334785033798</text:p>
          </table:table-cell>
          <table:table-cell table:formula="of:=COM.MICROSOFT.FORECAST.ETS.CONFINT([.A734];[.B$2:.B$733];[.A$2:.A$733];0.95)" office:value-type="float" office:value="0.413631850136142" calcext:value-type="float">
            <text:p>0.413631850136142</text:p>
          </table:table-cell>
          <table:table-cell table:formula="of:=[.C734]-[.D734]" office:value-type="float" office:value="31.9198466532436" calcext:value-type="float">
            <text:p>31.9198466532436</text:p>
          </table:table-cell>
          <table:table-cell table:formula="of:=[.C734]+[.D734]" office:value-type="float" office:value="32.7471103535159" calcext:value-type="float">
            <text:p>32.7471103535159</text:p>
          </table:table-cell>
        </table:table-row>
        <table:table-row table:style-name="ro1">
          <table:table-cell office:value-type="date" office:date-value="2026-06-07" calcext:value-type="date">
            <text:p>2026-06-07</text:p>
          </table:table-cell>
          <table:table-cell/>
          <table:table-cell table:formula="of:=COM.MICROSOFT.FORECAST.ETS([.A735];[.B$2:.B$733];[.A$2:.A$733];1;1;1)" office:value-type="float" office:value="32.3119474973895" calcext:value-type="float">
            <text:p>32.3119474973895</text:p>
          </table:table-cell>
          <table:table-cell table:formula="of:=COM.MICROSOFT.FORECAST.ETS.CONFINT([.A735];[.B$2:.B$733];[.A$2:.A$733];0.95)" office:value-type="float" office:value="0.474251192813163" calcext:value-type="float">
            <text:p>0.474251192813163</text:p>
          </table:table-cell>
          <table:table-cell table:formula="of:=[.C735]-[.D735]" office:value-type="float" office:value="31.8376963045764" calcext:value-type="float">
            <text:p>31.8376963045764</text:p>
          </table:table-cell>
          <table:table-cell table:formula="of:=[.C735]+[.D735]" office:value-type="float" office:value="32.7861986902027" calcext:value-type="float">
            <text:p>32.7861986902027</text:p>
          </table:table-cell>
        </table:table-row>
        <table:table-row table:style-name="ro1">
          <table:table-cell office:value-type="date" office:date-value="2026-06-08" calcext:value-type="date">
            <text:p>2026-06-08</text:p>
          </table:table-cell>
          <table:table-cell/>
          <table:table-cell table:formula="of:=COM.MICROSOFT.FORECAST.ETS([.A736];[.B$2:.B$733];[.A$2:.A$733];1;1;1)" office:value-type="float" office:value="32.2013871814855" calcext:value-type="float">
            <text:p>32.2013871814855</text:p>
          </table:table-cell>
          <table:table-cell table:formula="of:=COM.MICROSOFT.FORECAST.ETS.CONFINT([.A736];[.B$2:.B$733];[.A$2:.A$733];0.95)" office:value-type="float" office:value="0.540973688281028" calcext:value-type="float">
            <text:p>0.540973688281028</text:p>
          </table:table-cell>
          <table:table-cell table:formula="of:=[.C736]-[.D736]" office:value-type="float" office:value="31.6604134932045" calcext:value-type="float">
            <text:p>31.6604134932045</text:p>
          </table:table-cell>
          <table:table-cell table:formula="of:=[.C736]+[.D736]" office:value-type="float" office:value="32.7423608697666" calcext:value-type="float">
            <text:p>32.7423608697666</text:p>
          </table:table-cell>
        </table:table-row>
        <table:table-row table:style-name="ro1">
          <table:table-cell office:value-type="date" office:date-value="2026-06-09" calcext:value-type="date">
            <text:p>2026-06-09</text:p>
          </table:table-cell>
          <table:table-cell/>
          <table:table-cell table:formula="of:=COM.MICROSOFT.FORECAST.ETS([.A737];[.B$2:.B$733];[.A$2:.A$733];1;1;1)" office:value-type="float" office:value="32.2346125145361" calcext:value-type="float">
            <text:p>32.2346125145361</text:p>
          </table:table-cell>
          <table:table-cell table:formula="of:=COM.MICROSOFT.FORECAST.ETS.CONFINT([.A737];[.B$2:.B$733];[.A$2:.A$733];0.95)" office:value-type="float" office:value="0.58549233576862" calcext:value-type="float">
            <text:p>0.58549233576862</text:p>
          </table:table-cell>
          <table:table-cell table:formula="of:=[.C737]-[.D737]" office:value-type="float" office:value="31.6491201787674" calcext:value-type="float">
            <text:p>31.6491201787674</text:p>
          </table:table-cell>
          <table:table-cell table:formula="of:=[.C737]+[.D737]" office:value-type="float" office:value="32.8201048503047" calcext:value-type="float">
            <text:p>32.8201048503047</text:p>
          </table:table-cell>
        </table:table-row>
        <table:table-row table:style-name="ro1">
          <table:table-cell office:value-type="date" office:date-value="2026-06-10" calcext:value-type="date">
            <text:p>2026-06-10</text:p>
          </table:table-cell>
          <table:table-cell/>
          <table:table-cell table:formula="of:=COM.MICROSOFT.FORECAST.ETS([.A738];[.B$2:.B$733];[.A$2:.A$733];1;1;1)" office:value-type="float" office:value="32.0995577198893" calcext:value-type="float">
            <text:p>32.0995577198893</text:p>
          </table:table-cell>
          <table:table-cell table:formula="of:=COM.MICROSOFT.FORECAST.ETS.CONFINT([.A738];[.B$2:.B$733];[.A$2:.A$733];0.95)" office:value-type="float" office:value="0.649314932069316" calcext:value-type="float">
            <text:p>0.649314932069316</text:p>
          </table:table-cell>
          <table:table-cell table:formula="of:=[.C738]-[.D738]" office:value-type="float" office:value="31.4502427878199" calcext:value-type="float">
            <text:p>31.4502427878199</text:p>
          </table:table-cell>
          <table:table-cell table:formula="of:=[.C738]+[.D738]" office:value-type="float" office:value="32.7488726519586" calcext:value-type="float">
            <text:p>32.7488726519586</text:p>
          </table:table-cell>
        </table:table-row>
        <table:table-row table:style-name="ro1">
          <table:table-cell office:value-type="date" office:date-value="2026-06-11" calcext:value-type="date">
            <text:p>2026-06-11</text:p>
          </table:table-cell>
          <table:table-cell/>
          <table:table-cell table:formula="of:=COM.MICROSOFT.FORECAST.ETS([.A739];[.B$2:.B$733];[.A$2:.A$733];1;1;1)" office:value-type="float" office:value="32.0372766776174" calcext:value-type="float">
            <text:p>32.0372766776174</text:p>
          </table:table-cell>
          <table:table-cell table:formula="of:=COM.MICROSOFT.FORECAST.ETS.CONFINT([.A739];[.B$2:.B$733];[.A$2:.A$733];0.95)" office:value-type="float" office:value="0.585954328589125" calcext:value-type="float">
            <text:p>0.585954328589125</text:p>
          </table:table-cell>
          <table:table-cell table:formula="of:=[.C739]-[.D739]" office:value-type="float" office:value="31.4513223490283" calcext:value-type="float">
            <text:p>31.4513223490283</text:p>
          </table:table-cell>
          <table:table-cell table:formula="of:=[.C739]+[.D739]" office:value-type="float" office:value="32.6232310062065" calcext:value-type="float">
            <text:p>32.6232310062065</text:p>
          </table:table-cell>
        </table:table-row>
        <table:table-row table:style-name="ro1">
          <table:table-cell office:value-type="date" office:date-value="2026-06-12" calcext:value-type="date">
            <text:p>2026-06-12</text:p>
          </table:table-cell>
          <table:table-cell/>
          <table:table-cell table:formula="of:=COM.MICROSOFT.FORECAST.ETS([.A740];[.B$2:.B$733];[.A$2:.A$733];1;1;1)" office:value-type="float" office:value="32.1407887346205" calcext:value-type="float">
            <text:p>32.1407887346205</text:p>
          </table:table-cell>
          <table:table-cell table:formula="of:=COM.MICROSOFT.FORECAST.ETS.CONFINT([.A740];[.B$2:.B$733];[.A$2:.A$733];0.95)" office:value-type="float" office:value="0.712855286573721" calcext:value-type="float">
            <text:p>0.712855286573721</text:p>
          </table:table-cell>
          <table:table-cell table:formula="of:=[.C740]-[.D740]" office:value-type="float" office:value="31.4279334480468" calcext:value-type="float">
            <text:p>31.4279334480468</text:p>
          </table:table-cell>
          <table:table-cell table:formula="of:=[.C740]+[.D740]" office:value-type="float" office:value="32.8536440211942" calcext:value-type="float">
            <text:p>32.8536440211942</text:p>
          </table:table-cell>
        </table:table-row>
        <table:table-row table:style-name="ro1">
          <table:table-cell office:value-type="date" office:date-value="2026-06-13" calcext:value-type="date">
            <text:p>2026-06-13</text:p>
          </table:table-cell>
          <table:table-cell/>
          <table:table-cell table:formula="of:=COM.MICROSOFT.FORECAST.ETS([.A741];[.B$2:.B$733];[.A$2:.A$733];1;1;1)" office:value-type="float" office:value="32.2863401780127" calcext:value-type="float">
            <text:p>32.2863401780127</text:p>
          </table:table-cell>
          <table:table-cell table:formula="of:=COM.MICROSOFT.FORECAST.ETS.CONFINT([.A741];[.B$2:.B$733];[.A$2:.A$733];0.95)" office:value-type="float" office:value="0.763459085234757" calcext:value-type="float">
            <text:p>0.763459085234757</text:p>
          </table:table-cell>
          <table:table-cell table:formula="of:=[.C741]-[.D741]" office:value-type="float" office:value="31.5228810927779" calcext:value-type="float">
            <text:p>31.5228810927779</text:p>
          </table:table-cell>
          <table:table-cell table:formula="of:=[.C741]+[.D741]" office:value-type="float" office:value="33.0497992632475" calcext:value-type="float">
            <text:p>33.0497992632475</text:p>
          </table:table-cell>
        </table:table-row>
        <table:table-row table:style-name="ro1">
          <table:table-cell office:value-type="date" office:date-value="2026-06-14" calcext:value-type="date">
            <text:p>2026-06-14</text:p>
          </table:table-cell>
          <table:table-cell/>
          <table:table-cell table:formula="of:=COM.MICROSOFT.FORECAST.ETS([.A742];[.B$2:.B$733];[.A$2:.A$733];1;1;1)" office:value-type="float" office:value="32.4957789618726" calcext:value-type="float">
            <text:p>32.4957789618726</text:p>
          </table:table-cell>
          <table:table-cell table:formula="of:=COM.MICROSOFT.FORECAST.ETS.CONFINT([.A742];[.B$2:.B$733];[.A$2:.A$733];0.95)" office:value-type="float" office:value="0.741405160225874" calcext:value-type="float">
            <text:p>0.741405160225874</text:p>
          </table:table-cell>
          <table:table-cell table:formula="of:=[.C742]-[.D742]" office:value-type="float" office:value="31.7543738016468" calcext:value-type="float">
            <text:p>31.7543738016468</text:p>
          </table:table-cell>
          <table:table-cell table:formula="of:=[.C742]+[.D742]" office:value-type="float" office:value="33.2371841220985" calcext:value-type="float">
            <text:p>33.2371841220985</text:p>
          </table:table-cell>
        </table:table-row>
        <table:table-row table:style-name="ro1">
          <table:table-cell office:value-type="date" office:date-value="2026-06-15" calcext:value-type="date">
            <text:p>2026-06-15</text:p>
          </table:table-cell>
          <table:table-cell/>
          <table:table-cell table:formula="of:=COM.MICROSOFT.FORECAST.ETS([.A743];[.B$2:.B$733];[.A$2:.A$733];1;1;1)" office:value-type="float" office:value="32.7553291361557" calcext:value-type="float">
            <text:p>32.7553291361557</text:p>
          </table:table-cell>
          <table:table-cell table:formula="of:=COM.MICROSOFT.FORECAST.ETS.CONFINT([.A743];[.B$2:.B$733];[.A$2:.A$733];0.95)" office:value-type="float" office:value="0.822444168614815" calcext:value-type="float">
            <text:p>0.822444168614815</text:p>
          </table:table-cell>
          <table:table-cell table:formula="of:=[.C743]-[.D743]" office:value-type="float" office:value="31.9328849675409" calcext:value-type="float">
            <text:p>31.9328849675409</text:p>
          </table:table-cell>
          <table:table-cell table:formula="of:=[.C743]+[.D743]" office:value-type="float" office:value="33.5777733047705" calcext:value-type="float">
            <text:p>33.5777733047705</text:p>
          </table:table-cell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/>
          <table:table-cell table:formula="of:=COM.MICROSOFT.FORECAST.ETS([.A744];[.B$2:.B$733];[.A$2:.A$733];1;1;1)" office:value-type="float" office:value="32.9125760769775" calcext:value-type="float">
            <text:p>32.9125760769775</text:p>
          </table:table-cell>
          <table:table-cell table:formula="of:=COM.MICROSOFT.FORECAST.ETS.CONFINT([.A744];[.B$2:.B$733];[.A$2:.A$733];0.95)" office:value-type="float" office:value="0.892608567362181" calcext:value-type="float">
            <text:p>0.892608567362181</text:p>
          </table:table-cell>
          <table:table-cell table:formula="of:=[.C744]-[.D744]" office:value-type="float" office:value="32.0199675096154" calcext:value-type="float">
            <text:p>32.0199675096154</text:p>
          </table:table-cell>
          <table:table-cell table:formula="of:=[.C744]+[.D744]" office:value-type="float" office:value="33.8051846443397" calcext:value-type="float">
            <text:p>33.8051846443397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/>
          <table:table-cell table:formula="of:=COM.MICROSOFT.FORECAST.ETS([.A745];[.B$2:.B$733];[.A$2:.A$733];1;1;1)" office:value-type="float" office:value="33.0812312334205" calcext:value-type="float">
            <text:p>33.0812312334205</text:p>
          </table:table-cell>
          <table:table-cell table:formula="of:=COM.MICROSOFT.FORECAST.ETS.CONFINT([.A745];[.B$2:.B$733];[.A$2:.A$733];0.95)" office:value-type="float" office:value="0.929140716393086" calcext:value-type="float">
            <text:p>0.929140716393086</text:p>
          </table:table-cell>
          <table:table-cell table:formula="of:=[.C745]-[.D745]" office:value-type="float" office:value="32.1520905170274" calcext:value-type="float">
            <text:p>32.1520905170274</text:p>
          </table:table-cell>
          <table:table-cell table:formula="of:=[.C745]+[.D745]" office:value-type="float" office:value="34.0103719498136" calcext:value-type="float">
            <text:p>34.0103719498136</text:p>
          </table:table-cell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/>
          <table:table-cell table:formula="of:=COM.MICROSOFT.FORECAST.ETS([.A746];[.B$2:.B$733];[.A$2:.A$733];1;1;1)" office:value-type="float" office:value="33.0986766380086" calcext:value-type="float">
            <text:p>33.0986766380086</text:p>
          </table:table-cell>
          <table:table-cell table:formula="of:=COM.MICROSOFT.FORECAST.ETS.CONFINT([.A746];[.B$2:.B$733];[.A$2:.A$733];0.95)" office:value-type="float" office:value="0.921934618509432" calcext:value-type="float">
            <text:p>0.921934618509432</text:p>
          </table:table-cell>
          <table:table-cell table:formula="of:=[.C746]-[.D746]" office:value-type="float" office:value="32.1767420194992" calcext:value-type="float">
            <text:p>32.1767420194992</text:p>
          </table:table-cell>
          <table:table-cell table:formula="of:=[.C746]+[.D746]" office:value-type="float" office:value="34.0206112565181" calcext:value-type="float">
            <text:p>34.0206112565181</text:p>
          </table:table-cell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/>
          <table:table-cell table:formula="of:=COM.MICROSOFT.FORECAST.ETS([.A747];[.B$2:.B$733];[.A$2:.A$733];1;1;1)" office:value-type="float" office:value="33.073652675952" calcext:value-type="float">
            <text:p>33.073652675952</text:p>
          </table:table-cell>
          <table:table-cell table:formula="of:=COM.MICROSOFT.FORECAST.ETS.CONFINT([.A747];[.B$2:.B$733];[.A$2:.A$733];0.95)" office:value-type="float" office:value="0.935242901554872" calcext:value-type="float">
            <text:p>0.935242901554872</text:p>
          </table:table-cell>
          <table:table-cell table:formula="of:=[.C747]-[.D747]" office:value-type="float" office:value="32.1384097743971" calcext:value-type="float">
            <text:p>32.1384097743971</text:p>
          </table:table-cell>
          <table:table-cell table:formula="of:=[.C747]+[.D747]" office:value-type="float" office:value="34.0088955775069" calcext:value-type="float">
            <text:p>34.0088955775069</text:p>
          </table:table-cell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/>
          <table:table-cell table:formula="of:=COM.MICROSOFT.FORECAST.ETS([.A748];[.B$2:.B$733];[.A$2:.A$733];1;1;1)" office:value-type="float" office:value="33.0781130620963" calcext:value-type="float">
            <text:p>33.0781130620963</text:p>
          </table:table-cell>
          <table:table-cell table:formula="of:=COM.MICROSOFT.FORECAST.ETS.CONFINT([.A748];[.B$2:.B$733];[.A$2:.A$733];0.95)" office:value-type="float" office:value="0.877164424611351" calcext:value-type="float">
            <text:p>0.877164424611351</text:p>
          </table:table-cell>
          <table:table-cell table:formula="of:=[.C748]-[.D748]" office:value-type="float" office:value="32.200948637485" calcext:value-type="float">
            <text:p>32.200948637485</text:p>
          </table:table-cell>
          <table:table-cell table:formula="of:=[.C748]+[.D748]" office:value-type="float" office:value="33.9552774867077" calcext:value-type="float">
            <text:p>33.9552774867077</text:p>
          </table:table-cell>
        </table:table-row>
        <table:table-row table:style-name="ro1">
          <table:table-cell office:value-type="date" office:date-value="2026-06-21" calcext:value-type="date">
            <text:p>2026-06-21</text:p>
          </table:table-cell>
          <table:table-cell/>
          <table:table-cell table:formula="of:=COM.MICROSOFT.FORECAST.ETS([.A749];[.B$2:.B$733];[.A$2:.A$733];1;1;1)" office:value-type="float" office:value="33.0080615596973" calcext:value-type="float">
            <text:p>33.0080615596973</text:p>
          </table:table-cell>
          <table:table-cell table:formula="of:=COM.MICROSOFT.FORECAST.ETS.CONFINT([.A749];[.B$2:.B$733];[.A$2:.A$733];0.95)" office:value-type="float" office:value="1.06657696339526" calcext:value-type="float">
            <text:p>1.06657696339526</text:p>
          </table:table-cell>
          <table:table-cell table:formula="of:=[.C749]-[.D749]" office:value-type="float" office:value="31.941484596302" calcext:value-type="float">
            <text:p>31.941484596302</text:p>
          </table:table-cell>
          <table:table-cell table:formula="of:=[.C749]+[.D749]" office:value-type="float" office:value="34.0746385230925" calcext:value-type="float">
            <text:p>34.0746385230925</text:p>
          </table:table-cell>
        </table:table-row>
        <table:table-row table:style-name="ro1">
          <table:table-cell office:value-type="date" office:date-value="2026-06-22" calcext:value-type="date">
            <text:p>2026-06-22</text:p>
          </table:table-cell>
          <table:table-cell/>
          <table:table-cell table:formula="of:=COM.MICROSOFT.FORECAST.ETS([.A750];[.B$2:.B$733];[.A$2:.A$733];1;1;1)" office:value-type="float" office:value="33.0103949922604" calcext:value-type="float">
            <text:p>33.0103949922604</text:p>
          </table:table-cell>
          <table:table-cell table:formula="of:=COM.MICROSOFT.FORECAST.ETS.CONFINT([.A750];[.B$2:.B$733];[.A$2:.A$733];0.95)" office:value-type="float" office:value="1.08825447543776" calcext:value-type="float">
            <text:p>1.08825447543776</text:p>
          </table:table-cell>
          <table:table-cell table:formula="of:=[.C750]-[.D750]" office:value-type="float" office:value="31.9221405168226" calcext:value-type="float">
            <text:p>31.9221405168226</text:p>
          </table:table-cell>
          <table:table-cell table:formula="of:=[.C750]+[.D750]" office:value-type="float" office:value="34.0986494676981" calcext:value-type="float">
            <text:p>34.0986494676981</text:p>
          </table:table-cell>
        </table:table-row>
        <table:table-row table:style-name="ro1">
          <table:table-cell office:value-type="date" office:date-value="2026-06-23" calcext:value-type="date">
            <text:p>2026-06-23</text:p>
          </table:table-cell>
          <table:table-cell/>
          <table:table-cell table:formula="of:=COM.MICROSOFT.FORECAST.ETS([.A751];[.B$2:.B$733];[.A$2:.A$733];1;1;1)" office:value-type="float" office:value="32.9863334048281" calcext:value-type="float">
            <text:p>32.9863334048281</text:p>
          </table:table-cell>
          <table:table-cell table:formula="of:=COM.MICROSOFT.FORECAST.ETS.CONFINT([.A751];[.B$2:.B$733];[.A$2:.A$733];0.95)" office:value-type="float" office:value="1.06235831929251" calcext:value-type="float">
            <text:p>1.06235831929251</text:p>
          </table:table-cell>
          <table:table-cell table:formula="of:=[.C751]-[.D751]" office:value-type="float" office:value="31.9239750855356" calcext:value-type="float">
            <text:p>31.9239750855356</text:p>
          </table:table-cell>
          <table:table-cell table:formula="of:=[.C751]+[.D751]" office:value-type="float" office:value="34.0486917241207" calcext:value-type="float">
            <text:p>34.0486917241207</text:p>
          </table:table-cell>
        </table:table-row>
        <table:table-row table:style-name="ro1">
          <table:table-cell office:value-type="date" office:date-value="2026-06-24" calcext:value-type="date">
            <text:p>2026-06-24</text:p>
          </table:table-cell>
          <table:table-cell/>
          <table:table-cell table:formula="of:=COM.MICROSOFT.FORECAST.ETS([.A752];[.B$2:.B$733];[.A$2:.A$733];1;1;1)" office:value-type="float" office:value="33.0147709192184" calcext:value-type="float">
            <text:p>33.0147709192184</text:p>
          </table:table-cell>
          <table:table-cell table:formula="of:=COM.MICROSOFT.FORECAST.ETS.CONFINT([.A752];[.B$2:.B$733];[.A$2:.A$733];0.95)" office:value-type="float" office:value="1.06823611474725" calcext:value-type="float">
            <text:p>1.06823611474725</text:p>
          </table:table-cell>
          <table:table-cell table:formula="of:=[.C752]-[.D752]" office:value-type="float" office:value="31.9465348044712" calcext:value-type="float">
            <text:p>31.9465348044712</text:p>
          </table:table-cell>
          <table:table-cell table:formula="of:=[.C752]+[.D752]" office:value-type="float" office:value="34.0830070339657" calcext:value-type="float">
            <text:p>34.0830070339657</text:p>
          </table:table-cell>
        </table:table-row>
        <table:table-row table:style-name="ro1">
          <table:table-cell office:value-type="date" office:date-value="2026-06-25" calcext:value-type="date">
            <text:p>2026-06-25</text:p>
          </table:table-cell>
          <table:table-cell/>
          <table:table-cell table:formula="of:=COM.MICROSOFT.FORECAST.ETS([.A753];[.B$2:.B$733];[.A$2:.A$733];1;1;1)" office:value-type="float" office:value="33.0099609383575" calcext:value-type="float">
            <text:p>33.0099609383575</text:p>
          </table:table-cell>
          <table:table-cell table:formula="of:=COM.MICROSOFT.FORECAST.ETS.CONFINT([.A753];[.B$2:.B$733];[.A$2:.A$733];0.95)" office:value-type="float" office:value="1.13935634411022" calcext:value-type="float">
            <text:p>1.13935634411022</text:p>
          </table:table-cell>
          <table:table-cell table:formula="of:=[.C753]-[.D753]" office:value-type="float" office:value="31.8706045942473" calcext:value-type="float">
            <text:p>31.8706045942473</text:p>
          </table:table-cell>
          <table:table-cell table:formula="of:=[.C753]+[.D753]" office:value-type="float" office:value="34.1493172824677" calcext:value-type="float">
            <text:p>34.1493172824677</text:p>
          </table:table-cell>
        </table:table-row>
        <table:table-row table:style-name="ro1">
          <table:table-cell office:value-type="date" office:date-value="2026-06-26" calcext:value-type="date">
            <text:p>2026-06-26</text:p>
          </table:table-cell>
          <table:table-cell/>
          <table:table-cell table:formula="of:=COM.MICROSOFT.FORECAST.ETS([.A754];[.B$2:.B$733];[.A$2:.A$733];1;1;1)" office:value-type="float" office:value="33.1934051241996" calcext:value-type="float">
            <text:p>33.1934051241996</text:p>
          </table:table-cell>
          <table:table-cell table:formula="of:=COM.MICROSOFT.FORECAST.ETS.CONFINT([.A754];[.B$2:.B$733];[.A$2:.A$733];0.95)" office:value-type="float" office:value="1.16416754040949" calcext:value-type="float">
            <text:p>1.16416754040949</text:p>
          </table:table-cell>
          <table:table-cell table:formula="of:=[.C754]-[.D754]" office:value-type="float" office:value="32.0292375837902" calcext:value-type="float">
            <text:p>32.0292375837902</text:p>
          </table:table-cell>
          <table:table-cell table:formula="of:=[.C754]+[.D754]" office:value-type="float" office:value="34.3575726646091" calcext:value-type="float">
            <text:p>34.3575726646091</text:p>
          </table:table-cell>
        </table:table-row>
        <table:table-row table:style-name="ro1">
          <table:table-cell office:value-type="date" office:date-value="2026-06-27" calcext:value-type="date">
            <text:p>2026-06-27</text:p>
          </table:table-cell>
          <table:table-cell/>
          <table:table-cell table:formula="of:=COM.MICROSOFT.FORECAST.ETS([.A755];[.B$2:.B$733];[.A$2:.A$733];1;1;1)" office:value-type="float" office:value="33.0755767805504" calcext:value-type="float">
            <text:p>33.0755767805504</text:p>
          </table:table-cell>
          <table:table-cell table:formula="of:=COM.MICROSOFT.FORECAST.ETS.CONFINT([.A755];[.B$2:.B$733];[.A$2:.A$733];0.95)" office:value-type="float" office:value="1.18489693580378" calcext:value-type="float">
            <text:p>1.18489693580378</text:p>
          </table:table-cell>
          <table:table-cell table:formula="of:=[.C755]-[.D755]" office:value-type="float" office:value="31.8906798447466" calcext:value-type="float">
            <text:p>31.8906798447466</text:p>
          </table:table-cell>
          <table:table-cell table:formula="of:=[.C755]+[.D755]" office:value-type="float" office:value="34.2604737163542" calcext:value-type="float">
            <text:p>34.2604737163542</text:p>
          </table:table-cell>
        </table:table-row>
        <table:table-row table:style-name="ro1">
          <table:table-cell office:value-type="date" office:date-value="2026-06-28" calcext:value-type="date">
            <text:p>2026-06-28</text:p>
          </table:table-cell>
          <table:table-cell/>
          <table:table-cell table:formula="of:=COM.MICROSOFT.FORECAST.ETS([.A756];[.B$2:.B$733];[.A$2:.A$733];1;1;1)" office:value-type="float" office:value="33.0304469923593" calcext:value-type="float">
            <text:p>33.0304469923593</text:p>
          </table:table-cell>
          <table:table-cell table:formula="of:=COM.MICROSOFT.FORECAST.ETS.CONFINT([.A756];[.B$2:.B$733];[.A$2:.A$733];0.95)" office:value-type="float" office:value="1.17991802053005" calcext:value-type="float">
            <text:p>1.17991802053005</text:p>
          </table:table-cell>
          <table:table-cell table:formula="of:=[.C756]-[.D756]" office:value-type="float" office:value="31.8505289718293" calcext:value-type="float">
            <text:p>31.8505289718293</text:p>
          </table:table-cell>
          <table:table-cell table:formula="of:=[.C756]+[.D756]" office:value-type="float" office:value="34.2103650128894" calcext:value-type="float">
            <text:p>34.2103650128894</text:p>
          </table:table-cell>
        </table:table-row>
        <table:table-row table:style-name="ro1">
          <table:table-cell office:value-type="date" office:date-value="2026-06-29" calcext:value-type="date">
            <text:p>2026-06-29</text:p>
          </table:table-cell>
          <table:table-cell/>
          <table:table-cell table:formula="of:=COM.MICROSOFT.FORECAST.ETS([.A757];[.B$2:.B$733];[.A$2:.A$733];1;1;1)" office:value-type="float" office:value="33.024390593367" calcext:value-type="float">
            <text:p>33.024390593367</text:p>
          </table:table-cell>
          <table:table-cell table:formula="of:=COM.MICROSOFT.FORECAST.ETS.CONFINT([.A757];[.B$2:.B$733];[.A$2:.A$733];0.95)" office:value-type="float" office:value="1.17681822406578" calcext:value-type="float">
            <text:p>1.17681822406578</text:p>
          </table:table-cell>
          <table:table-cell table:formula="of:=[.C757]-[.D757]" office:value-type="float" office:value="31.8475723693012" calcext:value-type="float">
            <text:p>31.8475723693012</text:p>
          </table:table-cell>
          <table:table-cell table:formula="of:=[.C757]+[.D757]" office:value-type="float" office:value="34.2012088174328" calcext:value-type="float">
            <text:p>34.2012088174328</text:p>
          </table:table-cell>
        </table:table-row>
        <table:table-row table:style-name="ro1">
          <table:table-cell office:value-type="date" office:date-value="2026-06-30" calcext:value-type="date">
            <text:p>2026-06-30</text:p>
          </table:table-cell>
          <table:table-cell/>
          <table:table-cell table:formula="of:=COM.MICROSOFT.FORECAST.ETS([.A758];[.B$2:.B$733];[.A$2:.A$733];1;1;1)" office:value-type="float" office:value="32.9999974356358" calcext:value-type="float">
            <text:p>32.9999974356358</text:p>
          </table:table-cell>
          <table:table-cell table:formula="of:=COM.MICROSOFT.FORECAST.ETS.CONFINT([.A758];[.B$2:.B$733];[.A$2:.A$733];0.95)" office:value-type="float" office:value="1.16195114886742" calcext:value-type="float">
            <text:p>1.16195114886742</text:p>
          </table:table-cell>
          <table:table-cell table:formula="of:=[.C758]-[.D758]" office:value-type="float" office:value="31.8380462867684" calcext:value-type="float">
            <text:p>31.8380462867684</text:p>
          </table:table-cell>
          <table:table-cell table:formula="of:=[.C758]+[.D758]" office:value-type="float" office:value="34.1619485845032" calcext:value-type="float">
            <text:p>34.1619485845032</text:p>
          </table:table-cell>
        </table:table-row>
        <table:table-row table:style-name="ro1">
          <table:table-cell office:value-type="date" office:date-value="2026-07-01" calcext:value-type="date">
            <text:p>2026-07-01</text:p>
          </table:table-cell>
          <table:table-cell/>
          <table:table-cell table:formula="of:=COM.MICROSOFT.FORECAST.ETS([.A759];[.B$2:.B$733];[.A$2:.A$733];1;1;1)" office:value-type="float" office:value="32.9790995399749" calcext:value-type="float">
            <text:p>32.9790995399749</text:p>
          </table:table-cell>
          <table:table-cell table:formula="of:=COM.MICROSOFT.FORECAST.ETS.CONFINT([.A759];[.B$2:.B$733];[.A$2:.A$733];0.95)" office:value-type="float" office:value="1.41628861196531" calcext:value-type="float">
            <text:p>1.41628861196531</text:p>
          </table:table-cell>
          <table:table-cell table:formula="of:=[.C759]-[.D759]" office:value-type="float" office:value="31.5628109280095" calcext:value-type="float">
            <text:p>31.5628109280095</text:p>
          </table:table-cell>
          <table:table-cell table:formula="of:=[.C759]+[.D759]" office:value-type="float" office:value="34.3953881519402" calcext:value-type="float">
            <text:p>34.3953881519402</text:p>
          </table:table-cell>
        </table:table-row>
        <table:table-row table:style-name="ro1">
          <table:table-cell office:value-type="date" office:date-value="2026-07-02" calcext:value-type="date">
            <text:p>2026-07-02</text:p>
          </table:table-cell>
          <table:table-cell/>
          <table:table-cell table:formula="of:=COM.MICROSOFT.FORECAST.ETS([.A760];[.B$2:.B$733];[.A$2:.A$733];1;1;1)" office:value-type="float" office:value="33.0638364425585" calcext:value-type="float">
            <text:p>33.0638364425585</text:p>
          </table:table-cell>
          <table:table-cell table:formula="of:=COM.MICROSOFT.FORECAST.ETS.CONFINT([.A760];[.B$2:.B$733];[.A$2:.A$733];0.95)" office:value-type="float" office:value="1.26645231221065" calcext:value-type="float">
            <text:p>1.26645231221065</text:p>
          </table:table-cell>
          <table:table-cell table:formula="of:=[.C760]-[.D760]" office:value-type="float" office:value="31.7973841303478" calcext:value-type="float">
            <text:p>31.7973841303478</text:p>
          </table:table-cell>
          <table:table-cell table:formula="of:=[.C760]+[.D760]" office:value-type="float" office:value="34.3302887547691" calcext:value-type="float">
            <text:p>34.3302887547691</text:p>
          </table:table-cell>
        </table:table-row>
        <table:table-row table:style-name="ro1">
          <table:table-cell office:value-type="date" office:date-value="2026-07-03" calcext:value-type="date">
            <text:p>2026-07-03</text:p>
          </table:table-cell>
          <table:table-cell/>
          <table:table-cell table:formula="of:=COM.MICROSOFT.FORECAST.ETS([.A761];[.B$2:.B$733];[.A$2:.A$733];1;1;1)" office:value-type="float" office:value="32.9437247439648" calcext:value-type="float">
            <text:p>32.9437247439648</text:p>
          </table:table-cell>
          <table:table-cell table:formula="of:=COM.MICROSOFT.FORECAST.ETS.CONFINT([.A761];[.B$2:.B$733];[.A$2:.A$733];0.95)" office:value-type="float" office:value="1.27211587042182" calcext:value-type="float">
            <text:p>1.27211587042182</text:p>
          </table:table-cell>
          <table:table-cell table:formula="of:=[.C761]-[.D761]" office:value-type="float" office:value="31.671608873543" calcext:value-type="float">
            <text:p>31.671608873543</text:p>
          </table:table-cell>
          <table:table-cell table:formula="of:=[.C761]+[.D761]" office:value-type="float" office:value="34.2158406143866" calcext:value-type="float">
            <text:p>34.2158406143866</text:p>
          </table:table-cell>
        </table:table-row>
        <table:table-row table:style-name="ro1">
          <table:table-cell office:value-type="date" office:date-value="2026-07-04" calcext:value-type="date">
            <text:p>2026-07-04</text:p>
          </table:table-cell>
          <table:table-cell/>
          <table:table-cell table:formula="of:=COM.MICROSOFT.FORECAST.ETS([.A762];[.B$2:.B$733];[.A$2:.A$733];1;1;1)" office:value-type="float" office:value="32.9214053602269" calcext:value-type="float">
            <text:p>32.9214053602269</text:p>
          </table:table-cell>
          <table:table-cell table:formula="of:=COM.MICROSOFT.FORECAST.ETS.CONFINT([.A762];[.B$2:.B$733];[.A$2:.A$733];0.95)" office:value-type="float" office:value="1.30824954107847" calcext:value-type="float">
            <text:p>1.30824954107847</text:p>
          </table:table-cell>
          <table:table-cell table:formula="of:=[.C762]-[.D762]" office:value-type="float" office:value="31.6131558191485" calcext:value-type="float">
            <text:p>31.6131558191485</text:p>
          </table:table-cell>
          <table:table-cell table:formula="of:=[.C762]+[.D762]" office:value-type="float" office:value="34.2296549013054" calcext:value-type="float">
            <text:p>34.2296549013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 style:data-style-name="N2" text:time-value="18:59:17.694557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6-06T19:19:49.644990373</dc:date>
    <meta:editing-duration>PT21M38S</meta:editing-duration>
    <meta:editing-cycles>7</meta:editing-cycles>
    <meta:document-statistic meta:table-count="2" meta:cell-count="513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6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14.243cm" xlink:href=".." xlink:type="simple" chart:class="chart:line" chart:style-name="ch1">
        <chart:legend chart:legend-position="bottom" svg:x="2.746cm" svg:y="13.644cm" style:legend-expansion="wide" chart:style-name="ch2"/>
        <chart:plot-area chart:style-name="ch3" svg:x="0.32cm" svg:y="0.284cm" svg:width="15.378cm" svg:height="12.892cm">
          <chart:coordinate-region svg:x="1.706cm" svg:y="0.483cm" svg:width="13.851cm" svg:height="10.919cm"/>
          <chart:axis chart:dimension="x" chart:name="primary-x" chart:style-name="ch4" chartooo:axis-type="date">
            <chartooo:date-scale/>
            <chart:categories table:cell-range-address="Forecast.A2:Forecast.A7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recast.B2:Forecast.B762" chart:label-cell-address="Forecast.B1:Forecast.B1" chart:class="chart:line">
            <chart:data-point chart:repeated="761"/>
          </chart:series>
          <chart:series chart:style-name="ch8" chart:values-cell-range-address="Forecast.C2:Forecast.C762" chart:label-cell-address="Forecast.C1:Forecast.C1" chart:class="chart:line">
            <chart:data-point chart:repeated="761"/>
          </chart:series>
          <chart:series chart:style-name="ch9" chart:values-cell-range-address="Forecast.D2:Forecast.D762" chart:label-cell-address="Forecast.D1:Forecast.D1" chart:class="chart:line">
            <chart:data-point chart:repeated="761"/>
          </chart:series>
          <chart:series chart:style-name="ch10" chart:values-cell-range-address="Forecast.E2:Forecast.E762" chart:label-cell-address="Forecast.E1:Forecast.E1" chart:class="chart:line">
            <chart:data-point chart:repeated="761"/>
          </chart:series>
          <chart:series chart:style-name="ch11" chart:values-cell-range-address="Forecast.F2:Forecast.F762" chart:label-cell-address="Forecast.F1:Forecast.F1" chart:class="chart:line">
            <chart:data-point chart:repeated="7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Forecast.B1:Forecast.B1</svg:desc>
                </draw:g>
              </table:table-cell>
              <table:table-cell office:value-type="string">
                <text:p>Forecast</text:p>
                <draw:g>
                  <svg:desc>Forecast.C1:Forecast.C1</svg:desc>
                </draw:g>
              </table:table-cell>
              <table:table-cell office:value-type="string">
                <text:p>PI/CI</text:p>
                <draw:g>
                  <svg:desc>Forecast.D1:Forecast.D1</svg:desc>
                </draw:g>
              </table:table-cell>
              <table:table-cell office:value-type="string">
                <text:p>Lower</text:p>
                <draw:g>
                  <svg:desc>Forecast.E1:Forecast.E1</svg:desc>
                </draw:g>
              </table:table-cell>
              <table:table-cell office:value-type="string">
                <text:p>Upper</text:p>
                <draw:g>
                  <svg:desc>Forecast.F1:Forecast.F1</svg:desc>
                </draw:g>
              </table:table-cell>
            </table:table-row>
          </table:table-header-rows>
          <table:table-rows>
            <table:table-row>
              <table:table-cell office:value-type="float" office:value="45447">
                <text:p>45447</text:p>
                <draw:g>
                  <svg:desc>Forecast.A2:Forecast.A762</svg:desc>
                </draw:g>
              </table:table-cell>
              <table:table-cell office:value-type="float" office:value="25.3223">
                <text:p>25.3223</text:p>
                <draw:g>
                  <svg:desc>Forecast.B2:Forecast.B762</svg:desc>
                </draw:g>
              </table:table-cell>
              <table:table-cell office:value-type="float" office:value="NaN">
                <text:p>NaN</text:p>
                <draw:g>
                  <svg:desc>Forecast.C2:Forecast.C762</svg:desc>
                </draw:g>
              </table:table-cell>
              <table:table-cell office:value-type="float" office:value="NaN">
                <text:p>NaN</text:p>
                <draw:g>
                  <svg:desc>Forecast.D2:Forecast.D762</svg:desc>
                </draw:g>
              </table:table-cell>
              <table:table-cell office:value-type="float" office:value="NaN">
                <text:p>NaN</text:p>
                <draw:g>
                  <svg:desc>Forecast.E2:Forecast.E762</svg:desc>
                </draw:g>
              </table:table-cell>
              <table:table-cell office:value-type="float" office:value="NaN">
                <text:p>NaN</text:p>
                <draw:g>
                  <svg:desc>Forecast.F2:Forecast.F762</svg:desc>
                </draw:g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25.3126">
                <text:p>25.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25.2899">
                <text:p>25.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25.2283">
                <text:p>25.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25.2283">
                <text:p>25.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25.2283">
                <text:p>25.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25.1894">
                <text:p>25.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25.102">
                <text:p>25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25.0826">
                <text:p>25.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24.9757">
                <text:p>24.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24.8721">
                <text:p>24.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24.8721">
                <text:p>24.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24.8721">
                <text:p>24.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25.0372">
                <text:p>25.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25.1473">
                <text:p>25.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25.1473">
                <text:p>25.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25.2835">
                <text:p>25.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25.3028">
                <text:p>25.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25.3028">
                <text:p>25.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25.3028">
                <text:p>25.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25.6559">
                <text:p>25.6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25.4518">
                <text:p>25.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25.3452">
                <text:p>25.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25.2928">
                <text:p>25.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5.4532">
                <text:p>25.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25.4532">
                <text:p>25.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25.4532">
                <text:p>25.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5.3386">
                <text:p>25.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5.3517">
                <text:p>25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5.2633">
                <text:p>25.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25.2633">
                <text:p>25.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5.2109">
                <text:p>25.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25.2109">
                <text:p>25.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25.2109">
                <text:p>25.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5.2338">
                <text:p>25.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5.2404">
                <text:p>25.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5.4891">
                <text:p>25.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5.8001">
                <text:p>25.8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6.0685">
                <text:p>26.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26.0685">
                <text:p>26.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26.0685">
                <text:p>26.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6.1635">
                <text:p>26.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6.5988">
                <text:p>26.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6.9458">
                <text:p>26.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6.7133">
                <text:p>26.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6.5497">
                <text:p>26.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26.5497">
                <text:p>26.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26.5497">
                <text:p>26.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6.5727">
                <text:p>26.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6.3435">
                <text:p>26.3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6.4155">
                <text:p>26.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6.5727">
                <text:p>26.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6.9949">
                <text:p>26.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26.9949">
                <text:p>26.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26.9949">
                <text:p>26.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6.8901">
                <text:p>26.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7.1029">
                <text:p>27.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7.0309">
                <text:p>27.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6.7625">
                <text:p>26.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26.4482">
                <text:p>26.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26.4482">
                <text:p>26.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26.4482">
                <text:p>26.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25.8525">
                <text:p>25.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5.9834">
                <text:p>25.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5.823">
                <text:p>25.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6.2584">
                <text:p>26.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6.242">
                <text:p>26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26.242">
                <text:p>26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26.242">
                <text:p>26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6.1176">
                <text:p>26.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6.3959">
                <text:p>26.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6.4286">
                <text:p>26.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6.7068">
                <text:p>26.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6.828">
                <text:p>26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26.828">
                <text:p>26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26.828">
                <text:p>26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6.985">
                <text:p>26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6.9131">
                <text:p>26.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7.0276">
                <text:p>27.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6.9523">
                <text:p>26.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7.3386">
                <text:p>27.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27.3386">
                <text:p>27.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27.3386">
                <text:p>27.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7.3713">
                <text:p>27.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7.3254">
                <text:p>27.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7.332">
                <text:p>27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7.4499">
                <text:p>27.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7.6691">
                <text:p>27.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27.6691">
                <text:p>27.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7.6691">
                <text:p>27.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7.6691">
                <text:p>27.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7.4237">
                <text:p>27.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7.332">
                <text:p>27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7.0734">
                <text:p>27.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6.8411">
                <text:p>26.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26.8411">
                <text:p>26.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26.8411">
                <text:p>26.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7.1651">
                <text:p>27.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7.188">
                <text:p>27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7.0211">
                <text:p>27.0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7.0472">
                <text:p>27.0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7.2862">
                <text:p>27.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27.2862">
                <text:p>27.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27.2862">
                <text:p>27.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7.5448">
                <text:p>27.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7.5252">
                <text:p>27.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7.5415">
                <text:p>27.5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7.7805">
                <text:p>27.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7.6528">
                <text:p>27.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27.6528">
                <text:p>27.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27.6528">
                <text:p>27.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7.8001">
                <text:p>27.8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27.8426">
                <text:p>27.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27.5337">
                <text:p>27.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27.6559">
                <text:p>27.6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27.8277">
                <text:p>27.8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27.8277">
                <text:p>27.8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27.8277">
                <text:p>27.8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27.9168">
                <text:p>27.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27.9003">
                <text:p>27.9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27.9201">
                <text:p>27.9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27.8475">
                <text:p>27.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27.9565">
                <text:p>27.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27.9565">
                <text:p>27.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27.9565">
                <text:p>27.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27.8408">
                <text:p>27.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27.7946">
                <text:p>27.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28.0556">
                <text:p>28.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27.9466">
                <text:p>27.9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28.2768">
                <text:p>28.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28.2768">
                <text:p>28.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28.2768">
                <text:p>28.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28.4254">
                <text:p>28.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28.3065">
                <text:p>28.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28.5344">
                <text:p>28.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28.5443">
                <text:p>28.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28.5443">
                <text:p>28.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28.5443">
                <text:p>28.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28.5443">
                <text:p>28.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28.2074">
                <text:p>28.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28.0687">
                <text:p>28.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8.0192">
                <text:p>28.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28.0687">
                <text:p>28.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7.8904">
                <text:p>27.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27.8904">
                <text:p>27.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27.8904">
                <text:p>27.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8.0588">
                <text:p>28.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7.8309">
                <text:p>27.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7.9201">
                <text:p>27.9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7.9697">
                <text:p>27.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7.8408">
                <text:p>27.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27.8408">
                <text:p>27.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27.8408">
                <text:p>27.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7.8706">
                <text:p>27.8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8.1183">
                <text:p>28.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8.7722">
                <text:p>28.7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8.6434">
                <text:p>28.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8.8118">
                <text:p>28.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28.8118">
                <text:p>28.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28.8118">
                <text:p>28.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28.8911">
                <text:p>28.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8.6434">
                <text:p>28.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8.7425">
                <text:p>28.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8.6137">
                <text:p>28.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8.366">
                <text:p>28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28.366">
                <text:p>28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28.366">
                <text:p>28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8.5245">
                <text:p>28.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8.3759">
                <text:p>28.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8.4452">
                <text:p>28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8.7127">
                <text:p>28.7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9.0793">
                <text:p>29.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29.0793">
                <text:p>29.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29.0793">
                <text:p>29.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9.2378">
                <text:p>29.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9.1784">
                <text:p>29.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9.1685">
                <text:p>29.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29.1685">
                <text:p>29.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9.2577">
                <text:p>29.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29.2577">
                <text:p>29.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29.2577">
                <text:p>29.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9.0694">
                <text:p>29.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8.9109">
                <text:p>28.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8.6731">
                <text:p>28.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8.683">
                <text:p>28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8.5542">
                <text:p>28.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28.5542">
                <text:p>28.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28.5542">
                <text:p>28.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28.5245">
                <text:p>28.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28.4155">
                <text:p>28.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8.13">
                <text:p>2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28.13">
                <text:p>2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28.13">
                <text:p>2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7.81">
                <text:p>2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7.08">
                <text:p>2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6.93">
                <text:p>2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7.29">
                <text:p>2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27.29">
                <text:p>2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27.29">
                <text:p>2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7.37">
                <text:p>2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7.58">
                <text:p>2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27.58">
                <text:p>2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7.59">
                <text:p>2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7.47">
                <text:p>2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27.47">
                <text:p>2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27.47">
                <text:p>2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7.23">
                <text:p>27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7.26">
                <text:p>2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7.44">
                <text:p>2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27.44">
                <text:p>2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27.44">
                <text:p>2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7.27">
                <text:p>2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7.26">
                <text:p>2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7.01">
                <text:p>2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27.01">
                <text:p>2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27.01">
                <text:p>2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7.52">
                <text:p>27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7.82">
                <text:p>27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7.99">
                <text:p>2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27.99">
                <text:p>2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27.99">
                <text:p>2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27.99">
                <text:p>2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8.22">
                <text:p>2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7.92">
                <text:p>2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8.09">
                <text:p>2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8.07">
                <text:p>2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28.07">
                <text:p>2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28.07">
                <text:p>2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8.07">
                <text:p>2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8.01">
                <text:p>28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7.98">
                <text:p>27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7.72">
                <text:p>27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7.76">
                <text:p>2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7.95">
                <text:p>2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27.68">
                <text:p>2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27.65">
                <text:p>27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7.85">
                <text:p>2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27.79">
                <text:p>2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27.79">
                <text:p>2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27.79">
                <text:p>2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27.79">
                <text:p>2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27.99">
                <text:p>2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28.18">
                <text:p>2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28.32">
                <text:p>2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28.21">
                <text:p>2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28.21">
                <text:p>2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28.21">
                <text:p>2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28.26">
                <text:p>28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28.15">
                <text:p>2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28.17">
                <text:p>2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28.54">
                <text:p>2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28.54">
                <text:p>2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28.54">
                <text:p>2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8.4">
                <text:p>2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27.92">
                <text:p>2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28.05">
                <text:p>2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28.07">
                <text:p>2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28.46">
                <text:p>2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28.46">
                <text:p>2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28.46">
                <text:p>2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8.38">
                <text:p>2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27.74">
                <text:p>2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7.44">
                <text:p>2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7.29">
                <text:p>2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7.96">
                <text:p>2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27.92">
                <text:p>2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28.03">
                <text:p>28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27.95">
                <text:p>2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27.76">
                <text:p>2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27.76">
                <text:p>2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27.76">
                <text:p>2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8.09">
                <text:p>2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27.84">
                <text:p>2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27.58">
                <text:p>2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27.58">
                <text:p>2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27.58">
                <text:p>2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7.96">
                <text:p>2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26.73">
                <text:p>26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25.28">
                <text:p>2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25.28">
                <text:p>2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25.28">
                <text:p>2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4.94">
                <text:p>2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4.32">
                <text:p>24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25.87">
                <text:p>2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24.97">
                <text:p>2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25.43">
                <text:p>2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25.13">
                <text:p>2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25.42">
                <text:p>2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25.42">
                <text:p>2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25.42">
                <text:p>2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25.42">
                <text:p>2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5.03">
                <text:p>2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25.42">
                <text:p>2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25.71">
                <text:p>25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25.67">
                <text:p>25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25.67">
                <text:p>25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25.67">
                <text:p>25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25.79">
                <text:p>25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25.82">
                <text:p>2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25.71">
                <text:p>25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26.06">
                <text:p>26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26.06">
                <text:p>26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26.06">
                <text:p>26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25.55">
                <text:p>25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25.64">
                <text:p>25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25.78">
                <text:p>2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25.73">
                <text:p>2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25.73">
                <text:p>2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25.73">
                <text:p>2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26.43">
                <text:p>2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26.31">
                <text:p>2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26.42">
                <text:p>2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26.58">
                <text:p>26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26.48">
                <text:p>2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26.01">
                <text:p>26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25.96">
                <text:p>25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26.27">
                <text:p>26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26.04">
                <text:p>26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26.19">
                <text:p>2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26.17">
                <text:p>2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26.17">
                <text:p>2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26.17">
                <text:p>2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26.44">
                <text:p>2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26.29">
                <text:p>26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26.23">
                <text:p>26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26.54">
                <text:p>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26.54">
                <text:p>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26.54">
                <text:p>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26.65">
                <text:p>26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26.95">
                <text:p>2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26.86">
                <text:p>2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27.02">
                <text:p>2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6.92">
                <text:p>2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6.72">
                <text:p>26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6.64">
                <text:p>2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26.64">
                <text:p>2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6.74">
                <text:p>2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6.39">
                <text:p>2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6.39">
                <text:p>2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26.39">
                <text:p>2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26.39">
                <text:p>2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7.05">
                <text:p>2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7.31">
                <text:p>2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7.35">
                <text:p>2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27.35">
                <text:p>2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27.35">
                <text:p>2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27.35">
                <text:p>2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7.06">
                <text:p>2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7.29">
                <text:p>2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7.51">
                <text:p>2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7.31">
                <text:p>2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6.87">
                <text:p>2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6.93">
                <text:p>2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27.14">
                <text:p>2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7.02">
                <text:p>2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27.02">
                <text:p>2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27.02">
                <text:p>2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6.95">
                <text:p>2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7.24">
                <text:p>2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7.38">
                <text:p>2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7.28">
                <text:p>2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27.17">
                <text:p>27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26.84">
                <text:p>26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26.38">
                <text:p>2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26.38">
                <text:p>2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26.38">
                <text:p>2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26.61">
                <text:p>26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6.74">
                <text:p>2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26.68">
                <text:p>26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26.88">
                <text:p>2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26.88">
                <text:p>2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26.88">
                <text:p>2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26.79">
                <text:p>26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27.34">
                <text:p>2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7.26">
                <text:p>2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27.51">
                <text:p>2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27.52">
                <text:p>27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27.95">
                <text:p>2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27.95">
                <text:p>2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27.95">
                <text:p>2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27.77">
                <text:p>2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27.82">
                <text:p>27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27.92">
                <text:p>2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27.92">
                <text:p>2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27.92">
                <text:p>2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27.92">
                <text:p>2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27.84">
                <text:p>2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27.69">
                <text:p>2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6">
                <text:p>45906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7">
                <text:p>45907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27.44">
                <text:p>2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27.72">
                <text:p>27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27.48">
                <text:p>27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3">
                <text:p>45913</text:p>
              </table:table-cell>
              <table:table-cell office:value-type="float" office:value="27.48">
                <text:p>27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4">
                <text:p>45914</text:p>
              </table:table-cell>
              <table:table-cell office:value-type="float" office:value="27.48">
                <text:p>27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27.34">
                <text:p>2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27.42">
                <text:p>2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27.47">
                <text:p>2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1">
                <text:p>45921</text:p>
              </table:table-cell>
              <table:table-cell office:value-type="float" office:value="27.33">
                <text:p>2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27.25">
                <text:p>2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27.16">
                <text:p>2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26.99">
                <text:p>2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27.21">
                <text:p>2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7">
                <text:p>45927</text:p>
              </table:table-cell>
              <table:table-cell office:value-type="float" office:value="27.21">
                <text:p>2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8">
                <text:p>45928</text:p>
              </table:table-cell>
              <table:table-cell office:value-type="float" office:value="27.21">
                <text:p>2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27.53">
                <text:p>27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27.34">
                <text:p>2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27.41">
                <text:p>2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27.41">
                <text:p>2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27.41">
                <text:p>2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27.34">
                <text:p>2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27.28">
                <text:p>2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27.18">
                <text:p>27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26.54">
                <text:p>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26.54">
                <text:p>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26.54">
                <text:p>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26.63">
                <text:p>2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26.87">
                <text:p>2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26.78">
                <text:p>2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26.57">
                <text:p>26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26.79">
                <text:p>26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26.79">
                <text:p>26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26.79">
                <text:p>26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26.99">
                <text:p>2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27.07">
                <text:p>27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26.99">
                <text:p>2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27.03">
                <text:p>27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27.03">
                <text:p>27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27.03">
                <text:p>27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27.03">
                <text:p>27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27.12">
                <text:p>2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26.74">
                <text:p>2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26.68">
                <text:p>26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26.47">
                <text:p>2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26.44">
                <text:p>2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26.57">
                <text:p>26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26.52">
                <text:p>26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26.72">
                <text:p>26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26.72">
                <text:p>26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26.72">
                <text:p>26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26.77">
                <text:p>26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27.18">
                <text:p>27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27.19">
                <text:p>2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27.22">
                <text:p>2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27.24">
                <text:p>2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27.24">
                <text:p>2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27.24">
                <text:p>2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27.16">
                <text:p>2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26.93">
                <text:p>2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26.95">
                <text:p>2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27.32">
                <text:p>2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27.59">
                <text:p>2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27.59">
                <text:p>2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27.59">
                <text:p>2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27.53">
                <text:p>27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27.71">
                <text:p>2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27.71">
                <text:p>2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27.71">
                <text:p>2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27.58">
                <text:p>2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27.57">
                <text:p>2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27.68">
                <text:p>2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27.68">
                <text:p>2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27.68">
                <text:p>2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27.68">
                <text:p>2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27.76">
                <text:p>2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27.47">
                <text:p>2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27.48">
                <text:p>27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27.54">
                <text:p>27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27.63">
                <text:p>2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27.43">
                <text:p>2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27.43">
                <text:p>2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27.73">
                <text:p>2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27.73">
                <text:p>2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27.73">
                <text:p>2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27.91">
                <text:p>27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28.09">
                <text:p>2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28.42">
                <text:p>2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28.55">
                <text:p>2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28.55">
                <text:p>2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28.55">
                <text:p>2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29.04">
                <text:p>2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29.03">
                <text:p>2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29.15">
                <text:p>2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29.17">
                <text:p>2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29.14">
                <text:p>2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29.14">
                <text:p>2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29.14">
                <text:p>2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29.18">
                <text:p>2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29.82">
                <text:p>2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29.82">
                <text:p>2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29.82">
                <text:p>2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31.01">
                <text:p>3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30.97">
                <text:p>3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31.47">
                <text:p>3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31.47">
                <text:p>3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31.47">
                <text:p>3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31.35">
                <text:p>31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31.64">
                <text:p>31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31.34">
                <text:p>3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31.61">
                <text:p>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31.61">
                <text:p>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31.61">
                <text:p>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31.61">
                <text:p>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31.42">
                <text:p>3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31.56">
                <text:p>3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31.57">
                <text:p>3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31.61">
                <text:p>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31.61">
                <text:p>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31.61">
                <text:p>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31.53">
                <text:p>3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31.64">
                <text:p>31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31.51">
                <text:p>3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31.51">
                <text:p>3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31.77">
                <text:p>31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31.77">
                <text:p>31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31.77">
                <text:p>31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31.86">
                <text:p>3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4">
                <text:p>46084</text:p>
              </table:table-cell>
              <table:table-cell office:value-type="float" office:value="31.59">
                <text:p>31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5">
                <text:p>46085</text:p>
              </table:table-cell>
              <table:table-cell office:value-type="float" office:value="31.54">
                <text:p>3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6">
                <text:p>46086</text:p>
              </table:table-cell>
              <table:table-cell office:value-type="float" office:value="31.26">
                <text:p>31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7">
                <text:p>46087</text:p>
              </table:table-cell>
              <table:table-cell office:value-type="float" office:value="31.13">
                <text:p>3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8">
                <text:p>46088</text:p>
              </table:table-cell>
              <table:table-cell office:value-type="float" office:value="31.13">
                <text:p>3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9">
                <text:p>46089</text:p>
              </table:table-cell>
              <table:table-cell office:value-type="float" office:value="31.13">
                <text:p>3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31.02">
                <text:p>3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1">
                <text:p>46091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2">
                <text:p>4609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3">
                <text:p>46093</text:p>
              </table:table-cell>
              <table:table-cell office:value-type="float" office:value="30.82">
                <text:p>3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4">
                <text:p>46094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5">
                <text:p>46095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6">
                <text:p>46096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30.87">
                <text:p>3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8">
                <text:p>46098</text:p>
              </table:table-cell>
              <table:table-cell office:value-type="float" office:value="30.95">
                <text:p>3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9">
                <text:p>46099</text:p>
              </table:table-cell>
              <table:table-cell office:value-type="float" office:value="30.58">
                <text:p>3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30.59">
                <text:p>3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30.39">
                <text:p>3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2">
                <text:p>46102</text:p>
              </table:table-cell>
              <table:table-cell office:value-type="float" office:value="30.39">
                <text:p>3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3">
                <text:p>46103</text:p>
              </table:table-cell>
              <table:table-cell office:value-type="float" office:value="30.39">
                <text:p>3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30.54">
                <text:p>3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5">
                <text:p>46105</text:p>
              </table:table-cell>
              <table:table-cell office:value-type="float" office:value="30.64">
                <text:p>3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6">
                <text:p>46106</text:p>
              </table:table-cell>
              <table:table-cell office:value-type="float" office:value="30.54">
                <text:p>3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7">
                <text:p>46107</text:p>
              </table:table-cell>
              <table:table-cell office:value-type="float" office:value="30.62">
                <text:p>3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8">
                <text:p>46108</text:p>
              </table:table-cell>
              <table:table-cell office:value-type="float" office:value="30.44">
                <text:p>3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9">
                <text:p>46109</text:p>
              </table:table-cell>
              <table:table-cell office:value-type="float" office:value="30.44">
                <text:p>3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30.44">
                <text:p>3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30.48">
                <text:p>3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30.68">
                <text:p>3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30.51">
                <text:p>3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4">
                <text:p>46114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5">
                <text:p>46115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6">
                <text:p>46116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7">
                <text:p>46117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30.64">
                <text:p>3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9">
                <text:p>46119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30.86">
                <text:p>3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1">
                <text:p>46121</text:p>
              </table:table-cell>
              <table:table-cell office:value-type="float" office:value="30.94">
                <text:p>3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2">
                <text:p>46122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3">
                <text:p>46123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4">
                <text:p>46124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5">
                <text:p>46125</text:p>
              </table:table-cell>
              <table:table-cell office:value-type="float" office:value="30.74">
                <text:p>3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6">
                <text:p>46126</text:p>
              </table:table-cell>
              <table:table-cell office:value-type="float" office:value="30.71">
                <text:p>3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7">
                <text:p>46127</text:p>
              </table:table-cell>
              <table:table-cell office:value-type="float" office:value="30.65">
                <text:p>3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8">
                <text:p>46128</text:p>
              </table:table-cell>
              <table:table-cell office:value-type="float" office:value="30.81">
                <text:p>3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9">
                <text:p>46129</text:p>
              </table:table-cell>
              <table:table-cell office:value-type="float" office:value="31.05">
                <text:p>3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31.05">
                <text:p>3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1">
                <text:p>46131</text:p>
              </table:table-cell>
              <table:table-cell office:value-type="float" office:value="31.05">
                <text:p>3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2">
                <text:p>46132</text:p>
              </table:table-cell>
              <table:table-cell office:value-type="float" office:value="31.03">
                <text:p>3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3">
                <text:p>46133</text:p>
              </table:table-cell>
              <table:table-cell office:value-type="float" office:value="30.98">
                <text:p>3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4">
                <text:p>46134</text:p>
              </table:table-cell>
              <table:table-cell office:value-type="float" office:value="31.01">
                <text:p>3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31.42">
                <text:p>3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7">
                <text:p>46137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8">
                <text:p>46138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9">
                <text:p>46139</text:p>
              </table:table-cell>
              <table:table-cell office:value-type="float" office:value="31.13">
                <text:p>3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31.31">
                <text:p>3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1">
                <text:p>46141</text:p>
              </table:table-cell>
              <table:table-cell office:value-type="float" office:value="31.45">
                <text:p>3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32.07">
                <text:p>32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31.86">
                <text:p>3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31.86">
                <text:p>3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5">
                <text:p>46145</text:p>
              </table:table-cell>
              <table:table-cell office:value-type="float" office:value="31.86">
                <text:p>3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31.52">
                <text:p>3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7">
                <text:p>46147</text:p>
              </table:table-cell>
              <table:table-cell office:value-type="float" office:value="31.69">
                <text:p>3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8">
                <text:p>46148</text:p>
              </table:table-cell>
              <table:table-cell office:value-type="float" office:value="31.66">
                <text:p>3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9">
                <text:p>46149</text:p>
              </table:table-cell>
              <table:table-cell office:value-type="float" office:value="31.54">
                <text:p>3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31.62">
                <text:p>3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1">
                <text:p>46151</text:p>
              </table:table-cell>
              <table:table-cell office:value-type="float" office:value="31.62">
                <text:p>3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2">
                <text:p>46152</text:p>
              </table:table-cell>
              <table:table-cell office:value-type="float" office:value="31.62">
                <text:p>3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3">
                <text:p>46153</text:p>
              </table:table-cell>
              <table:table-cell office:value-type="float" office:value="31.75">
                <text:p>3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4">
                <text:p>46154</text:p>
              </table:table-cell>
              <table:table-cell office:value-type="float" office:value="31.76">
                <text:p>31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5">
                <text:p>46155</text:p>
              </table:table-cell>
              <table:table-cell office:value-type="float" office:value="31.75">
                <text:p>3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31.8">
                <text:p>3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7">
                <text:p>46157</text:p>
              </table:table-cell>
              <table:table-cell office:value-type="float" office:value="31.72">
                <text:p>3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8">
                <text:p>46158</text:p>
              </table:table-cell>
              <table:table-cell office:value-type="float" office:value="31.72">
                <text:p>3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9">
                <text:p>46159</text:p>
              </table:table-cell>
              <table:table-cell office:value-type="float" office:value="31.72">
                <text:p>3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32.04">
                <text:p>3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1">
                <text:p>46161</text:p>
              </table:table-cell>
              <table:table-cell office:value-type="float" office:value="32.1">
                <text:p>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32.12">
                <text:p>3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3">
                <text:p>46163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4">
                <text:p>46164</text:p>
              </table:table-cell>
              <table:table-cell office:value-type="float" office:value="32.83">
                <text:p>3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5">
                <text:p>46165</text:p>
              </table:table-cell>
              <table:table-cell office:value-type="float" office:value="32.83">
                <text:p>3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6">
                <text:p>46166</text:p>
              </table:table-cell>
              <table:table-cell office:value-type="float" office:value="32.83">
                <text:p>3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7">
                <text:p>46167</text:p>
              </table:table-cell>
              <table:table-cell office:value-type="float" office:value="32.83">
                <text:p>3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8">
                <text:p>46168</text:p>
              </table:table-cell>
              <table:table-cell office:value-type="float" office:value="32.67">
                <text:p>3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9">
                <text:p>46169</text:p>
              </table:table-cell>
              <table:table-cell office:value-type="float" office:value="32.55">
                <text:p>3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32.63">
                <text:p>3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1">
                <text:p>46171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2">
                <text:p>46172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32.18">
                <text:p>3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5">
                <text:p>46175</text:p>
              </table:table-cell>
              <table:table-cell office:value-type="float" office:value="32.37">
                <text:p>3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6">
                <text:p>46176</text:p>
              </table:table-cell>
              <table:table-cell office:value-type="float" office:value="32.37">
                <text:p>3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7">
                <text:p>46177</text:p>
              </table:table-cell>
              <table:table-cell office:value-type="float" office:value="32.59">
                <text:p>32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8">
                <text:p>46178</text:p>
              </table:table-cell>
              <table:table-cell office:value-type="float" office:value="32.3">
                <text:p>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9">
                <text:p>46179</text:p>
              </table:table-cell>
              <table:table-cell office:value-type="float" office:value="NaN">
                <text:p>NaN</text:p>
              </table:table-cell>
              <table:table-cell office:value-type="float" office:value="32.3334785033798">
                <text:p>32.3334785033798</text:p>
              </table:table-cell>
              <table:table-cell office:value-type="float" office:value="0.413631850136142">
                <text:p>0.413631850136142</text:p>
              </table:table-cell>
              <table:table-cell office:value-type="float" office:value="31.9198466532436">
                <text:p>31.9198466532436</text:p>
              </table:table-cell>
              <table:table-cell office:value-type="float" office:value="32.7471103535159">
                <text:p>32.7471103535159</text:p>
              </table:table-cell>
            </table:table-row>
            <table:table-row>
              <table:table-cell office:value-type="float" office:value="46180">
                <text:p>46180</text:p>
              </table:table-cell>
              <table:table-cell office:value-type="float" office:value="NaN">
                <text:p>NaN</text:p>
              </table:table-cell>
              <table:table-cell office:value-type="float" office:value="32.3119474973895">
                <text:p>32.3119474973895</text:p>
              </table:table-cell>
              <table:table-cell office:value-type="float" office:value="0.474251192813163">
                <text:p>0.474251192813163</text:p>
              </table:table-cell>
              <table:table-cell office:value-type="float" office:value="31.8376963045764">
                <text:p>31.8376963045764</text:p>
              </table:table-cell>
              <table:table-cell office:value-type="float" office:value="32.7861986902027">
                <text:p>32.7861986902027</text:p>
              </table:table-cell>
            </table:table-row>
            <table:table-row>
              <table:table-cell office:value-type="float" office:value="46181">
                <text:p>46181</text:p>
              </table:table-cell>
              <table:table-cell office:value-type="float" office:value="NaN">
                <text:p>NaN</text:p>
              </table:table-cell>
              <table:table-cell office:value-type="float" office:value="32.2013871814855">
                <text:p>32.2013871814855</text:p>
              </table:table-cell>
              <table:table-cell office:value-type="float" office:value="0.540973688281028">
                <text:p>0.540973688281028</text:p>
              </table:table-cell>
              <table:table-cell office:value-type="float" office:value="31.6604134932045">
                <text:p>31.6604134932045</text:p>
              </table:table-cell>
              <table:table-cell office:value-type="float" office:value="32.7423608697666">
                <text:p>32.7423608697666</text:p>
              </table:table-cell>
            </table:table-row>
            <table:table-row>
              <table:table-cell office:value-type="float" office:value="46182">
                <text:p>46182</text:p>
              </table:table-cell>
              <table:table-cell office:value-type="float" office:value="NaN">
                <text:p>NaN</text:p>
              </table:table-cell>
              <table:table-cell office:value-type="float" office:value="32.2346125145361">
                <text:p>32.2346125145361</text:p>
              </table:table-cell>
              <table:table-cell office:value-type="float" office:value="0.58549233576862">
                <text:p>0.58549233576862</text:p>
              </table:table-cell>
              <table:table-cell office:value-type="float" office:value="31.6491201787674">
                <text:p>31.6491201787674</text:p>
              </table:table-cell>
              <table:table-cell office:value-type="float" office:value="32.8201048503047">
                <text:p>32.8201048503047</text:p>
              </table:table-cell>
            </table:table-row>
            <table:table-row>
              <table:table-cell office:value-type="float" office:value="46183">
                <text:p>46183</text:p>
              </table:table-cell>
              <table:table-cell office:value-type="float" office:value="NaN">
                <text:p>NaN</text:p>
              </table:table-cell>
              <table:table-cell office:value-type="float" office:value="32.0995577198893">
                <text:p>32.0995577198893</text:p>
              </table:table-cell>
              <table:table-cell office:value-type="float" office:value="0.649314932069316">
                <text:p>0.649314932069316</text:p>
              </table:table-cell>
              <table:table-cell office:value-type="float" office:value="31.4502427878199">
                <text:p>31.4502427878199</text:p>
              </table:table-cell>
              <table:table-cell office:value-type="float" office:value="32.7488726519586">
                <text:p>32.7488726519586</text:p>
              </table:table-cell>
            </table:table-row>
            <table:table-row>
              <table:table-cell office:value-type="float" office:value="46184">
                <text:p>46184</text:p>
              </table:table-cell>
              <table:table-cell office:value-type="float" office:value="NaN">
                <text:p>NaN</text:p>
              </table:table-cell>
              <table:table-cell office:value-type="float" office:value="32.0372766776174">
                <text:p>32.0372766776174</text:p>
              </table:table-cell>
              <table:table-cell office:value-type="float" office:value="0.585954328589125">
                <text:p>0.585954328589125</text:p>
              </table:table-cell>
              <table:table-cell office:value-type="float" office:value="31.4513223490283">
                <text:p>31.4513223490283</text:p>
              </table:table-cell>
              <table:table-cell office:value-type="float" office:value="32.6232310062065">
                <text:p>32.6232310062065</text:p>
              </table:table-cell>
            </table:table-row>
            <table:table-row>
              <table:table-cell office:value-type="float" office:value="46185">
                <text:p>46185</text:p>
              </table:table-cell>
              <table:table-cell office:value-type="float" office:value="NaN">
                <text:p>NaN</text:p>
              </table:table-cell>
              <table:table-cell office:value-type="float" office:value="32.1407887346205">
                <text:p>32.1407887346205</text:p>
              </table:table-cell>
              <table:table-cell office:value-type="float" office:value="0.712855286573721">
                <text:p>0.712855286573721</text:p>
              </table:table-cell>
              <table:table-cell office:value-type="float" office:value="31.4279334480468">
                <text:p>31.4279334480468</text:p>
              </table:table-cell>
              <table:table-cell office:value-type="float" office:value="32.8536440211942">
                <text:p>32.8536440211942</text:p>
              </table:table-cell>
            </table:table-row>
            <table:table-row>
              <table:table-cell office:value-type="float" office:value="46186">
                <text:p>46186</text:p>
              </table:table-cell>
              <table:table-cell office:value-type="float" office:value="NaN">
                <text:p>NaN</text:p>
              </table:table-cell>
              <table:table-cell office:value-type="float" office:value="32.2863401780127">
                <text:p>32.2863401780127</text:p>
              </table:table-cell>
              <table:table-cell office:value-type="float" office:value="0.763459085234757">
                <text:p>0.763459085234757</text:p>
              </table:table-cell>
              <table:table-cell office:value-type="float" office:value="31.5228810927779">
                <text:p>31.5228810927779</text:p>
              </table:table-cell>
              <table:table-cell office:value-type="float" office:value="33.0497992632475">
                <text:p>33.0497992632475</text:p>
              </table:table-cell>
            </table:table-row>
            <table:table-row>
              <table:table-cell office:value-type="float" office:value="46187">
                <text:p>46187</text:p>
              </table:table-cell>
              <table:table-cell office:value-type="float" office:value="NaN">
                <text:p>NaN</text:p>
              </table:table-cell>
              <table:table-cell office:value-type="float" office:value="32.4957789618726">
                <text:p>32.4957789618726</text:p>
              </table:table-cell>
              <table:table-cell office:value-type="float" office:value="0.741405160225874">
                <text:p>0.741405160225874</text:p>
              </table:table-cell>
              <table:table-cell office:value-type="float" office:value="31.7543738016468">
                <text:p>31.7543738016468</text:p>
              </table:table-cell>
              <table:table-cell office:value-type="float" office:value="33.2371841220985">
                <text:p>33.2371841220985</text:p>
              </table:table-cell>
            </table:table-row>
            <table:table-row>
              <table:table-cell office:value-type="float" office:value="46188">
                <text:p>46188</text:p>
              </table:table-cell>
              <table:table-cell office:value-type="float" office:value="NaN">
                <text:p>NaN</text:p>
              </table:table-cell>
              <table:table-cell office:value-type="float" office:value="32.7553291361557">
                <text:p>32.7553291361557</text:p>
              </table:table-cell>
              <table:table-cell office:value-type="float" office:value="0.822444168614815">
                <text:p>0.822444168614815</text:p>
              </table:table-cell>
              <table:table-cell office:value-type="float" office:value="31.9328849675409">
                <text:p>31.9328849675409</text:p>
              </table:table-cell>
              <table:table-cell office:value-type="float" office:value="33.5777733047705">
                <text:p>33.5777733047705</text:p>
              </table:table-cell>
            </table:table-row>
            <table:table-row>
              <table:table-cell office:value-type="float" office:value="46189">
                <text:p>46189</text:p>
              </table:table-cell>
              <table:table-cell office:value-type="float" office:value="NaN">
                <text:p>NaN</text:p>
              </table:table-cell>
              <table:table-cell office:value-type="float" office:value="32.9125760769775">
                <text:p>32.9125760769775</text:p>
              </table:table-cell>
              <table:table-cell office:value-type="float" office:value="0.892608567362181">
                <text:p>0.892608567362181</text:p>
              </table:table-cell>
              <table:table-cell office:value-type="float" office:value="32.0199675096154">
                <text:p>32.0199675096154</text:p>
              </table:table-cell>
              <table:table-cell office:value-type="float" office:value="33.8051846443397">
                <text:p>33.8051846443397</text:p>
              </table:table-cell>
            </table:table-row>
            <table:table-row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33.0812312334205">
                <text:p>33.0812312334205</text:p>
              </table:table-cell>
              <table:table-cell office:value-type="float" office:value="0.929140716393086">
                <text:p>0.929140716393086</text:p>
              </table:table-cell>
              <table:table-cell office:value-type="float" office:value="32.1520905170274">
                <text:p>32.1520905170274</text:p>
              </table:table-cell>
              <table:table-cell office:value-type="float" office:value="34.0103719498136">
                <text:p>34.0103719498136</text:p>
              </table:table-cell>
            </table:table-row>
            <table:table-row>
              <table:table-cell office:value-type="float" office:value="46191">
                <text:p>46191</text:p>
              </table:table-cell>
              <table:table-cell office:value-type="float" office:value="NaN">
                <text:p>NaN</text:p>
              </table:table-cell>
              <table:table-cell office:value-type="float" office:value="33.0986766380086">
                <text:p>33.0986766380086</text:p>
              </table:table-cell>
              <table:table-cell office:value-type="float" office:value="0.921934618509432">
                <text:p>0.921934618509432</text:p>
              </table:table-cell>
              <table:table-cell office:value-type="float" office:value="32.1767420194992">
                <text:p>32.1767420194992</text:p>
              </table:table-cell>
              <table:table-cell office:value-type="float" office:value="34.0206112565181">
                <text:p>34.0206112565181</text:p>
              </table:table-cell>
            </table:table-row>
            <table:table-row>
              <table:table-cell office:value-type="float" office:value="46192">
                <text:p>46192</text:p>
              </table:table-cell>
              <table:table-cell office:value-type="float" office:value="NaN">
                <text:p>NaN</text:p>
              </table:table-cell>
              <table:table-cell office:value-type="float" office:value="33.073652675952">
                <text:p>33.073652675952</text:p>
              </table:table-cell>
              <table:table-cell office:value-type="float" office:value="0.935242901554872">
                <text:p>0.935242901554872</text:p>
              </table:table-cell>
              <table:table-cell office:value-type="float" office:value="32.1384097743971">
                <text:p>32.1384097743971</text:p>
              </table:table-cell>
              <table:table-cell office:value-type="float" office:value="34.0088955775069">
                <text:p>34.0088955775069</text:p>
              </table:table-cell>
            </table:table-row>
            <table:table-row>
              <table:table-cell office:value-type="float" office:value="46193">
                <text:p>46193</text:p>
              </table:table-cell>
              <table:table-cell office:value-type="float" office:value="NaN">
                <text:p>NaN</text:p>
              </table:table-cell>
              <table:table-cell office:value-type="float" office:value="33.0781130620963">
                <text:p>33.0781130620963</text:p>
              </table:table-cell>
              <table:table-cell office:value-type="float" office:value="0.877164424611351">
                <text:p>0.877164424611351</text:p>
              </table:table-cell>
              <table:table-cell office:value-type="float" office:value="32.200948637485">
                <text:p>32.200948637485</text:p>
              </table:table-cell>
              <table:table-cell office:value-type="float" office:value="33.9552774867077">
                <text:p>33.9552774867077</text:p>
              </table:table-cell>
            </table:table-row>
            <table:table-row>
              <table:table-cell office:value-type="float" office:value="46194">
                <text:p>46194</text:p>
              </table:table-cell>
              <table:table-cell office:value-type="float" office:value="NaN">
                <text:p>NaN</text:p>
              </table:table-cell>
              <table:table-cell office:value-type="float" office:value="33.0080615596973">
                <text:p>33.0080615596973</text:p>
              </table:table-cell>
              <table:table-cell office:value-type="float" office:value="1.06657696339526">
                <text:p>1.06657696339526</text:p>
              </table:table-cell>
              <table:table-cell office:value-type="float" office:value="31.941484596302">
                <text:p>31.941484596302</text:p>
              </table:table-cell>
              <table:table-cell office:value-type="float" office:value="34.0746385230925">
                <text:p>34.0746385230925</text:p>
              </table:table-cell>
            </table:table-row>
            <table:table-row>
              <table:table-cell office:value-type="float" office:value="46195">
                <text:p>46195</text:p>
              </table:table-cell>
              <table:table-cell office:value-type="float" office:value="NaN">
                <text:p>NaN</text:p>
              </table:table-cell>
              <table:table-cell office:value-type="float" office:value="33.0103949922604">
                <text:p>33.0103949922604</text:p>
              </table:table-cell>
              <table:table-cell office:value-type="float" office:value="1.08825447543776">
                <text:p>1.08825447543776</text:p>
              </table:table-cell>
              <table:table-cell office:value-type="float" office:value="31.9221405168226">
                <text:p>31.9221405168226</text:p>
              </table:table-cell>
              <table:table-cell office:value-type="float" office:value="34.0986494676981">
                <text:p>34.0986494676981</text:p>
              </table:table-cell>
            </table:table-row>
            <table:table-row>
              <table:table-cell office:value-type="float" office:value="46196">
                <text:p>46196</text:p>
              </table:table-cell>
              <table:table-cell office:value-type="float" office:value="NaN">
                <text:p>NaN</text:p>
              </table:table-cell>
              <table:table-cell office:value-type="float" office:value="32.9863334048281">
                <text:p>32.9863334048281</text:p>
              </table:table-cell>
              <table:table-cell office:value-type="float" office:value="1.06235831929251">
                <text:p>1.06235831929251</text:p>
              </table:table-cell>
              <table:table-cell office:value-type="float" office:value="31.9239750855356">
                <text:p>31.9239750855356</text:p>
              </table:table-cell>
              <table:table-cell office:value-type="float" office:value="34.0486917241207">
                <text:p>34.0486917241207</text:p>
              </table:table-cell>
            </table:table-row>
            <table:table-row>
              <table:table-cell office:value-type="float" office:value="46197">
                <text:p>46197</text:p>
              </table:table-cell>
              <table:table-cell office:value-type="float" office:value="NaN">
                <text:p>NaN</text:p>
              </table:table-cell>
              <table:table-cell office:value-type="float" office:value="33.0147709192184">
                <text:p>33.0147709192184</text:p>
              </table:table-cell>
              <table:table-cell office:value-type="float" office:value="1.06823611474725">
                <text:p>1.06823611474725</text:p>
              </table:table-cell>
              <table:table-cell office:value-type="float" office:value="31.9465348044712">
                <text:p>31.9465348044712</text:p>
              </table:table-cell>
              <table:table-cell office:value-type="float" office:value="34.0830070339657">
                <text:p>34.0830070339657</text:p>
              </table:table-cell>
            </table:table-row>
            <table:table-row>
              <table:table-cell office:value-type="float" office:value="46198">
                <text:p>46198</text:p>
              </table:table-cell>
              <table:table-cell office:value-type="float" office:value="NaN">
                <text:p>NaN</text:p>
              </table:table-cell>
              <table:table-cell office:value-type="float" office:value="33.0099609383575">
                <text:p>33.0099609383575</text:p>
              </table:table-cell>
              <table:table-cell office:value-type="float" office:value="1.13935634411022">
                <text:p>1.13935634411022</text:p>
              </table:table-cell>
              <table:table-cell office:value-type="float" office:value="31.8706045942473">
                <text:p>31.8706045942473</text:p>
              </table:table-cell>
              <table:table-cell office:value-type="float" office:value="34.1493172824677">
                <text:p>34.1493172824677</text:p>
              </table:table-cell>
            </table:table-row>
            <table:table-row>
              <table:table-cell office:value-type="float" office:value="46199">
                <text:p>46199</text:p>
              </table:table-cell>
              <table:table-cell office:value-type="float" office:value="NaN">
                <text:p>NaN</text:p>
              </table:table-cell>
              <table:table-cell office:value-type="float" office:value="33.1934051241996">
                <text:p>33.1934051241996</text:p>
              </table:table-cell>
              <table:table-cell office:value-type="float" office:value="1.16416754040949">
                <text:p>1.16416754040949</text:p>
              </table:table-cell>
              <table:table-cell office:value-type="float" office:value="32.0292375837902">
                <text:p>32.0292375837902</text:p>
              </table:table-cell>
              <table:table-cell office:value-type="float" office:value="34.3575726646091">
                <text:p>34.3575726646091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NaN">
                <text:p>NaN</text:p>
              </table:table-cell>
              <table:table-cell office:value-type="float" office:value="33.0755767805504">
                <text:p>33.0755767805504</text:p>
              </table:table-cell>
              <table:table-cell office:value-type="float" office:value="1.18489693580378">
                <text:p>1.18489693580378</text:p>
              </table:table-cell>
              <table:table-cell office:value-type="float" office:value="31.8906798447466">
                <text:p>31.8906798447466</text:p>
              </table:table-cell>
              <table:table-cell office:value-type="float" office:value="34.2604737163542">
                <text:p>34.2604737163542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NaN">
                <text:p>NaN</text:p>
              </table:table-cell>
              <table:table-cell office:value-type="float" office:value="33.0304469923593">
                <text:p>33.0304469923593</text:p>
              </table:table-cell>
              <table:table-cell office:value-type="float" office:value="1.17991802053005">
                <text:p>1.17991802053005</text:p>
              </table:table-cell>
              <table:table-cell office:value-type="float" office:value="31.8505289718293">
                <text:p>31.8505289718293</text:p>
              </table:table-cell>
              <table:table-cell office:value-type="float" office:value="34.2103650128894">
                <text:p>34.2103650128894</text:p>
              </table:table-cell>
            </table:table-row>
            <table:table-row>
              <table:table-cell office:value-type="float" office:value="46202">
                <text:p>46202</text:p>
              </table:table-cell>
              <table:table-cell office:value-type="float" office:value="NaN">
                <text:p>NaN</text:p>
              </table:table-cell>
              <table:table-cell office:value-type="float" office:value="33.024390593367">
                <text:p>33.024390593367</text:p>
              </table:table-cell>
              <table:table-cell office:value-type="float" office:value="1.17681822406578">
                <text:p>1.17681822406578</text:p>
              </table:table-cell>
              <table:table-cell office:value-type="float" office:value="31.8475723693012">
                <text:p>31.8475723693012</text:p>
              </table:table-cell>
              <table:table-cell office:value-type="float" office:value="34.2012088174328">
                <text:p>34.2012088174328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NaN">
                <text:p>NaN</text:p>
              </table:table-cell>
              <table:table-cell office:value-type="float" office:value="32.9999974356358">
                <text:p>32.9999974356358</text:p>
              </table:table-cell>
              <table:table-cell office:value-type="float" office:value="1.16195114886742">
                <text:p>1.16195114886742</text:p>
              </table:table-cell>
              <table:table-cell office:value-type="float" office:value="31.8380462867684">
                <text:p>31.8380462867684</text:p>
              </table:table-cell>
              <table:table-cell office:value-type="float" office:value="34.1619485845032">
                <text:p>34.1619485845032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NaN">
                <text:p>NaN</text:p>
              </table:table-cell>
              <table:table-cell office:value-type="float" office:value="32.9790995399749">
                <text:p>32.9790995399749</text:p>
              </table:table-cell>
              <table:table-cell office:value-type="float" office:value="1.41628861196531">
                <text:p>1.41628861196531</text:p>
              </table:table-cell>
              <table:table-cell office:value-type="float" office:value="31.5628109280095">
                <text:p>31.5628109280095</text:p>
              </table:table-cell>
              <table:table-cell office:value-type="float" office:value="34.3953881519402">
                <text:p>34.3953881519402</text:p>
              </table:table-cell>
            </table:table-row>
            <table:table-row>
              <table:table-cell office:value-type="float" office:value="46205">
                <text:p>46205</text:p>
              </table:table-cell>
              <table:table-cell office:value-type="float" office:value="NaN">
                <text:p>NaN</text:p>
              </table:table-cell>
              <table:table-cell office:value-type="float" office:value="33.0638364425585">
                <text:p>33.0638364425585</text:p>
              </table:table-cell>
              <table:table-cell office:value-type="float" office:value="1.26645231221065">
                <text:p>1.26645231221065</text:p>
              </table:table-cell>
              <table:table-cell office:value-type="float" office:value="31.7973841303478">
                <text:p>31.7973841303478</text:p>
              </table:table-cell>
              <table:table-cell office:value-type="float" office:value="34.3302887547691">
                <text:p>34.3302887547691</text:p>
              </table:table-cell>
            </table:table-row>
            <table:table-row>
              <table:table-cell office:value-type="float" office:value="46206">
                <text:p>46206</text:p>
              </table:table-cell>
              <table:table-cell office:value-type="float" office:value="NaN">
                <text:p>NaN</text:p>
              </table:table-cell>
              <table:table-cell office:value-type="float" office:value="32.9437247439648">
                <text:p>32.9437247439648</text:p>
              </table:table-cell>
              <table:table-cell office:value-type="float" office:value="1.27211587042182">
                <text:p>1.27211587042182</text:p>
              </table:table-cell>
              <table:table-cell office:value-type="float" office:value="31.671608873543">
                <text:p>31.671608873543</text:p>
              </table:table-cell>
              <table:table-cell office:value-type="float" office:value="34.2158406143866">
                <text:p>34.2158406143866</text:p>
              </table:table-cell>
            </table:table-row>
            <table:table-row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32.9214053602269">
                <text:p>32.9214053602269</text:p>
              </table:table-cell>
              <table:table-cell office:value-type="float" office:value="1.30824954107847">
                <text:p>1.30824954107847</text:p>
              </table:table-cell>
              <table:table-cell office:value-type="float" office:value="31.6131558191485">
                <text:p>31.6131558191485</text:p>
              </table:table-cell>
              <table:table-cell office:value-type="float" office:value="34.2296549013054">
                <text:p>34.2296549013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6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11.862cm" xlink:href=".." xlink:type="simple" chart:class="chart:line" chart:style-name="ch1">
        <chart:legend chart:legend-position="bottom" svg:x="4.862cm" svg:y="11.263cm" style:legend-expansion="wide" chart:style-name="ch2"/>
        <chart:plot-area chart:style-name="ch3" svg:x="0.319cm" svg:y="0.237cm" svg:width="15.356cm" svg:height="10.605cm">
          <chart:coordinate-region svg:x="1.705cm" svg:y="0.436cm" svg:width="13.919cm" svg:height="8.632cm"/>
          <chart:axis chart:dimension="x" chart:name="primary-x" chart:style-name="ch4" chartooo:axis-type="date">
            <chartooo:date-scale/>
            <chart:categories table:cell-range-address="schd_us_d.A2:schd_us_d.A7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hd_us_d.B2:schd_us_d.B733" chart:label-cell-address="schd_us_d.B1:schd_us_d.B1" chart:class="chart:line">
            <chart:data-point chart:repeated="732"/>
          </chart:series>
          <chart:series chart:style-name="ch8" chart:values-cell-range-address="schd_us_d.D2:schd_us_d.D733" chart:label-cell-address="schd_us_d.D1:schd_us_d.D1" chart:class="chart:line">
            <chart:data-point chart:repeated="732"/>
          </chart:series>
          <chart:series chart:style-name="ch9" chart:values-cell-range-address="schd_us_d.E2:schd_us_d.E733" chart:label-cell-address="schd_us_d.E1:schd_us_d.E1" chart:class="chart:line">
            <chart:data-point chart:repeated="7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schd_us_d.B1:schd_us_d.B1</svg:desc>
                </draw:g>
              </table:table-cell>
              <table:table-cell office:value-type="string">
                <text:p>50MA</text:p>
                <draw:g>
                  <svg:desc>schd_us_d.D1:schd_us_d.D1</svg:desc>
                </draw:g>
              </table:table-cell>
              <table:table-cell office:value-type="string">
                <text:p>100MA</text:p>
                <draw:g>
                  <svg:desc>schd_us_d.E1:schd_us_d.E1</svg:desc>
                </draw:g>
              </table:table-cell>
            </table:table-row>
          </table:table-header-rows>
          <table:table-rows>
            <table:table-row>
              <table:table-cell office:value-type="float" office:value="45447">
                <text:p>45447</text:p>
                <draw:g>
                  <svg:desc>schd_us_d.A2:schd_us_d.A733</svg:desc>
                </draw:g>
              </table:table-cell>
              <table:table-cell office:value-type="float" office:value="25.3223">
                <text:p>25.3223</text:p>
                <draw:g>
                  <svg:desc>schd_us_d.B2:schd_us_d.B733</svg:desc>
                </draw:g>
              </table:table-cell>
              <table:table-cell office:value-type="float" office:value="NaN">
                <text:p>NaN</text:p>
                <draw:g>
                  <svg:desc>schd_us_d.D2:schd_us_d.D733</svg:desc>
                </draw:g>
              </table:table-cell>
              <table:table-cell office:value-type="float" office:value="NaN">
                <text:p>NaN</text:p>
                <draw:g>
                  <svg:desc>schd_us_d.E2:schd_us_d.E733</svg:desc>
                </draw:g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25.3126">
                <text:p>25.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25.2899">
                <text:p>25.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25.2283">
                <text:p>25.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25.2283">
                <text:p>25.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25.2283">
                <text:p>25.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25.1894">
                <text:p>25.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25.102">
                <text:p>25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25.0826">
                <text:p>25.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24.9757">
                <text:p>24.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24.8721">
                <text:p>24.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24.8721">
                <text:p>24.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24.8721">
                <text:p>24.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25.0372">
                <text:p>25.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25.1473">
                <text:p>25.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25.1473">
                <text:p>25.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25.2835">
                <text:p>25.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25.3028">
                <text:p>25.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25.3028">
                <text:p>25.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25.3028">
                <text:p>25.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25.6559">
                <text:p>25.6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25.4518">
                <text:p>25.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25.3452">
                <text:p>25.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25.2928">
                <text:p>25.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5.4532">
                <text:p>25.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25.4532">
                <text:p>25.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25.4532">
                <text:p>25.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5.3386">
                <text:p>25.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5.3517">
                <text:p>25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5.2633">
                <text:p>25.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25.2633">
                <text:p>25.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5.2109">
                <text:p>25.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25.2109">
                <text:p>25.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25.2109">
                <text:p>25.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5.2338">
                <text:p>25.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5.2404">
                <text:p>25.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5.4891">
                <text:p>25.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5.8001">
                <text:p>25.8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6.0685">
                <text:p>26.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26.0685">
                <text:p>26.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26.0685">
                <text:p>26.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6.1635">
                <text:p>26.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6.5988">
                <text:p>26.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6.9458">
                <text:p>26.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6.7133">
                <text:p>26.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6.5497">
                <text:p>26.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26.5497">
                <text:p>26.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26.5497">
                <text:p>26.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6.5727">
                <text:p>26.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6.3435">
                <text:p>26.3435</text:p>
              </table:table-cell>
              <table:table-cell office:value-type="float" office:value="25.5238040816327">
                <text:p>25.5238040816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6.4155">
                <text:p>26.4155</text:p>
              </table:table-cell>
              <table:table-cell office:value-type="float" office:value="25.5446448979592">
                <text:p>25.5446448979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6.5727">
                <text:p>26.5727</text:p>
              </table:table-cell>
              <table:table-cell office:value-type="float" office:value="25.5671530612245">
                <text:p>25.5671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6.9949">
                <text:p>26.9949</text:p>
              </table:table-cell>
              <table:table-cell office:value-type="float" office:value="25.5933326530612">
                <text:p>25.593332653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26.9949">
                <text:p>26.9949</text:p>
              </table:table-cell>
              <table:table-cell office:value-type="float" office:value="25.6293857142857">
                <text:p>25.6293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26.9949">
                <text:p>26.9949</text:p>
              </table:table-cell>
              <table:table-cell office:value-type="float" office:value="25.6654387755102">
                <text:p>25.665438775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6.8901">
                <text:p>26.8901</text:p>
              </table:table-cell>
              <table:table-cell office:value-type="float" office:value="25.7014918367347">
                <text:p>25.701491836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7.1029">
                <text:p>27.1029</text:p>
              </table:table-cell>
              <table:table-cell office:value-type="float" office:value="25.7362">
                <text:p>25.7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7.0309">
                <text:p>27.0309</text:p>
              </table:table-cell>
              <table:table-cell office:value-type="float" office:value="25.7770346938776">
                <text:p>25.7770346938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6.7625">
                <text:p>26.7625</text:p>
              </table:table-cell>
              <table:table-cell office:value-type="float" office:value="25.8167959183673">
                <text:p>25.816795918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26.4482">
                <text:p>26.4482</text:p>
              </table:table-cell>
              <table:table-cell office:value-type="float" office:value="25.8532612244898">
                <text:p>25.853261224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26.4482">
                <text:p>26.4482</text:p>
              </table:table-cell>
              <table:table-cell office:value-type="float" office:value="25.8854265306122">
                <text:p>25.8854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26.4482">
                <text:p>26.4482</text:p>
              </table:table-cell>
              <table:table-cell office:value-type="float" office:value="25.9175918367347">
                <text:p>25.917591836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25.8525">
                <text:p>25.8525</text:p>
              </table:table-cell>
              <table:table-cell office:value-type="float" office:value="25.9497571428571">
                <text:p>25.9497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5.9834">
                <text:p>25.9834</text:p>
              </table:table-cell>
              <table:table-cell office:value-type="float" office:value="25.9663959183673">
                <text:p>25.966395918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5.823">
                <text:p>25.823</text:p>
              </table:table-cell>
              <table:table-cell office:value-type="float" office:value="25.9834591836735">
                <text:p>25.9834591836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6.2584">
                <text:p>26.2584</text:p>
              </table:table-cell>
              <table:table-cell office:value-type="float" office:value="25.9972489795918">
                <text:p>25.997248979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6.242">
                <text:p>26.242</text:p>
              </table:table-cell>
              <table:table-cell office:value-type="float" office:value="26.0171448979592">
                <text:p>26.0171448979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26.242">
                <text:p>26.242</text:p>
              </table:table-cell>
              <table:table-cell office:value-type="float" office:value="26.036312244898">
                <text:p>26.03631224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26.242">
                <text:p>26.242</text:p>
              </table:table-cell>
              <table:table-cell office:value-type="float" office:value="26.0554795918367">
                <text:p>26.0554795918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6.1176">
                <text:p>26.1176</text:p>
              </table:table-cell>
              <table:table-cell office:value-type="float" office:value="26.0746469387755">
                <text:p>26.074646938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6.3959">
                <text:p>26.3959</text:p>
              </table:table-cell>
              <table:table-cell office:value-type="float" office:value="26.0840693877551">
                <text:p>26.0840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6.4286">
                <text:p>26.4286</text:p>
              </table:table-cell>
              <table:table-cell office:value-type="float" office:value="26.1033367346939">
                <text:p>26.103336734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6.7068">
                <text:p>26.7068</text:p>
              </table:table-cell>
              <table:table-cell office:value-type="float" office:value="26.1254469387755">
                <text:p>26.125446938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6.828">
                <text:p>26.828</text:p>
              </table:table-cell>
              <table:table-cell office:value-type="float" office:value="26.1543040816327">
                <text:p>26.1543040816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26.828">
                <text:p>26.828</text:p>
              </table:table-cell>
              <table:table-cell office:value-type="float" office:value="26.1823612244898">
                <text:p>26.182361224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26.828">
                <text:p>26.828</text:p>
              </table:table-cell>
              <table:table-cell office:value-type="float" office:value="26.2104183673469">
                <text:p>26.2104183673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6.985">
                <text:p>26.985</text:p>
              </table:table-cell>
              <table:table-cell office:value-type="float" office:value="26.2384755102041">
                <text:p>26.2384755102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6.9131">
                <text:p>26.9131</text:p>
              </table:table-cell>
              <table:table-cell office:value-type="float" office:value="26.2720755102041">
                <text:p>26.2720755102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7.0276">
                <text:p>27.0276</text:p>
              </table:table-cell>
              <table:table-cell office:value-type="float" office:value="26.3039408163265">
                <text:p>26.303940816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6.9523">
                <text:p>26.9523</text:p>
              </table:table-cell>
              <table:table-cell office:value-type="float" office:value="26.3399469387755">
                <text:p>26.339946938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7.3386">
                <text:p>27.3386</text:p>
              </table:table-cell>
              <table:table-cell office:value-type="float" office:value="26.3744163265306">
                <text:p>26.374416326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27.3386">
                <text:p>27.3386</text:p>
              </table:table-cell>
              <table:table-cell office:value-type="float" office:value="26.4178387755102">
                <text:p>26.417838775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27.3386">
                <text:p>27.3386</text:p>
              </table:table-cell>
              <table:table-cell office:value-type="float" office:value="26.4612612244898">
                <text:p>26.461261224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7.3713">
                <text:p>27.3713</text:p>
              </table:table-cell>
              <table:table-cell office:value-type="float" office:value="26.5046836734694">
                <text:p>26.5046836734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7.3254">
                <text:p>27.3254</text:p>
              </table:table-cell>
              <table:table-cell office:value-type="float" office:value="26.548306122449">
                <text:p>26.54830612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7.332">
                <text:p>27.332</text:p>
              </table:table-cell>
              <table:table-cell office:value-type="float" office:value="26.5908571428571">
                <text:p>26.590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7.4499">
                <text:p>27.4499</text:p>
              </table:table-cell>
              <table:table-cell office:value-type="float" office:value="26.6284673469388">
                <text:p>26.6284673469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7.6691">
                <text:p>27.6691</text:p>
              </table:table-cell>
              <table:table-cell office:value-type="float" office:value="26.6621367346939">
                <text:p>26.662136734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27.6691">
                <text:p>27.6691</text:p>
              </table:table-cell>
              <table:table-cell office:value-type="float" office:value="26.6948020408163">
                <text:p>26.6948020408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7.6691">
                <text:p>27.6691</text:p>
              </table:table-cell>
              <table:table-cell office:value-type="float" office:value="26.7274673469388">
                <text:p>26.7274673469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7.6691">
                <text:p>27.6691</text:p>
              </table:table-cell>
              <table:table-cell office:value-type="float" office:value="26.7601326530612">
                <text:p>26.760132653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7.4237">
                <text:p>27.4237</text:p>
              </table:table-cell>
              <table:table-cell office:value-type="float" office:value="26.7908591836735">
                <text:p>26.7908591836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7.332">
                <text:p>27.332</text:p>
              </table:table-cell>
              <table:table-cell office:value-type="float" office:value="26.807693877551">
                <text:p>26.807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7.0734">
                <text:p>27.0734</text:p>
              </table:table-cell>
              <table:table-cell office:value-type="float" office:value="26.8155755102041">
                <text:p>26.8155755102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6.8411">
                <text:p>26.8411</text:p>
              </table:table-cell>
              <table:table-cell office:value-type="float" office:value="26.8229244897959">
                <text:p>26.8229244897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26.8411">
                <text:p>26.8411</text:p>
              </table:table-cell>
              <table:table-cell office:value-type="float" office:value="26.8288714285714">
                <text:p>26.8288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26.8411">
                <text:p>26.8411</text:p>
              </table:table-cell>
              <table:table-cell office:value-type="float" office:value="26.8348183673469">
                <text:p>26.8348183673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7.1651">
                <text:p>27.1651</text:p>
              </table:table-cell>
              <table:table-cell office:value-type="float" office:value="26.8407653061225">
                <text:p>26.840765306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7.188">
                <text:p>27.188</text:p>
              </table:table-cell>
              <table:table-cell office:value-type="float" office:value="26.8528551020408">
                <text:p>26.852855102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7.0211">
                <text:p>27.0211</text:p>
              </table:table-cell>
              <table:table-cell office:value-type="float" office:value="26.8700897959184">
                <text:p>26.8700897959184</text:p>
              </table:table-cell>
              <table:table-cell office:value-type="float" office:value="26.1984272727273">
                <text:p>26.1984272727273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7.0472">
                <text:p>27.0472</text:p>
              </table:table-cell>
              <table:table-cell office:value-type="float" office:value="26.8824489795918">
                <text:p>26.8824489795918</text:p>
              </table:table-cell>
              <table:table-cell office:value-type="float" office:value="26.2155868686869">
                <text:p>26.2155868686869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7.2862">
                <text:p>27.2862</text:p>
              </table:table-cell>
              <table:table-cell office:value-type="float" office:value="26.8921326530612">
                <text:p>26.8921326530612</text:p>
              </table:table-cell>
              <table:table-cell office:value-type="float" office:value="26.2331080808081">
                <text:p>26.2331080808081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27.2862">
                <text:p>27.2862</text:p>
              </table:table-cell>
              <table:table-cell office:value-type="float" office:value="26.8980775510204">
                <text:p>26.8980775510204</text:p>
              </table:table-cell>
              <table:table-cell office:value-type="float" office:value="26.2532727272727">
                <text:p>26.2532727272727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27.2862">
                <text:p>27.2862</text:p>
              </table:table-cell>
              <table:table-cell office:value-type="float" office:value="26.9040224489796">
                <text:p>26.9040224489796</text:p>
              </table:table-cell>
              <table:table-cell office:value-type="float" office:value="26.2740595959596">
                <text:p>26.2740595959596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7.5448">
                <text:p>27.5448</text:p>
              </table:table-cell>
              <table:table-cell office:value-type="float" office:value="26.9099673469388">
                <text:p>26.9099673469388</text:p>
              </table:table-cell>
              <table:table-cell office:value-type="float" office:value="26.2948464646465">
                <text:p>26.2948464646465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7.5252">
                <text:p>27.5252</text:p>
              </table:table-cell>
              <table:table-cell office:value-type="float" office:value="26.9233285714286">
                <text:p>26.9233285714286</text:p>
              </table:table-cell>
              <table:table-cell office:value-type="float" office:value="26.3182454545455">
                <text:p>26.3182454545455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7.5415">
                <text:p>27.5415</text:p>
              </table:table-cell>
              <table:table-cell office:value-type="float" office:value="26.9319469387755">
                <text:p>26.9319469387755</text:p>
              </table:table-cell>
              <table:table-cell office:value-type="float" office:value="26.3418393939394">
                <text:p>26.3418393939394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7.7805">
                <text:p>27.7805</text:p>
              </table:table-cell>
              <table:table-cell office:value-type="float" office:value="26.9423673469388">
                <text:p>26.9423673469388</text:p>
              </table:table-cell>
              <table:table-cell office:value-type="float" office:value="26.3664808080808">
                <text:p>26.3664808080808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7.6528">
                <text:p>27.6528</text:p>
              </table:table-cell>
              <table:table-cell office:value-type="float" office:value="26.9631428571429">
                <text:p>26.9631428571429</text:p>
              </table:table-cell>
              <table:table-cell office:value-type="float" office:value="26.3937323232323">
                <text:p>26.3937323232323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27.6528">
                <text:p>27.6528</text:p>
              </table:table-cell>
              <table:table-cell office:value-type="float" office:value="26.9877265306122">
                <text:p>26.9877265306122</text:p>
              </table:table-cell>
              <table:table-cell office:value-type="float" office:value="26.4207737373737">
                <text:p>26.4207737373737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27.6528">
                <text:p>27.6528</text:p>
              </table:table-cell>
              <table:table-cell office:value-type="float" office:value="27.0123102040816">
                <text:p>27.0123102040816</text:p>
              </table:table-cell>
              <table:table-cell office:value-type="float" office:value="26.4488616161616">
                <text:p>26.4488616161616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7.8001">
                <text:p>27.8001</text:p>
              </table:table-cell>
              <table:table-cell office:value-type="float" office:value="27.036893877551">
                <text:p>27.036893877551</text:p>
              </table:table-cell>
              <table:table-cell office:value-type="float" office:value="26.4769494949495">
                <text:p>26.4769494949495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27.8426">
                <text:p>27.8426</text:p>
              </table:table-cell>
              <table:table-cell office:value-type="float" office:value="27.0766408163265">
                <text:p>27.0766408163265</text:p>
              </table:table-cell>
              <table:table-cell office:value-type="float" office:value="26.5065252525253">
                <text:p>26.5065252525253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27.5337">
                <text:p>27.5337</text:p>
              </table:table-cell>
              <table:table-cell office:value-type="float" office:value="27.1145836734694">
                <text:p>27.1145836734694</text:p>
              </table:table-cell>
              <table:table-cell office:value-type="float" office:value="26.5348626262626">
                <text:p>26.534862626262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27.6559">
                <text:p>27.6559</text:p>
              </table:table-cell>
              <table:table-cell office:value-type="float" office:value="27.1494959183673">
                <text:p>27.1494959183673</text:p>
              </table:table-cell>
              <table:table-cell office:value-type="float" office:value="26.5589676767677">
                <text:p>26.5589676767677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27.8277">
                <text:p>27.8277</text:p>
              </table:table-cell>
              <table:table-cell office:value-type="float" office:value="27.1780163265306">
                <text:p>27.1780163265306</text:p>
              </table:table-cell>
              <table:table-cell office:value-type="float" office:value="26.5843070707071">
                <text:p>26.5843070707071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27.8277">
                <text:p>27.8277</text:p>
              </table:table-cell>
              <table:table-cell office:value-type="float" office:value="27.2103775510204">
                <text:p>27.2103775510204</text:p>
              </table:table-cell>
              <table:table-cell office:value-type="float" office:value="26.6100060606061">
                <text:p>26.6100060606061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27.8277">
                <text:p>27.8277</text:p>
              </table:table-cell>
              <table:table-cell office:value-type="float" office:value="27.2427387755102">
                <text:p>27.2427387755102</text:p>
              </table:table-cell>
              <table:table-cell office:value-type="float" office:value="26.6355101010101">
                <text:p>26.6355101010101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27.9168">
                <text:p>27.9168</text:p>
              </table:table-cell>
              <table:table-cell office:value-type="float" office:value="27.2751">
                <text:p>27.2751</text:p>
              </table:table-cell>
              <table:table-cell office:value-type="float" office:value="26.6610141414141">
                <text:p>26.6610141414141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27.9003">
                <text:p>27.9003</text:p>
              </table:table-cell>
              <table:table-cell office:value-type="float" office:value="27.3118183673469">
                <text:p>27.3118183673469</text:p>
              </table:table-cell>
              <table:table-cell office:value-type="float" office:value="26.6874181818182">
                <text:p>26.6874181818182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27.9201">
                <text:p>27.9201</text:p>
              </table:table-cell>
              <table:table-cell office:value-type="float" office:value="27.3425204081633">
                <text:p>27.3425204081633</text:p>
              </table:table-cell>
              <table:table-cell office:value-type="float" office:value="26.7100888888889">
                <text:p>26.7100888888889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27.8475">
                <text:p>27.8475</text:p>
              </table:table-cell>
              <table:table-cell office:value-type="float" office:value="27.3729591836735">
                <text:p>27.3729591836735</text:p>
              </table:table-cell>
              <table:table-cell office:value-type="float" office:value="26.7350212121212">
                <text:p>26.7350212121212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27.9565">
                <text:p>27.9565</text:p>
              </table:table-cell>
              <table:table-cell office:value-type="float" office:value="27.3962387755102">
                <text:p>27.3962387755102</text:p>
              </table:table-cell>
              <table:table-cell office:value-type="float" office:value="26.760296969697">
                <text:p>26.760296969697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27.9565">
                <text:p>27.9565</text:p>
              </table:table-cell>
              <table:table-cell office:value-type="float" office:value="27.4192693877551">
                <text:p>27.4192693877551</text:p>
              </table:table-cell>
              <table:table-cell office:value-type="float" office:value="26.787203030303">
                <text:p>26.787203030303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27.9565">
                <text:p>27.9565</text:p>
              </table:table-cell>
              <table:table-cell office:value-type="float" office:value="27.4423">
                <text:p>27.4423</text:p>
              </table:table-cell>
              <table:table-cell office:value-type="float" office:value="26.8124888888889">
                <text:p>26.8124888888889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27.8408">
                <text:p>27.8408</text:p>
              </table:table-cell>
              <table:table-cell office:value-type="float" office:value="27.4653306122449">
                <text:p>27.4653306122449</text:p>
              </table:table-cell>
              <table:table-cell office:value-type="float" office:value="26.8377747474747">
                <text:p>26.8377747474747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27.7946">
                <text:p>27.7946</text:p>
              </table:table-cell>
              <table:table-cell office:value-type="float" office:value="27.4827959183673">
                <text:p>27.4827959183673</text:p>
              </table:table-cell>
              <table:table-cell office:value-type="float" office:value="26.8618919191919">
                <text:p>26.8618919191919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28.0556">
                <text:p>28.0556</text:p>
              </table:table-cell>
              <table:table-cell office:value-type="float" office:value="27.5007857142857">
                <text:p>27.5007857142857</text:p>
              </table:table-cell>
              <table:table-cell office:value-type="float" office:value="26.8867">
                <text:p>26.8867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27.9466">
                <text:p>27.9466</text:p>
              </table:table-cell>
              <table:table-cell office:value-type="float" office:value="27.5217653061224">
                <text:p>27.5217653061224</text:p>
              </table:table-cell>
              <table:table-cell office:value-type="float" office:value="26.9140121212121">
                <text:p>26.9140121212121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28.2768">
                <text:p>28.2768</text:p>
              </table:table-cell>
              <table:table-cell office:value-type="float" office:value="27.5420571428571">
                <text:p>27.5420571428571</text:p>
              </table:table-cell>
              <table:table-cell office:value-type="float" office:value="26.9411161616162">
                <text:p>26.9411161616162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28.2768">
                <text:p>28.2768</text:p>
              </table:table-cell>
              <table:table-cell office:value-type="float" office:value="27.5612040816327">
                <text:p>27.5612040816327</text:p>
              </table:table-cell>
              <table:table-cell office:value-type="float" office:value="26.9715555555556">
                <text:p>26.9715555555556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28.2768">
                <text:p>28.2768</text:p>
              </table:table-cell>
              <table:table-cell office:value-type="float" office:value="27.5803510204082">
                <text:p>27.5803510204082</text:p>
              </table:table-cell>
              <table:table-cell office:value-type="float" office:value="27.0025242424242">
                <text:p>27.0025242424242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28.4254">
                <text:p>28.4254</text:p>
              </table:table-cell>
              <table:table-cell office:value-type="float" office:value="27.5994979591837">
                <text:p>27.5994979591837</text:p>
              </table:table-cell>
              <table:table-cell office:value-type="float" office:value="27.0334929292929">
                <text:p>27.0334929292929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28.3065">
                <text:p>28.3065</text:p>
              </table:table-cell>
              <table:table-cell office:value-type="float" office:value="27.6210102040816">
                <text:p>27.6210102040816</text:p>
              </table:table-cell>
              <table:table-cell office:value-type="float" office:value="27.0659626262626">
                <text:p>27.065962626262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28.5344">
                <text:p>28.5344</text:p>
              </table:table-cell>
              <table:table-cell office:value-type="float" office:value="27.6410326530612">
                <text:p>27.6410326530612</text:p>
              </table:table-cell>
              <table:table-cell office:value-type="float" office:value="27.097">
                <text:p>27.097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28.5443">
                <text:p>28.5443</text:p>
              </table:table-cell>
              <table:table-cell office:value-type="float" office:value="27.6655714285714">
                <text:p>27.6655714285714</text:p>
              </table:table-cell>
              <table:table-cell office:value-type="float" office:value="27.1302727272727">
                <text:p>27.1302727272727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28.5443">
                <text:p>28.5443</text:p>
              </table:table-cell>
              <table:table-cell office:value-type="float" office:value="27.687906122449">
                <text:p>27.687906122449</text:p>
              </table:table-cell>
              <table:table-cell office:value-type="float" office:value="27.1611333333333">
                <text:p>27.1611333333333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28.5443">
                <text:p>28.5443</text:p>
              </table:table-cell>
              <table:table-cell office:value-type="float" office:value="27.7057673469388">
                <text:p>27.7057673469388</text:p>
              </table:table-cell>
              <table:table-cell office:value-type="float" office:value="27.1888525252525">
                <text:p>27.1888525252525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28.5443">
                <text:p>28.5443</text:p>
              </table:table-cell>
              <table:table-cell office:value-type="float" office:value="27.7236285714286">
                <text:p>27.7236285714286</text:p>
              </table:table-cell>
              <table:table-cell office:value-type="float" office:value="27.2138606060606">
                <text:p>27.2138606060606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28.2074">
                <text:p>28.2074</text:p>
              </table:table-cell>
              <table:table-cell office:value-type="float" office:value="27.7414897959184">
                <text:p>27.7414897959184</text:p>
              </table:table-cell>
              <table:table-cell office:value-type="float" office:value="27.2388686868687">
                <text:p>27.2388686868687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28.0687">
                <text:p>28.0687</text:p>
              </table:table-cell>
              <table:table-cell office:value-type="float" office:value="27.7524755102041">
                <text:p>27.7524755102041</text:p>
              </table:table-cell>
              <table:table-cell office:value-type="float" office:value="27.2604737373737">
                <text:p>27.2604737373737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8.0192">
                <text:p>28.0192</text:p>
              </table:table-cell>
              <table:table-cell office:value-type="float" office:value="27.7656387755102">
                <text:p>27.7656387755102</text:p>
              </table:table-cell>
              <table:table-cell office:value-type="float" office:value="27.2797181818182">
                <text:p>27.2797181818182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28.0687">
                <text:p>28.0687</text:p>
              </table:table-cell>
              <table:table-cell office:value-type="float" office:value="27.7796632653061">
                <text:p>27.7796632653061</text:p>
              </table:table-cell>
              <table:table-cell office:value-type="float" office:value="27.2940656565657">
                <text:p>27.2940656565657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7.8904">
                <text:p>27.8904</text:p>
              </table:table-cell>
              <table:table-cell office:value-type="float" office:value="27.7999755102041">
                <text:p>27.7999755102041</text:p>
              </table:table-cell>
              <table:table-cell office:value-type="float" office:value="27.3054080808081">
                <text:p>27.3054080808081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27.8904">
                <text:p>27.8904</text:p>
              </table:table-cell>
              <table:table-cell office:value-type="float" office:value="27.8213897959184">
                <text:p>27.8213897959184</text:p>
              </table:table-cell>
              <table:table-cell office:value-type="float" office:value="27.317297979798">
                <text:p>27.317297979798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27.8904">
                <text:p>27.8904</text:p>
              </table:table-cell>
              <table:table-cell office:value-type="float" office:value="27.8428040816327">
                <text:p>27.8428040816327</text:p>
              </table:table-cell>
              <table:table-cell office:value-type="float" office:value="27.3308404040404">
                <text:p>27.3308404040404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8.0588">
                <text:p>28.0588</text:p>
              </table:table-cell>
              <table:table-cell office:value-type="float" office:value="27.8642183673469">
                <text:p>27.8642183673469</text:p>
              </table:table-cell>
              <table:table-cell office:value-type="float" office:value="27.3443828282828">
                <text:p>27.3443828282828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7.8309">
                <text:p>27.8309</text:p>
              </table:table-cell>
              <table:table-cell office:value-type="float" office:value="27.8824571428571">
                <text:p>27.8824571428571</text:p>
              </table:table-cell>
              <table:table-cell office:value-type="float" office:value="27.3596262626263">
                <text:p>27.3596262626263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7.9201">
                <text:p>27.9201</text:p>
              </table:table-cell>
              <table:table-cell office:value-type="float" office:value="27.8955775510204">
                <text:p>27.8955775510204</text:p>
              </table:table-cell>
              <table:table-cell office:value-type="float" office:value="27.3723353535354">
                <text:p>27.372335353535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7.9697">
                <text:p>27.9697</text:p>
              </table:table-cell>
              <table:table-cell office:value-type="float" office:value="27.9139244897959">
                <text:p>27.9139244897959</text:p>
              </table:table-cell>
              <table:table-cell office:value-type="float" office:value="27.3882606060606">
                <text:p>27.3882606060606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7.8408">
                <text:p>27.8408</text:p>
              </table:table-cell>
              <table:table-cell office:value-type="float" office:value="27.9327510204082">
                <text:p>27.9327510204082</text:p>
              </table:table-cell>
              <table:table-cell office:value-type="float" office:value="27.4039595959596">
                <text:p>27.4039595959596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27.8408">
                <text:p>27.8408</text:p>
              </table:table-cell>
              <table:table-cell office:value-type="float" office:value="27.9440693877551">
                <text:p>27.9440693877551</text:p>
              </table:table-cell>
              <table:table-cell office:value-type="float" office:value="27.4167686868687">
                <text:p>27.4167686868687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27.8408">
                <text:p>27.8408</text:p>
              </table:table-cell>
              <table:table-cell office:value-type="float" office:value="27.955387755102">
                <text:p>27.955387755102</text:p>
              </table:table-cell>
              <table:table-cell office:value-type="float" office:value="27.4253131313131">
                <text:p>27.4253131313131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7.8706">
                <text:p>27.8706</text:p>
              </table:table-cell>
              <table:table-cell office:value-type="float" office:value="27.966706122449">
                <text:p>27.966706122449</text:p>
              </table:table-cell>
              <table:table-cell office:value-type="float" office:value="27.4338575757576">
                <text:p>27.4338575757576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8.1183">
                <text:p>28.1183</text:p>
              </table:table-cell>
              <table:table-cell office:value-type="float" office:value="27.9733551020408">
                <text:p>27.9733551020408</text:p>
              </table:table-cell>
              <table:table-cell office:value-type="float" office:value="27.442703030303">
                <text:p>27.442703030303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8.7722">
                <text:p>28.7722</text:p>
              </table:table-cell>
              <table:table-cell office:value-type="float" office:value="27.9854591836735">
                <text:p>27.9854591836735</text:p>
              </table:table-cell>
              <table:table-cell office:value-type="float" office:value="27.4551090909091">
                <text:p>27.4551090909091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8.6434">
                <text:p>28.6434</text:p>
              </table:table-cell>
              <table:table-cell office:value-type="float" office:value="28.0105755102041">
                <text:p>28.0105755102041</text:p>
              </table:table-cell>
              <table:table-cell office:value-type="float" office:value="27.4719707070707">
                <text:p>27.4719707070707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8.8118">
                <text:p>28.8118</text:p>
              </table:table-cell>
              <table:table-cell office:value-type="float" office:value="28.0281857142857">
                <text:p>28.0281857142857</text:p>
              </table:table-cell>
              <table:table-cell office:value-type="float" office:value="27.4882585858586">
                <text:p>27.4882585858586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28.8118">
                <text:p>28.8118</text:p>
              </table:table-cell>
              <table:table-cell office:value-type="float" office:value="28.0518387755102">
                <text:p>28.0518387755102</text:p>
              </table:table-cell>
              <table:table-cell office:value-type="float" office:value="27.5089585858586">
                <text:p>27.5089585858586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28.8118">
                <text:p>28.8118</text:p>
              </table:table-cell>
              <table:table-cell office:value-type="float" office:value="28.0754918367347">
                <text:p>28.0754918367347</text:p>
              </table:table-cell>
              <table:table-cell office:value-type="float" office:value="27.5328333333333">
                <text:p>27.5328333333333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28.8911">
                <text:p>28.8911</text:p>
              </table:table-cell>
              <table:table-cell office:value-type="float" office:value="28.0991448979592">
                <text:p>28.0991448979592</text:p>
              </table:table-cell>
              <table:table-cell office:value-type="float" office:value="27.5567080808081">
                <text:p>27.5567080808081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8.6434">
                <text:p>28.6434</text:p>
              </table:table-cell>
              <table:table-cell office:value-type="float" office:value="28.1214102040816">
                <text:p>28.1214102040816</text:p>
              </table:table-cell>
              <table:table-cell office:value-type="float" office:value="27.5813838383838">
                <text:p>27.5813838383838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8.7425">
                <text:p>28.7425</text:p>
              </table:table-cell>
              <table:table-cell office:value-type="float" office:value="28.1377530612245">
                <text:p>28.1377530612245</text:p>
              </table:table-cell>
              <table:table-cell office:value-type="float" office:value="27.6095747474748">
                <text:p>27.6095747474748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8.6137">
                <text:p>28.6137</text:p>
              </table:table-cell>
              <table:table-cell office:value-type="float" office:value="28.1624224489796">
                <text:p>28.1624224489796</text:p>
              </table:table-cell>
              <table:table-cell office:value-type="float" office:value="27.6374444444444">
                <text:p>27.6374444444444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8.366">
                <text:p>28.366</text:p>
              </table:table-cell>
              <table:table-cell office:value-type="float" office:value="28.1819693877551">
                <text:p>28.1819693877551</text:p>
              </table:table-cell>
              <table:table-cell office:value-type="float" office:value="27.6656333333333">
                <text:p>27.6656333333333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28.366">
                <text:p>28.366</text:p>
              </table:table-cell>
              <table:table-cell office:value-type="float" office:value="28.1929551020408">
                <text:p>28.1929551020408</text:p>
              </table:table-cell>
              <table:table-cell office:value-type="float" office:value="27.6869222222222">
                <text:p>27.6869222222222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28.366">
                <text:p>28.366</text:p>
              </table:table-cell>
              <table:table-cell office:value-type="float" office:value="28.2039408163265">
                <text:p>28.2039408163265</text:p>
              </table:table-cell>
              <table:table-cell office:value-type="float" office:value="27.7083767676768">
                <text:p>27.7083767676768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8.5245">
                <text:p>28.5245</text:p>
              </table:table-cell>
              <table:table-cell office:value-type="float" office:value="28.2149265306122">
                <text:p>28.2149265306122</text:p>
              </table:table-cell>
              <table:table-cell office:value-type="float" office:value="27.7298313131313">
                <text:p>27.7298313131313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8.3759">
                <text:p>28.3759</text:p>
              </table:table-cell>
              <table:table-cell office:value-type="float" office:value="28.2273285714286">
                <text:p>28.2273285714286</text:p>
              </table:table-cell>
              <table:table-cell office:value-type="float" office:value="27.7528868686869">
                <text:p>27.7528868686869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8.4452">
                <text:p>28.4452</text:p>
              </table:table-cell>
              <table:table-cell office:value-type="float" office:value="28.2370346938776">
                <text:p>28.2370346938776</text:p>
              </table:table-cell>
              <table:table-cell office:value-type="float" office:value="27.775697979798">
                <text:p>27.775697979798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8.7127">
                <text:p>28.7127</text:p>
              </table:table-cell>
              <table:table-cell office:value-type="float" office:value="28.2477510204082">
                <text:p>28.2477510204082</text:p>
              </table:table-cell>
              <table:table-cell office:value-type="float" office:value="27.796397979798">
                <text:p>27.796397979798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9.0793">
                <text:p>29.0793</text:p>
              </table:table-cell>
              <table:table-cell office:value-type="float" office:value="28.2654081632653">
                <text:p>28.2654081632653</text:p>
              </table:table-cell>
              <table:table-cell office:value-type="float" office:value="27.8194696969697">
                <text:p>27.8194696969697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29.0793">
                <text:p>29.0793</text:p>
              </table:table-cell>
              <table:table-cell office:value-type="float" office:value="28.2883224489796">
                <text:p>28.2883224489796</text:p>
              </table:table-cell>
              <table:table-cell office:value-type="float" office:value="27.8434343434343">
                <text:p>27.8434343434343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29.0793">
                <text:p>29.0793</text:p>
              </table:table-cell>
              <table:table-cell office:value-type="float" office:value="28.3112367346939">
                <text:p>28.3112367346939</text:p>
              </table:table-cell>
              <table:table-cell office:value-type="float" office:value="27.8661747474747">
                <text:p>27.8661747474747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9.2378">
                <text:p>29.2378</text:p>
              </table:table-cell>
              <table:table-cell office:value-type="float" office:value="28.3341510204082">
                <text:p>28.3341510204082</text:p>
              </table:table-cell>
              <table:table-cell office:value-type="float" office:value="27.8889151515152">
                <text:p>27.8889151515152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9.1784">
                <text:p>29.1784</text:p>
              </table:table-cell>
              <table:table-cell office:value-type="float" office:value="28.3626612244898">
                <text:p>28.3626612244898</text:p>
              </table:table-cell>
              <table:table-cell office:value-type="float" office:value="27.9132565656566">
                <text:p>27.9132565656566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9.1685">
                <text:p>29.1685</text:p>
              </table:table-cell>
              <table:table-cell office:value-type="float" office:value="28.3909020408163">
                <text:p>28.3909020408163</text:p>
              </table:table-cell>
              <table:table-cell office:value-type="float" office:value="27.9354121212121">
                <text:p>27.9354121212121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29.1685">
                <text:p>29.1685</text:p>
              </table:table-cell>
              <table:table-cell office:value-type="float" office:value="28.4136142857143">
                <text:p>28.4136142857143</text:p>
              </table:table-cell>
              <table:table-cell office:value-type="float" office:value="27.9581939393939">
                <text:p>27.9581939393939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9.2577">
                <text:p>29.2577</text:p>
              </table:table-cell>
              <table:table-cell office:value-type="float" office:value="28.4385510204082">
                <text:p>28.4385510204082</text:p>
              </table:table-cell>
              <table:table-cell office:value-type="float" office:value="27.9798191919192">
                <text:p>27.9798191919192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29.2577">
                <text:p>29.2577</text:p>
              </table:table-cell>
              <table:table-cell office:value-type="float" office:value="28.4585693877551">
                <text:p>28.4585693877551</text:p>
              </table:table-cell>
              <table:table-cell office:value-type="float" office:value="28.0031060606061">
                <text:p>28.0031060606061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29.2577">
                <text:p>29.2577</text:p>
              </table:table-cell>
              <table:table-cell office:value-type="float" office:value="28.478587755102">
                <text:p>28.478587755102</text:p>
              </table:table-cell>
              <table:table-cell office:value-type="float" office:value="28.0224909090909">
                <text:p>28.0224909090909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9.0694">
                <text:p>29.0694</text:p>
              </table:table-cell>
              <table:table-cell office:value-type="float" office:value="28.498606122449">
                <text:p>28.498606122449</text:p>
              </table:table-cell>
              <table:table-cell office:value-type="float" office:value="28.0418757575758">
                <text:p>28.0418757575758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8.9109">
                <text:p>28.9109</text:p>
              </table:table-cell>
              <table:table-cell office:value-type="float" office:value="28.5117489795918">
                <text:p>28.5117489795918</text:p>
              </table:table-cell>
              <table:table-cell office:value-type="float" office:value="28.0593585858586">
                <text:p>28.0593585858586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8.6731">
                <text:p>28.6731</text:p>
              </table:table-cell>
              <table:table-cell office:value-type="float" office:value="28.5240836734694">
                <text:p>28.5240836734694</text:p>
              </table:table-cell>
              <table:table-cell office:value-type="float" office:value="28.0749101010101">
                <text:p>28.0749101010101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8.683">
                <text:p>28.683</text:p>
              </table:table-cell>
              <table:table-cell office:value-type="float" office:value="28.5269142857143">
                <text:p>28.5269142857143</text:p>
              </table:table-cell>
              <table:table-cell office:value-type="float" office:value="28.0885232323232">
                <text:p>28.0885232323232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8.5542">
                <text:p>28.5542</text:p>
              </table:table-cell>
              <table:table-cell office:value-type="float" office:value="28.5297448979592">
                <text:p>28.5297448979592</text:p>
              </table:table-cell>
              <table:table-cell office:value-type="float" office:value="28.1021696969697">
                <text:p>28.1021696969697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28.5542">
                <text:p>28.5542</text:p>
              </table:table-cell>
              <table:table-cell office:value-type="float" office:value="28.5299469387755">
                <text:p>28.5299469387755</text:p>
              </table:table-cell>
              <table:table-cell office:value-type="float" office:value="28.1133242424242">
                <text:p>28.1133242424242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28.5542">
                <text:p>28.5542</text:p>
              </table:table-cell>
              <table:table-cell office:value-type="float" office:value="28.5301489795918">
                <text:p>28.5301489795918</text:p>
              </table:table-cell>
              <table:table-cell office:value-type="float" office:value="28.1222646464647">
                <text:p>28.1222646464647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28.5245">
                <text:p>28.5245</text:p>
              </table:table-cell>
              <table:table-cell office:value-type="float" office:value="28.5303510204082">
                <text:p>28.5303510204082</text:p>
              </table:table-cell>
              <table:table-cell office:value-type="float" office:value="28.1312050505051">
                <text:p>28.1312050505051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28.4155">
                <text:p>28.4155</text:p>
              </table:table-cell>
              <table:table-cell office:value-type="float" office:value="28.5368224489796">
                <text:p>28.5368224489796</text:p>
              </table:table-cell>
              <table:table-cell office:value-type="float" office:value="28.1398454545455">
                <text:p>28.1398454545455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8.25">
                <text:p>28.25</text:p>
              </table:table-cell>
              <table:table-cell office:value-type="float" office:value="28.5439">
                <text:p>28.5439</text:p>
              </table:table-cell>
              <table:table-cell office:value-type="float" office:value="28.1473848484849">
                <text:p>28.1473848484849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8.2">
                <text:p>28.2</text:p>
              </table:table-cell>
              <table:table-cell office:value-type="float" office:value="28.5486102040816">
                <text:p>28.5486102040816</text:p>
              </table:table-cell>
              <table:table-cell office:value-type="float" office:value="28.1557313131313">
                <text:p>28.1557313131313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8.13">
                <text:p>28.13</text:p>
              </table:table-cell>
              <table:table-cell office:value-type="float" office:value="28.5512897959184">
                <text:p>28.5512897959184</text:p>
              </table:table-cell>
              <table:table-cell office:value-type="float" office:value="28.164498989899">
                <text:p>28.164498989899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28.13">
                <text:p>28.13</text:p>
              </table:table-cell>
              <table:table-cell office:value-type="float" office:value="28.5561795918367">
                <text:p>28.5561795918367</text:p>
              </table:table-cell>
              <table:table-cell office:value-type="float" office:value="28.1751717171717">
                <text:p>28.1751717171717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28.13">
                <text:p>28.13</text:p>
              </table:table-cell>
              <table:table-cell office:value-type="float" office:value="28.5610693877551">
                <text:p>28.5610693877551</text:p>
              </table:table-cell>
              <table:table-cell office:value-type="float" office:value="28.1881909090909">
                <text:p>28.1881909090909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7.87">
                <text:p>27.87</text:p>
              </table:table-cell>
              <table:table-cell office:value-type="float" office:value="28.5659591836735">
                <text:p>28.5659591836735</text:p>
              </table:table-cell>
              <table:table-cell office:value-type="float" office:value="28.2012101010101">
                <text:p>28.2012101010101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7.81">
                <text:p>27.81</text:p>
              </table:table-cell>
              <table:table-cell office:value-type="float" office:value="28.562106122449">
                <text:p>28.562106122449</text:p>
              </table:table-cell>
              <table:table-cell office:value-type="float" office:value="28.211603030303">
                <text:p>28.211603030303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7.08">
                <text:p>27.08</text:p>
              </table:table-cell>
              <table:table-cell office:value-type="float" office:value="28.5616795918367">
                <text:p>28.5616795918367</text:p>
              </table:table-cell>
              <table:table-cell office:value-type="float" office:value="28.2181171717172">
                <text:p>28.2181171717172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6.93">
                <text:p>26.93</text:p>
              </table:table-cell>
              <table:table-cell office:value-type="float" office:value="28.5445346938776">
                <text:p>28.5445346938776</text:p>
              </table:table-cell>
              <table:table-cell office:value-type="float" office:value="28.2170262626263">
                <text:p>28.2170262626263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7.29">
                <text:p>27.29</text:p>
              </table:table-cell>
              <table:table-cell office:value-type="float" office:value="28.5233163265306">
                <text:p>28.5233163265306</text:p>
              </table:table-cell>
              <table:table-cell office:value-type="float" office:value="28.2161060606061">
                <text:p>28.2161060606061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27.29">
                <text:p>27.29</text:p>
              </table:table-cell>
              <table:table-cell office:value-type="float" office:value="28.5120755102041">
                <text:p>28.5120755102041</text:p>
              </table:table-cell>
              <table:table-cell office:value-type="float" office:value="28.2185585858586">
                <text:p>28.2185585858586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27.29">
                <text:p>27.29</text:p>
              </table:table-cell>
              <table:table-cell office:value-type="float" office:value="28.5008346938776">
                <text:p>28.5008346938776</text:p>
              </table:table-cell>
              <table:table-cell office:value-type="float" office:value="28.218596969697">
                <text:p>28.218596969697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7.37">
                <text:p>27.37</text:p>
              </table:table-cell>
              <table:table-cell office:value-type="float" office:value="28.489593877551">
                <text:p>28.489593877551</text:p>
              </table:table-cell>
              <table:table-cell office:value-type="float" office:value="28.2186353535354">
                <text:p>28.218635353535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7.58">
                <text:p>27.58</text:p>
              </table:table-cell>
              <table:table-cell office:value-type="float" office:value="28.4793775510204">
                <text:p>28.4793775510204</text:p>
              </table:table-cell>
              <table:table-cell office:value-type="float" office:value="28.2194818181818">
                <text:p>28.2194818181818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27.58">
                <text:p>27.58</text:p>
              </table:table-cell>
              <table:table-cell office:value-type="float" office:value="28.4683918367347">
                <text:p>28.4683918367347</text:p>
              </table:table-cell>
              <table:table-cell office:value-type="float" office:value="28.2198373737374">
                <text:p>28.2198373737374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7.59">
                <text:p>27.59</text:p>
              </table:table-cell>
              <table:table-cell office:value-type="float" office:value="28.4440612244898">
                <text:p>28.4440612244898</text:p>
              </table:table-cell>
              <table:table-cell office:value-type="float" office:value="28.2203909090909">
                <text:p>28.2203909090909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7.47">
                <text:p>27.47</text:p>
              </table:table-cell>
              <table:table-cell office:value-type="float" office:value="28.4225632653061">
                <text:p>28.4225632653061</text:p>
              </table:table-cell>
              <table:table-cell office:value-type="float" office:value="28.2208808080808">
                <text:p>28.2208808080808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27.47">
                <text:p>27.47</text:p>
              </table:table-cell>
              <table:table-cell office:value-type="float" office:value="28.3951795918367">
                <text:p>28.3951795918367</text:p>
              </table:table-cell>
              <table:table-cell office:value-type="float" office:value="28.2177444444444">
                <text:p>28.2177444444444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27.47">
                <text:p>27.47</text:p>
              </table:table-cell>
              <table:table-cell office:value-type="float" office:value="28.3677959183673">
                <text:p>28.3677959183673</text:p>
              </table:table-cell>
              <table:table-cell office:value-type="float" office:value="28.215897979798">
                <text:p>28.215897979798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7.23">
                <text:p>27.23</text:p>
              </table:table-cell>
              <table:table-cell office:value-type="float" office:value="28.340412244898">
                <text:p>28.340412244898</text:p>
              </table:table-cell>
              <table:table-cell office:value-type="float" office:value="28.2140515151515">
                <text:p>28.2140515151515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7.32">
                <text:p>27.32</text:p>
              </table:table-cell>
              <table:table-cell office:value-type="float" office:value="28.306512244898">
                <text:p>28.306512244898</text:p>
              </table:table-cell>
              <table:table-cell office:value-type="float" office:value="28.2097808080808">
                <text:p>28.2097808080808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27.32">
                <text:p>27.32</text:p>
              </table:table-cell>
              <table:table-cell office:value-type="float" office:value="28.2795040816327">
                <text:p>28.2795040816327</text:p>
              </table:table-cell>
              <table:table-cell office:value-type="float" office:value="28.2049313131313">
                <text:p>28.2049313131313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7.26">
                <text:p>27.26</text:p>
              </table:table-cell>
              <table:table-cell office:value-type="float" office:value="28.2504734693878">
                <text:p>28.2504734693878</text:p>
              </table:table-cell>
              <table:table-cell office:value-type="float" office:value="28.1996525252525">
                <text:p>28.1996525252525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7.44">
                <text:p>27.44</text:p>
              </table:table-cell>
              <table:table-cell office:value-type="float" office:value="28.2228469387755">
                <text:p>28.2228469387755</text:p>
              </table:table-cell>
              <table:table-cell office:value-type="float" office:value="28.1968878787879">
                <text:p>28.1968878787879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27.44">
                <text:p>27.44</text:p>
              </table:table-cell>
              <table:table-cell office:value-type="float" office:value="28.2039489795918">
                <text:p>28.2039489795918</text:p>
              </table:table-cell>
              <table:table-cell office:value-type="float" office:value="28.1947070707071">
                <text:p>28.1947070707071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27.44">
                <text:p>27.44</text:p>
              </table:table-cell>
              <table:table-cell office:value-type="float" office:value="28.1850510204082">
                <text:p>28.1850510204082</text:p>
              </table:table-cell>
              <table:table-cell office:value-type="float" office:value="28.1907909090909">
                <text:p>28.1907909090909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7.27">
                <text:p>27.27</text:p>
              </table:table-cell>
              <table:table-cell office:value-type="float" office:value="28.1661530612245">
                <text:p>28.1661530612245</text:p>
              </table:table-cell>
              <table:table-cell office:value-type="float" office:value="28.1868747474747">
                <text:p>28.1868747474747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7.26">
                <text:p>27.26</text:p>
              </table:table-cell>
              <table:table-cell office:value-type="float" office:value="28.1405510204082">
                <text:p>28.1405510204082</text:p>
              </table:table-cell>
              <table:table-cell office:value-type="float" office:value="28.1812414141414">
                <text:p>28.1812414141414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7.32">
                <text:p>27.32</text:p>
              </table:table-cell>
              <table:table-cell office:value-type="float" office:value="28.1177775510204">
                <text:p>28.1177775510204</text:p>
              </table:table-cell>
              <table:table-cell office:value-type="float" office:value="28.1746070707071">
                <text:p>28.1746070707071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27.32">
                <text:p>27.32</text:p>
              </table:table-cell>
              <table:table-cell office:value-type="float" office:value="28.0948142857143">
                <text:p>28.0948142857143</text:p>
              </table:table-cell>
              <table:table-cell office:value-type="float" office:value="28.1687454545455">
                <text:p>28.1687454545455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7.01">
                <text:p>27.01</text:p>
              </table:table-cell>
              <table:table-cell office:value-type="float" office:value="28.0663918367347">
                <text:p>28.0663918367347</text:p>
              </table:table-cell>
              <table:table-cell office:value-type="float" office:value="28.1626838383838">
                <text:p>28.1626838383838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27.01">
                <text:p>27.01</text:p>
              </table:table-cell>
              <table:table-cell office:value-type="float" office:value="28.0241612244898">
                <text:p>28.0241612244898</text:p>
              </table:table-cell>
              <table:table-cell office:value-type="float" office:value="28.1542242424242">
                <text:p>28.1542242424242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27.01">
                <text:p>27.01</text:p>
              </table:table-cell>
              <table:table-cell office:value-type="float" office:value="27.9819306122449">
                <text:p>27.9819306122449</text:p>
              </table:table-cell>
              <table:table-cell office:value-type="float" office:value="28.1446636363636">
                <text:p>28.1446636363636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7.3">
                <text:p>27.3</text:p>
              </table:table-cell>
              <table:table-cell office:value-type="float" office:value="27.9397">
                <text:p>27.9397</text:p>
              </table:table-cell>
              <table:table-cell office:value-type="float" office:value="28.135103030303">
                <text:p>28.135103030303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7.52">
                <text:p>27.52</text:p>
              </table:table-cell>
              <table:table-cell office:value-type="float" office:value="27.9001530612245">
                <text:p>27.9001530612245</text:p>
              </table:table-cell>
              <table:table-cell office:value-type="float" office:value="28.1284717171717">
                <text:p>28.1284717171717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7.82">
                <text:p>27.82</text:p>
              </table:table-cell>
              <table:table-cell office:value-type="float" office:value="27.8663081632653">
                <text:p>27.8663081632653</text:p>
              </table:table-cell>
              <table:table-cell office:value-type="float" office:value="28.1252313131313">
                <text:p>28.1252313131313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7.83">
                <text:p>27.83</text:p>
              </table:table-cell>
              <table:table-cell office:value-type="float" office:value="27.838787755102">
                <text:p>27.838787755102</text:p>
              </table:table-cell>
              <table:table-cell office:value-type="float" office:value="28.1254878787879">
                <text:p>28.1254878787879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7.99">
                <text:p>27.99</text:p>
              </table:table-cell>
              <table:table-cell office:value-type="float" office:value="27.8114714285714">
                <text:p>27.8114714285714</text:p>
              </table:table-cell>
              <table:table-cell office:value-type="float" office:value="28.1232090909091">
                <text:p>28.1232090909091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27.99">
                <text:p>27.99</text:p>
              </table:table-cell>
              <table:table-cell office:value-type="float" office:value="27.7856">
                <text:p>27.7856</text:p>
              </table:table-cell>
              <table:table-cell office:value-type="float" office:value="28.1236474747475">
                <text:p>28.1236474747475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27.99">
                <text:p>27.99</text:p>
              </table:table-cell>
              <table:table-cell office:value-type="float" office:value="27.7597285714286">
                <text:p>27.7597285714286</text:p>
              </table:table-cell>
              <table:table-cell office:value-type="float" office:value="28.1207505050505">
                <text:p>28.1207505050505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27.99">
                <text:p>27.99</text:p>
              </table:table-cell>
              <table:table-cell office:value-type="float" office:value="27.7338571428571">
                <text:p>27.7338571428571</text:p>
              </table:table-cell>
              <table:table-cell office:value-type="float" office:value="28.1178535353535">
                <text:p>28.1178535353535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8.22">
                <text:p>28.22</text:p>
              </table:table-cell>
              <table:table-cell office:value-type="float" office:value="27.7118285714286">
                <text:p>27.7118285714286</text:p>
              </table:table-cell>
              <table:table-cell office:value-type="float" office:value="28.1149565656566">
                <text:p>28.1149565656566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7.92">
                <text:p>27.92</text:p>
              </table:table-cell>
              <table:table-cell office:value-type="float" office:value="27.6977285714286">
                <text:p>27.6977285714286</text:p>
              </table:table-cell>
              <table:table-cell office:value-type="float" office:value="28.1128818181818">
                <text:p>28.1128818181818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8.09">
                <text:p>28.09</text:p>
              </table:table-cell>
              <table:table-cell office:value-type="float" office:value="27.6823591836735">
                <text:p>27.6823591836735</text:p>
              </table:table-cell>
              <table:table-cell office:value-type="float" office:value="28.1089777777778">
                <text:p>28.1089777777778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8.07">
                <text:p>28.07</text:p>
              </table:table-cell>
              <table:table-cell office:value-type="float" office:value="27.6702571428571">
                <text:p>27.6702571428571</text:p>
              </table:table-cell>
              <table:table-cell office:value-type="float" office:value="28.1044888888889">
                <text:p>28.1044888888889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28.07">
                <text:p>28.07</text:p>
              </table:table-cell>
              <table:table-cell office:value-type="float" office:value="27.6603755102041">
                <text:p>27.6603755102041</text:p>
              </table:table-cell>
              <table:table-cell office:value-type="float" office:value="28.099697979798">
                <text:p>28.099697979798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28.07">
                <text:p>28.07</text:p>
              </table:table-cell>
              <table:table-cell office:value-type="float" office:value="27.650493877551">
                <text:p>27.650493877551</text:p>
              </table:table-cell>
              <table:table-cell office:value-type="float" office:value="28.0949070707071">
                <text:p>28.0949070707071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8.45">
                <text:p>28.45</text:p>
              </table:table-cell>
              <table:table-cell office:value-type="float" office:value="27.640612244898">
                <text:p>27.640612244898</text:p>
              </table:table-cell>
              <table:table-cell office:value-type="float" office:value="28.0901161616162">
                <text:p>28.0901161616162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8.07">
                <text:p>28.07</text:p>
              </table:table-cell>
              <table:table-cell office:value-type="float" office:value="27.6390918367347">
                <text:p>27.6390918367347</text:p>
              </table:table-cell>
              <table:table-cell office:value-type="float" office:value="28.0891636363636">
                <text:p>28.0891636363636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8.01">
                <text:p>28.01</text:p>
              </table:table-cell>
              <table:table-cell office:value-type="float" office:value="27.6320408163265">
                <text:p>27.6320408163265</text:p>
              </table:table-cell>
              <table:table-cell office:value-type="float" office:value="28.0877757575758">
                <text:p>28.0877757575758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7.98">
                <text:p>27.98</text:p>
              </table:table-cell>
              <table:table-cell office:value-type="float" office:value="27.6271428571429">
                <text:p>27.6271428571429</text:p>
              </table:table-cell>
              <table:table-cell office:value-type="float" office:value="28.0871828282828">
                <text:p>28.0871828282828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7.83">
                <text:p>27.83</text:p>
              </table:table-cell>
              <table:table-cell office:value-type="float" office:value="27.6226530612245">
                <text:p>27.6226530612245</text:p>
              </table:table-cell>
              <table:table-cell office:value-type="float" office:value="28.0867868686869">
                <text:p>28.0867868686869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27.83">
                <text:p>27.83</text:p>
              </table:table-cell>
              <table:table-cell office:value-type="float" office:value="27.6165306122449">
                <text:p>27.6165306122449</text:p>
              </table:table-cell>
              <table:table-cell office:value-type="float" office:value="28.0843757575758">
                <text:p>28.0843757575758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27.83">
                <text:p>27.83</text:p>
              </table:table-cell>
              <table:table-cell office:value-type="float" office:value="27.6104081632653">
                <text:p>27.6104081632653</text:p>
              </table:table-cell>
              <table:table-cell office:value-type="float" office:value="28.0837656565657">
                <text:p>28.0837656565657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7.72">
                <text:p>27.72</text:p>
              </table:table-cell>
              <table:table-cell office:value-type="float" office:value="27.6042857142857">
                <text:p>27.6042857142857</text:p>
              </table:table-cell>
              <table:table-cell office:value-type="float" office:value="28.0831555555556">
                <text:p>28.0831555555556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7.76">
                <text:p>27.76</text:p>
              </table:table-cell>
              <table:table-cell office:value-type="float" office:value="27.6012244897959">
                <text:p>27.6012244897959</text:p>
              </table:table-cell>
              <table:table-cell office:value-type="float" office:value="28.0814343434343">
                <text:p>28.0814343434343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7.95">
                <text:p>27.95</text:p>
              </table:table-cell>
              <table:table-cell office:value-type="float" office:value="27.6002040816327">
                <text:p>27.6002040816327</text:p>
              </table:table-cell>
              <table:table-cell office:value-type="float" office:value="28.0784161616162">
                <text:p>28.0784161616162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7.75">
                <text:p>27.75</text:p>
              </table:table-cell>
              <table:table-cell office:value-type="float" office:value="27.6179591836735">
                <text:p>27.6179591836735</text:p>
              </table:table-cell>
              <table:table-cell office:value-type="float" office:value="28.0796191919192">
                <text:p>28.0796191919192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7.56">
                <text:p>27.56</text:p>
              </table:table-cell>
              <table:table-cell office:value-type="float" office:value="27.634693877551">
                <text:p>27.634693877551</text:p>
              </table:table-cell>
              <table:table-cell office:value-type="float" office:value="28.077901010101">
                <text:p>28.077901010101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27.56">
                <text:p>27.56</text:p>
              </table:table-cell>
              <table:table-cell office:value-type="float" office:value="27.6402040816327">
                <text:p>27.6402040816327</text:p>
              </table:table-cell>
              <table:table-cell office:value-type="float" office:value="28.0737626262626">
                <text:p>28.0737626262626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27.56">
                <text:p>27.56</text:p>
              </table:table-cell>
              <table:table-cell office:value-type="float" office:value="27.6457142857143">
                <text:p>27.6457142857143</text:p>
              </table:table-cell>
              <table:table-cell office:value-type="float" office:value="28.0709262626263">
                <text:p>28.0709262626263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27.68">
                <text:p>27.68</text:p>
              </table:table-cell>
              <table:table-cell office:value-type="float" office:value="27.6512244897959">
                <text:p>27.6512244897959</text:p>
              </table:table-cell>
              <table:table-cell office:value-type="float" office:value="28.0680898989899">
                <text:p>28.0680898989899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27.87">
                <text:p>27.87</text:p>
              </table:table-cell>
              <table:table-cell office:value-type="float" office:value="27.6575510204082">
                <text:p>27.6575510204082</text:p>
              </table:table-cell>
              <table:table-cell office:value-type="float" office:value="28.0664656565657">
                <text:p>28.0664656565657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27.65">
                <text:p>27.65</text:p>
              </table:table-cell>
              <table:table-cell office:value-type="float" office:value="27.6634693877551">
                <text:p>27.6634693877551</text:p>
              </table:table-cell>
              <table:table-cell office:value-type="float" office:value="28.0664595959596">
                <text:p>28.066459595959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7.85">
                <text:p>27.85</text:p>
              </table:table-cell>
              <table:table-cell office:value-type="float" office:value="27.6648979591837">
                <text:p>27.6648979591837</text:p>
              </table:table-cell>
              <table:table-cell office:value-type="float" office:value="28.0617292929293">
                <text:p>28.0617292929293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27.79">
                <text:p>27.79</text:p>
              </table:table-cell>
              <table:table-cell office:value-type="float" office:value="27.6702040816327">
                <text:p>27.6702040816327</text:p>
              </table:table-cell>
              <table:table-cell office:value-type="float" office:value="28.0524141414141">
                <text:p>28.0524141414141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27.79">
                <text:p>27.79</text:p>
              </table:table-cell>
              <table:table-cell office:value-type="float" office:value="27.6767346938776">
                <text:p>27.6767346938776</text:p>
              </table:table-cell>
              <table:table-cell office:value-type="float" office:value="28.0437939393939">
                <text:p>28.0437939393939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27.79">
                <text:p>27.79</text:p>
              </table:table-cell>
              <table:table-cell office:value-type="float" office:value="27.6832653061225">
                <text:p>27.6832653061225</text:p>
              </table:table-cell>
              <table:table-cell office:value-type="float" office:value="28.0334727272727">
                <text:p>28.033472727272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27.79">
                <text:p>27.79</text:p>
              </table:table-cell>
              <table:table-cell office:value-type="float" office:value="27.6897959183673">
                <text:p>27.6897959183673</text:p>
              </table:table-cell>
              <table:table-cell office:value-type="float" office:value="28.0231515151515">
                <text:p>28.0231515151515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27.99">
                <text:p>27.99</text:p>
              </table:table-cell>
              <table:table-cell office:value-type="float" office:value="27.7012244897959">
                <text:p>27.7012244897959</text:p>
              </table:table-cell>
              <table:table-cell office:value-type="float" office:value="28.0128303030303">
                <text:p>28.0128303030303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28.18">
                <text:p>28.18</text:p>
              </table:table-cell>
              <table:table-cell office:value-type="float" office:value="27.7148979591837">
                <text:p>27.7148979591837</text:p>
              </table:table-cell>
              <table:table-cell office:value-type="float" office:value="28.0037282828283">
                <text:p>28.0037282828283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28.32">
                <text:p>28.32</text:p>
              </table:table-cell>
              <table:table-cell office:value-type="float" office:value="27.7324489795918">
                <text:p>27.7324489795918</text:p>
              </table:table-cell>
              <table:table-cell office:value-type="float" office:value="27.9990474747475">
                <text:p>27.9990474747475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28.21">
                <text:p>28.21</text:p>
              </table:table-cell>
              <table:table-cell office:value-type="float" office:value="27.7540816326531">
                <text:p>27.7540816326531</text:p>
              </table:table-cell>
              <table:table-cell office:value-type="float" office:value="27.9947797979798">
                <text:p>27.9947797979798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28.21">
                <text:p>28.21</text:p>
              </table:table-cell>
              <table:table-cell office:value-type="float" office:value="27.7697959183673">
                <text:p>27.7697959183673</text:p>
              </table:table-cell>
              <table:table-cell office:value-type="float" office:value="27.990702020202">
                <text:p>27.990702020202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28.21">
                <text:p>28.21</text:p>
              </table:table-cell>
              <table:table-cell office:value-type="float" office:value="27.7855102040816">
                <text:p>27.7855102040816</text:p>
              </table:table-cell>
              <table:table-cell office:value-type="float" office:value="27.9891262626263">
                <text:p>27.9891262626263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28.26">
                <text:p>28.26</text:p>
              </table:table-cell>
              <table:table-cell office:value-type="float" office:value="27.8012244897959">
                <text:p>27.8012244897959</text:p>
              </table:table-cell>
              <table:table-cell office:value-type="float" office:value="27.9875505050505">
                <text:p>27.9875505050505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28.45">
                <text:p>28.45</text:p>
              </table:table-cell>
              <table:table-cell office:value-type="float" office:value="27.8214285714286">
                <text:p>27.8214285714286</text:p>
              </table:table-cell>
              <table:table-cell office:value-type="float" office:value="27.9864797979798">
                <text:p>27.9864797979798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28.15">
                <text:p>28.15</text:p>
              </table:table-cell>
              <table:table-cell office:value-type="float" office:value="27.8457142857143">
                <text:p>27.8457142857143</text:p>
              </table:table-cell>
              <table:table-cell office:value-type="float" office:value="27.9857272727273">
                <text:p>27.9857272727273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28.17">
                <text:p>28.17</text:p>
              </table:table-cell>
              <table:table-cell office:value-type="float" office:value="27.8626530612245">
                <text:p>27.8626530612245</text:p>
              </table:table-cell>
              <table:table-cell office:value-type="float" office:value="27.9834454545455">
                <text:p>27.9834454545455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28.54">
                <text:p>28.54</text:p>
              </table:table-cell>
              <table:table-cell office:value-type="float" office:value="27.88">
                <text:p>27.88</text:p>
              </table:table-cell>
              <table:table-cell office:value-type="float" office:value="27.9806656565657">
                <text:p>27.9806656565657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28.54">
                <text:p>28.54</text:p>
              </table:table-cell>
              <table:table-cell office:value-type="float" office:value="27.9112244897959">
                <text:p>27.9112244897959</text:p>
              </table:table-cell>
              <table:table-cell office:value-type="float" office:value="27.9789212121212">
                <text:p>27.9789212121212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28.54">
                <text:p>28.54</text:p>
              </table:table-cell>
              <table:table-cell office:value-type="float" office:value="27.9424489795918">
                <text:p>27.9424489795918</text:p>
              </table:table-cell>
              <table:table-cell office:value-type="float" office:value="27.9734737373737">
                <text:p>27.9734737373737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8.4">
                <text:p>28.4</text:p>
              </table:table-cell>
              <table:table-cell office:value-type="float" office:value="27.9736734693878">
                <text:p>27.9736734693878</text:p>
              </table:table-cell>
              <table:table-cell office:value-type="float" office:value="27.9680262626263">
                <text:p>27.9680262626263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27.92">
                <text:p>27.92</text:p>
              </table:table-cell>
              <table:table-cell office:value-type="float" office:value="27.9961224489796">
                <text:p>27.9961224489796</text:p>
              </table:table-cell>
              <table:table-cell office:value-type="float" office:value="27.9611646464646">
                <text:p>27.9611646464646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28.05">
                <text:p>28.05</text:p>
              </table:table-cell>
              <table:table-cell office:value-type="float" office:value="28.0042857142857">
                <text:p>28.0042857142857</text:p>
              </table:table-cell>
              <table:table-cell office:value-type="float" office:value="27.9478535353535">
                <text:p>27.9478535353535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28.07">
                <text:p>28.07</text:p>
              </table:table-cell>
              <table:table-cell office:value-type="float" office:value="28.0089795918367">
                <text:p>28.0089795918367</text:p>
              </table:table-cell>
              <table:table-cell office:value-type="float" office:value="27.9364555555556">
                <text:p>27.9364555555556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28.46">
                <text:p>28.46</text:p>
              </table:table-cell>
              <table:table-cell office:value-type="float" office:value="28.0138775510204">
                <text:p>28.0138775510204</text:p>
              </table:table-cell>
              <table:table-cell office:value-type="float" office:value="27.9253595959596">
                <text:p>27.9253595959596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28.46">
                <text:p>28.46</text:p>
              </table:table-cell>
              <table:table-cell office:value-type="float" office:value="28.0234693877551">
                <text:p>28.0234693877551</text:p>
              </table:table-cell>
              <table:table-cell office:value-type="float" office:value="27.918203030303">
                <text:p>27.918203030303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28.46">
                <text:p>28.46</text:p>
              </table:table-cell>
              <table:table-cell office:value-type="float" office:value="28.0330612244898">
                <text:p>28.0330612244898</text:p>
              </table:table-cell>
              <table:table-cell office:value-type="float" office:value="27.9101454545455">
                <text:p>27.9101454545455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8.38">
                <text:p>28.38</text:p>
              </table:table-cell>
              <table:table-cell office:value-type="float" office:value="28.0426530612245">
                <text:p>28.0426530612245</text:p>
              </table:table-cell>
              <table:table-cell office:value-type="float" office:value="27.9020878787879">
                <text:p>27.9020878787879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27.74">
                <text:p>27.74</text:p>
              </table:table-cell>
              <table:table-cell office:value-type="float" office:value="28.050612244898">
                <text:p>28.050612244898</text:p>
              </table:table-cell>
              <table:table-cell office:value-type="float" office:value="27.8932222222222">
                <text:p>27.8932222222222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7.44">
                <text:p>27.44</text:p>
              </table:table-cell>
              <table:table-cell office:value-type="float" office:value="28.0408163265306">
                <text:p>28.0408163265306</text:p>
              </table:table-cell>
              <table:table-cell office:value-type="float" office:value="27.8797939393939">
                <text:p>27.8797939393939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7.29">
                <text:p>27.29</text:p>
              </table:table-cell>
              <table:table-cell office:value-type="float" office:value="28.0310204081633">
                <text:p>28.0310204081633</text:p>
              </table:table-cell>
              <table:table-cell office:value-type="float" office:value="27.8649363636364">
                <text:p>27.8649363636364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7.64">
                <text:p>27.64</text:p>
              </table:table-cell>
              <table:table-cell office:value-type="float" office:value="28.014693877551">
                <text:p>28.014693877551</text:p>
              </table:table-cell>
              <table:table-cell office:value-type="float" office:value="27.8509656565657">
                <text:p>27.8509656565657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27.64">
                <text:p>27.64</text:p>
              </table:table-cell>
              <table:table-cell office:value-type="float" office:value="28.0059183673469">
                <text:p>28.0059183673469</text:p>
              </table:table-cell>
              <table:table-cell office:value-type="float" office:value="27.8404303030303">
                <text:p>27.8404303030303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27.64">
                <text:p>27.64</text:p>
              </table:table-cell>
              <table:table-cell office:value-type="float" office:value="27.9971428571429">
                <text:p>27.9971428571429</text:p>
              </table:table-cell>
              <table:table-cell office:value-type="float" office:value="27.831195959596">
                <text:p>27.831195959596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7.96">
                <text:p>27.96</text:p>
              </table:table-cell>
              <table:table-cell office:value-type="float" office:value="27.9883673469388">
                <text:p>27.9883673469388</text:p>
              </table:table-cell>
              <table:table-cell office:value-type="float" office:value="27.8219616161616">
                <text:p>27.8219616161616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27.92">
                <text:p>27.92</text:p>
              </table:table-cell>
              <table:table-cell office:value-type="float" office:value="27.9783673469388">
                <text:p>27.9783673469388</text:p>
              </table:table-cell>
              <table:table-cell office:value-type="float" office:value="27.8159595959596">
                <text:p>27.8159595959596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28.03">
                <text:p>28.03</text:p>
              </table:table-cell>
              <table:table-cell office:value-type="float" office:value="27.975306122449">
                <text:p>27.975306122449</text:p>
              </table:table-cell>
              <table:table-cell office:value-type="float" office:value="27.8098535353535">
                <text:p>27.8098535353535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27.95">
                <text:p>27.95</text:p>
              </table:table-cell>
              <table:table-cell office:value-type="float" office:value="27.9757142857143">
                <text:p>27.9757142857143</text:p>
              </table:table-cell>
              <table:table-cell office:value-type="float" office:value="27.8059595959596">
                <text:p>27.8059595959596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27.76">
                <text:p>27.76</text:p>
              </table:table-cell>
              <table:table-cell office:value-type="float" office:value="27.9751020408163">
                <text:p>27.9751020408163</text:p>
              </table:table-cell>
              <table:table-cell office:value-type="float" office:value="27.8029292929293">
                <text:p>27.8029292929293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27.76">
                <text:p>27.76</text:p>
              </table:table-cell>
              <table:table-cell office:value-type="float" office:value="27.9736734693878">
                <text:p>27.9736734693878</text:p>
              </table:table-cell>
              <table:table-cell office:value-type="float" office:value="27.7984848484849">
                <text:p>27.7984848484849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27.76">
                <text:p>27.76</text:p>
              </table:table-cell>
              <table:table-cell office:value-type="float" office:value="27.9722448979592">
                <text:p>27.9722448979592</text:p>
              </table:table-cell>
              <table:table-cell office:value-type="float" office:value="27.7947474747475">
                <text:p>27.7947474747475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8.09">
                <text:p>28.09</text:p>
              </table:table-cell>
              <table:table-cell office:value-type="float" office:value="27.9708163265306">
                <text:p>27.9708163265306</text:p>
              </table:table-cell>
              <table:table-cell office:value-type="float" office:value="27.7910101010101">
                <text:p>27.7910101010101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27.84">
                <text:p>27.84</text:p>
              </table:table-cell>
              <table:table-cell office:value-type="float" office:value="27.9783673469388">
                <text:p>27.9783673469388</text:p>
              </table:table-cell>
              <table:table-cell office:value-type="float" office:value="27.7906060606061">
                <text:p>27.7906060606061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27.8">
                <text:p>27.8</text:p>
              </table:table-cell>
              <table:table-cell office:value-type="float" office:value="27.98">
                <text:p>27.98</text:p>
              </table:table-cell>
              <table:table-cell office:value-type="float" office:value="27.790303030303">
                <text:p>27.790303030303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27.75">
                <text:p>27.75</text:p>
              </table:table-cell>
              <table:table-cell office:value-type="float" office:value="27.9769387755102">
                <text:p>27.9769387755102</text:p>
              </table:table-cell>
              <table:table-cell office:value-type="float" office:value="27.790202020202">
                <text:p>27.790202020202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27.58">
                <text:p>27.58</text:p>
              </table:table-cell>
              <table:table-cell office:value-type="float" office:value="27.9769387755102">
                <text:p>27.9769387755102</text:p>
              </table:table-cell>
              <table:table-cell office:value-type="float" office:value="27.7969696969697">
                <text:p>27.7969696969697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27.58">
                <text:p>27.58</text:p>
              </table:table-cell>
              <table:table-cell office:value-type="float" office:value="27.9773469387755">
                <text:p>27.9773469387755</text:p>
              </table:table-cell>
              <table:table-cell office:value-type="float" office:value="27.8035353535354">
                <text:p>27.8035353535354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27.58">
                <text:p>27.58</text:p>
              </table:table-cell>
              <table:table-cell office:value-type="float" office:value="27.9777551020408">
                <text:p>27.9777551020408</text:p>
              </table:table-cell>
              <table:table-cell office:value-type="float" office:value="27.8064646464646">
                <text:p>27.8064646464646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7.96">
                <text:p>27.96</text:p>
              </table:table-cell>
              <table:table-cell office:value-type="float" office:value="27.9781632653061">
                <text:p>27.9781632653061</text:p>
              </table:table-cell>
              <table:table-cell office:value-type="float" office:value="27.8093939393939">
                <text:p>27.8093939393939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27.87">
                <text:p>27.87</text:p>
              </table:table-cell>
              <table:table-cell office:value-type="float" office:value="27.9838775510204">
                <text:p>27.9838775510204</text:p>
              </table:table-cell>
              <table:table-cell office:value-type="float" office:value="27.8161616161616">
                <text:p>27.8161616161616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27.87">
                <text:p>27.87</text:p>
              </table:table-cell>
              <table:table-cell office:value-type="float" office:value="27.9838775510204">
                <text:p>27.9838775510204</text:p>
              </table:table-cell>
              <table:table-cell office:value-type="float" office:value="27.8212121212121">
                <text:p>27.8212121212121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26.73">
                <text:p>26.73</text:p>
              </table:table-cell>
              <table:table-cell office:value-type="float" office:value="27.9883673469388">
                <text:p>27.9883673469388</text:p>
              </table:table-cell>
              <table:table-cell office:value-type="float" office:value="27.8241414141414">
                <text:p>27.8241414141414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25.28">
                <text:p>25.28</text:p>
              </table:table-cell>
              <table:table-cell office:value-type="float" office:value="27.9655102040816">
                <text:p>27.9655102040816</text:p>
              </table:table-cell>
              <table:table-cell office:value-type="float" office:value="27.8155555555556">
                <text:p>27.8155555555556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25.28">
                <text:p>25.28</text:p>
              </table:table-cell>
              <table:table-cell office:value-type="float" office:value="27.9142857142857">
                <text:p>27.9142857142857</text:p>
              </table:table-cell>
              <table:table-cell office:value-type="float" office:value="27.7922222222222">
                <text:p>27.7922222222222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25.28">
                <text:p>25.28</text:p>
              </table:table-cell>
              <table:table-cell office:value-type="float" office:value="27.8630612244898">
                <text:p>27.8630612244898</text:p>
              </table:table-cell>
              <table:table-cell office:value-type="float" office:value="27.770101010101">
                <text:p>27.770101010101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4.94">
                <text:p>24.94</text:p>
              </table:table-cell>
              <table:table-cell office:value-type="float" office:value="27.8118367346939">
                <text:p>27.8118367346939</text:p>
              </table:table-cell>
              <table:table-cell office:value-type="float" office:value="27.7479797979798">
                <text:p>27.7479797979798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4.32">
                <text:p>24.32</text:p>
              </table:table-cell>
              <table:table-cell office:value-type="float" office:value="27.7536734693878">
                <text:p>27.7536734693878</text:p>
              </table:table-cell>
              <table:table-cell office:value-type="float" office:value="27.7224242424242">
                <text:p>27.7224242424242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25.87">
                <text:p>25.87</text:p>
              </table:table-cell>
              <table:table-cell office:value-type="float" office:value="27.6787755102041">
                <text:p>27.6787755102041</text:p>
              </table:table-cell>
              <table:table-cell office:value-type="float" office:value="27.6930303030303">
                <text:p>27.6930303030303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24.97">
                <text:p>24.97</text:p>
              </table:table-cell>
              <table:table-cell office:value-type="float" office:value="27.6316326530612">
                <text:p>27.6316326530612</text:p>
              </table:table-cell>
              <table:table-cell office:value-type="float" office:value="27.6783838383838">
                <text:p>27.6783838383838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25.3">
                <text:p>25.3</text:p>
              </table:table-cell>
              <table:table-cell office:value-type="float" office:value="27.5632653061224">
                <text:p>27.5632653061224</text:p>
              </table:table-cell>
              <table:table-cell office:value-type="float" office:value="27.6546464646465">
                <text:p>27.6546464646465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25.3">
                <text:p>25.3</text:p>
              </table:table-cell>
              <table:table-cell office:value-type="float" office:value="27.5038775510204">
                <text:p>27.5038775510204</text:p>
              </table:table-cell>
              <table:table-cell office:value-type="float" office:value="27.6348484848485">
                <text:p>27.6348484848485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25.3">
                <text:p>25.3</text:p>
              </table:table-cell>
              <table:table-cell office:value-type="float" office:value="27.4444897959184">
                <text:p>27.4444897959184</text:p>
              </table:table-cell>
              <table:table-cell office:value-type="float" office:value="27.6132323232323">
                <text:p>27.6132323232323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5.6">
                <text:p>25.6</text:p>
              </table:table-cell>
              <table:table-cell office:value-type="float" office:value="27.3851020408163">
                <text:p>27.3851020408163</text:p>
              </table:table-cell>
              <table:table-cell office:value-type="float" office:value="27.5916161616162">
                <text:p>27.5916161616162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25.43">
                <text:p>25.43</text:p>
              </table:table-cell>
              <table:table-cell office:value-type="float" office:value="27.3308163265306">
                <text:p>27.3308163265306</text:p>
              </table:table-cell>
              <table:table-cell office:value-type="float" office:value="27.5730303030303">
                <text:p>27.5730303030303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25.13">
                <text:p>25.13</text:p>
              </table:table-cell>
              <table:table-cell office:value-type="float" office:value="27.2691836734694">
                <text:p>27.2691836734694</text:p>
              </table:table-cell>
              <table:table-cell office:value-type="float" office:value="27.5544444444444">
                <text:p>27.5544444444444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25.42">
                <text:p>25.42</text:p>
              </table:table-cell>
              <table:table-cell office:value-type="float" office:value="27.2075510204082">
                <text:p>27.2075510204082</text:p>
              </table:table-cell>
              <table:table-cell office:value-type="float" office:value="27.5329292929293">
                <text:p>27.5329292929293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25.42">
                <text:p>25.42</text:p>
              </table:table-cell>
              <table:table-cell office:value-type="float" office:value="27.1514285714286">
                <text:p>27.1514285714286</text:p>
              </table:table-cell>
              <table:table-cell office:value-type="float" office:value="27.5137373737374">
                <text:p>27.5137373737374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25.42">
                <text:p>25.42</text:p>
              </table:table-cell>
              <table:table-cell office:value-type="float" office:value="27.0877551020408">
                <text:p>27.0877551020408</text:p>
              </table:table-cell>
              <table:table-cell office:value-type="float" office:value="27.4945454545455">
                <text:p>27.4945454545455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25.42">
                <text:p>25.42</text:p>
              </table:table-cell>
              <table:table-cell office:value-type="float" office:value="27.0240816326531">
                <text:p>27.0240816326531</text:p>
              </table:table-cell>
              <table:table-cell office:value-type="float" office:value="27.4784848484848">
                <text:p>27.4784848484848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5.03">
                <text:p>25.03</text:p>
              </table:table-cell>
              <table:table-cell office:value-type="float" office:value="26.9604081632653">
                <text:p>26.9604081632653</text:p>
              </table:table-cell>
              <table:table-cell office:value-type="float" office:value="27.4624242424242">
                <text:p>27.4624242424242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25.44">
                <text:p>25.44</text:p>
              </table:table-cell>
              <table:table-cell office:value-type="float" office:value="26.8916326530612">
                <text:p>26.8916326530612</text:p>
              </table:table-cell>
              <table:table-cell office:value-type="float" office:value="27.4424242424242">
                <text:p>27.4424242424242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25.42">
                <text:p>25.42</text:p>
              </table:table-cell>
              <table:table-cell office:value-type="float" office:value="26.8410204081633">
                <text:p>26.8410204081633</text:p>
              </table:table-cell>
              <table:table-cell office:value-type="float" office:value="27.4236363636364">
                <text:p>27.4236363636364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25.71">
                <text:p>25.71</text:p>
              </table:table-cell>
              <table:table-cell office:value-type="float" office:value="26.7873469387755">
                <text:p>26.7873469387755</text:p>
              </table:table-cell>
              <table:table-cell office:value-type="float" office:value="27.4024242424242">
                <text:p>27.4024242424242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25.67">
                <text:p>25.67</text:p>
              </table:table-cell>
              <table:table-cell office:value-type="float" office:value="26.7391836734694">
                <text:p>26.7391836734694</text:p>
              </table:table-cell>
              <table:table-cell office:value-type="float" office:value="27.3811111111111">
                <text:p>27.3811111111111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25.67">
                <text:p>25.67</text:p>
              </table:table-cell>
              <table:table-cell office:value-type="float" office:value="26.6822448979592">
                <text:p>26.6822448979592</text:p>
              </table:table-cell>
              <table:table-cell office:value-type="float" office:value="27.3592929292929">
                <text:p>27.3592929292929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25.67">
                <text:p>25.67</text:p>
              </table:table-cell>
              <table:table-cell office:value-type="float" office:value="26.625306122449">
                <text:p>26.625306122449</text:p>
              </table:table-cell>
              <table:table-cell office:value-type="float" office:value="27.3358585858586">
                <text:p>27.3358585858586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25.79">
                <text:p>25.79</text:p>
              </table:table-cell>
              <table:table-cell office:value-type="float" office:value="26.5683673469388">
                <text:p>26.5683673469388</text:p>
              </table:table-cell>
              <table:table-cell office:value-type="float" office:value="27.3124242424242">
                <text:p>27.3124242424242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25.89">
                <text:p>25.89</text:p>
              </table:table-cell>
              <table:table-cell office:value-type="float" office:value="26.5155102040816">
                <text:p>26.5155102040816</text:p>
              </table:table-cell>
              <table:table-cell office:value-type="float" office:value="27.290202020202">
                <text:p>27.290202020202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25.82">
                <text:p>25.82</text:p>
              </table:table-cell>
              <table:table-cell office:value-type="float" office:value="26.4777551020408">
                <text:p>26.4777551020408</text:p>
              </table:table-cell>
              <table:table-cell office:value-type="float" office:value="27.2689898989899">
                <text:p>27.2689898989899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25.71">
                <text:p>25.71</text:p>
              </table:table-cell>
              <table:table-cell office:value-type="float" office:value="26.444693877551">
                <text:p>26.444693877551</text:p>
              </table:table-cell>
              <table:table-cell office:value-type="float" office:value="27.2447474747475">
                <text:p>27.2447474747475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26.06">
                <text:p>26.06</text:p>
              </table:table-cell>
              <table:table-cell office:value-type="float" office:value="26.4124489795918">
                <text:p>26.4124489795918</text:p>
              </table:table-cell>
              <table:table-cell office:value-type="float" office:value="27.2224242424242">
                <text:p>27.2224242424242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26.06">
                <text:p>26.06</text:p>
              </table:table-cell>
              <table:table-cell office:value-type="float" office:value="26.3802040816327">
                <text:p>26.3802040816327</text:p>
              </table:table-cell>
              <table:table-cell office:value-type="float" office:value="27.2019191919192">
                <text:p>27.2019191919192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26.06">
                <text:p>26.06</text:p>
              </table:table-cell>
              <table:table-cell office:value-type="float" office:value="26.3479591836735">
                <text:p>26.3479591836735</text:p>
              </table:table-cell>
              <table:table-cell office:value-type="float" office:value="27.1816161616162">
                <text:p>27.1816161616162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25.8">
                <text:p>25.8</text:p>
              </table:table-cell>
              <table:table-cell office:value-type="float" office:value="26.3157142857143">
                <text:p>26.3157142857143</text:p>
              </table:table-cell>
              <table:table-cell office:value-type="float" office:value="27.1613131313131">
                <text:p>27.1613131313131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25.55">
                <text:p>25.55</text:p>
              </table:table-cell>
              <table:table-cell office:value-type="float" office:value="26.2716326530612">
                <text:p>26.2716326530612</text:p>
              </table:table-cell>
              <table:table-cell office:value-type="float" office:value="27.1383838383838">
                <text:p>27.1383838383838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25.64">
                <text:p>25.64</text:p>
              </table:table-cell>
              <table:table-cell office:value-type="float" office:value="26.2232653061225">
                <text:p>26.2232653061225</text:p>
              </table:table-cell>
              <table:table-cell office:value-type="float" office:value="27.1090909090909">
                <text:p>27.1090909090909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25.78">
                <text:p>25.78</text:p>
              </table:table-cell>
              <table:table-cell office:value-type="float" office:value="26.1744897959184">
                <text:p>26.1744897959184</text:p>
              </table:table-cell>
              <table:table-cell office:value-type="float" office:value="27.0845454545455">
                <text:p>27.0845454545455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25.73">
                <text:p>25.73</text:p>
              </table:table-cell>
              <table:table-cell office:value-type="float" office:value="26.1302040816327">
                <text:p>26.1302040816327</text:p>
              </table:table-cell>
              <table:table-cell office:value-type="float" office:value="27.0620202020202">
                <text:p>27.0620202020202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25.73">
                <text:p>25.73</text:p>
              </table:table-cell>
              <table:table-cell office:value-type="float" office:value="26.0887755102041">
                <text:p>26.0887755102041</text:p>
              </table:table-cell>
              <table:table-cell office:value-type="float" office:value="27.0392929292929">
                <text:p>27.0392929292929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25.73">
                <text:p>25.73</text:p>
              </table:table-cell>
              <table:table-cell office:value-type="float" office:value="26.0473469387755">
                <text:p>26.0473469387755</text:p>
              </table:table-cell>
              <table:table-cell office:value-type="float" office:value="27.0180808080808">
                <text:p>27.0180808080808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26.43">
                <text:p>26.43</text:p>
              </table:table-cell>
              <table:table-cell office:value-type="float" office:value="26.0059183673469">
                <text:p>26.0059183673469</text:p>
              </table:table-cell>
              <table:table-cell office:value-type="float" office:value="26.9968686868687">
                <text:p>26.9968686868687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26.31">
                <text:p>26.31</text:p>
              </table:table-cell>
              <table:table-cell office:value-type="float" office:value="25.9720408163265">
                <text:p>25.9720408163265</text:p>
              </table:table-cell>
              <table:table-cell office:value-type="float" office:value="26.9827272727273">
                <text:p>26.9827272727273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26">
                <text:p>26</text:p>
              </table:table-cell>
              <table:table-cell office:value-type="float" office:value="25.9408163265306">
                <text:p>25.9408163265306</text:p>
              </table:table-cell>
              <table:table-cell office:value-type="float" office:value="26.9684848484849">
                <text:p>26.9684848484849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26.42">
                <text:p>26.42</text:p>
              </table:table-cell>
              <table:table-cell office:value-type="float" office:value="25.9040816326531">
                <text:p>25.9040816326531</text:p>
              </table:table-cell>
              <table:table-cell office:value-type="float" office:value="26.9507070707071">
                <text:p>26.9507070707071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26.6">
                <text:p>26.6</text:p>
              </table:table-cell>
              <table:table-cell office:value-type="float" office:value="25.8769387755102">
                <text:p>25.8769387755102</text:p>
              </table:table-cell>
              <table:table-cell office:value-type="float" office:value="26.9352525252525">
                <text:p>26.9352525252525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26.6">
                <text:p>26.6</text:p>
              </table:table-cell>
              <table:table-cell office:value-type="float" office:value="25.8569387755102">
                <text:p>25.8569387755102</text:p>
              </table:table-cell>
              <table:table-cell office:value-type="float" office:value="26.9236363636364">
                <text:p>26.9236363636364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26.6">
                <text:p>26.6</text:p>
              </table:table-cell>
              <table:table-cell office:value-type="float" office:value="25.8369387755102">
                <text:p>25.8369387755102</text:p>
              </table:table-cell>
              <table:table-cell office:value-type="float" office:value="26.9139393939394">
                <text:p>26.9139393939394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26.58">
                <text:p>26.58</text:p>
              </table:table-cell>
              <table:table-cell office:value-type="float" office:value="25.8169387755102">
                <text:p>25.8169387755102</text:p>
              </table:table-cell>
              <table:table-cell office:value-type="float" office:value="26.9042424242424">
                <text:p>26.9042424242424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26.48">
                <text:p>26.48</text:p>
              </table:table-cell>
              <table:table-cell office:value-type="float" office:value="25.7887755102041">
                <text:p>25.7887755102041</text:p>
              </table:table-cell>
              <table:table-cell office:value-type="float" office:value="26.8943434343434">
                <text:p>26.8943434343434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26.01">
                <text:p>26.01</text:p>
              </table:table-cell>
              <table:table-cell office:value-type="float" office:value="25.7604081632653">
                <text:p>25.7604081632653</text:p>
              </table:table-cell>
              <table:table-cell office:value-type="float" office:value="26.8822222222222">
                <text:p>26.8822222222222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25.96">
                <text:p>25.96</text:p>
              </table:table-cell>
              <table:table-cell office:value-type="float" office:value="25.7224489795918">
                <text:p>25.7224489795918</text:p>
              </table:table-cell>
              <table:table-cell office:value-type="float" office:value="26.8634343434343">
                <text:p>26.8634343434343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25.89">
                <text:p>25.89</text:p>
              </table:table-cell>
              <table:table-cell office:value-type="float" office:value="25.7067346938776">
                <text:p>25.7067346938776</text:p>
              </table:table-cell>
              <table:table-cell office:value-type="float" office:value="26.8463636363636">
                <text:p>26.8463636363636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25.89">
                <text:p>25.89</text:p>
              </table:table-cell>
              <table:table-cell office:value-type="float" office:value="25.7191836734694">
                <text:p>25.7191836734694</text:p>
              </table:table-cell>
              <table:table-cell office:value-type="float" office:value="26.8265656565657">
                <text:p>26.8265656565657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25.89">
                <text:p>25.89</text:p>
              </table:table-cell>
              <table:table-cell office:value-type="float" office:value="25.7316326530612">
                <text:p>25.7316326530612</text:p>
              </table:table-cell>
              <table:table-cell office:value-type="float" office:value="26.8073737373737">
                <text:p>26.8073737373737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25.89">
                <text:p>25.89</text:p>
              </table:table-cell>
              <table:table-cell office:value-type="float" office:value="25.7440816326531">
                <text:p>25.7440816326531</text:p>
              </table:table-cell>
              <table:table-cell office:value-type="float" office:value="26.7881818181818">
                <text:p>26.7881818181818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26.27">
                <text:p>26.27</text:p>
              </table:table-cell>
              <table:table-cell office:value-type="float" office:value="25.7634693877551">
                <text:p>25.7634693877551</text:p>
              </table:table-cell>
              <table:table-cell office:value-type="float" office:value="26.7689898989899">
                <text:p>26.7689898989899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26.04">
                <text:p>26.04</text:p>
              </table:table-cell>
              <table:table-cell office:value-type="float" office:value="25.8032653061225">
                <text:p>25.8032653061225</text:p>
              </table:table-cell>
              <table:table-cell office:value-type="float" office:value="26.7536363636364">
                <text:p>26.7536363636364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26.19">
                <text:p>26.19</text:p>
              </table:table-cell>
              <table:table-cell office:value-type="float" office:value="25.8067346938776">
                <text:p>25.8067346938776</text:p>
              </table:table-cell>
              <table:table-cell office:value-type="float" office:value="26.7339393939394">
                <text:p>26.7339393939394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26.17">
                <text:p>26.17</text:p>
              </table:table-cell>
              <table:table-cell office:value-type="float" office:value="25.8316326530612">
                <text:p>25.8316326530612</text:p>
              </table:table-cell>
              <table:table-cell office:value-type="float" office:value="26.7138383838384">
                <text:p>26.7138383838384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26.17">
                <text:p>26.17</text:p>
              </table:table-cell>
              <table:table-cell office:value-type="float" office:value="25.849387755102">
                <text:p>25.849387755102</text:p>
              </table:table-cell>
              <table:table-cell office:value-type="float" office:value="26.6921212121212">
                <text:p>26.6921212121212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26.17">
                <text:p>26.17</text:p>
              </table:table-cell>
              <table:table-cell office:value-type="float" office:value="25.8671428571429">
                <text:p>25.8671428571429</text:p>
              </table:table-cell>
              <table:table-cell office:value-type="float" office:value="26.6715151515152">
                <text:p>26.6715151515152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26.25">
                <text:p>26.25</text:p>
              </table:table-cell>
              <table:table-cell office:value-type="float" office:value="25.8848979591837">
                <text:p>25.8848979591837</text:p>
              </table:table-cell>
              <table:table-cell office:value-type="float" office:value="26.6509090909091">
                <text:p>26.6509090909091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26.44">
                <text:p>26.44</text:p>
              </table:table-cell>
              <table:table-cell office:value-type="float" office:value="25.8981632653061">
                <text:p>25.8981632653061</text:p>
              </table:table-cell>
              <table:table-cell office:value-type="float" office:value="26.6311111111111">
                <text:p>26.6311111111111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26.29">
                <text:p>26.29</text:p>
              </table:table-cell>
              <table:table-cell office:value-type="float" office:value="25.9187755102041">
                <text:p>25.9187755102041</text:p>
              </table:table-cell>
              <table:table-cell office:value-type="float" office:value="26.6127272727273">
                <text:p>26.6127272727273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26.23">
                <text:p>26.23</text:p>
              </table:table-cell>
              <table:table-cell office:value-type="float" office:value="25.9424489795918">
                <text:p>25.9424489795918</text:p>
              </table:table-cell>
              <table:table-cell office:value-type="float" office:value="26.5909090909091">
                <text:p>26.5909090909091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26.54">
                <text:p>26.54</text:p>
              </table:table-cell>
              <table:table-cell office:value-type="float" office:value="25.9589795918367">
                <text:p>25.9589795918367</text:p>
              </table:table-cell>
              <table:table-cell office:value-type="float" office:value="26.5715151515152">
                <text:p>26.5715151515152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26.54">
                <text:p>26.54</text:p>
              </table:table-cell>
              <table:table-cell office:value-type="float" office:value="25.9818367346939">
                <text:p>25.9818367346939</text:p>
              </table:table-cell>
              <table:table-cell office:value-type="float" office:value="26.5550505050505">
                <text:p>26.5550505050505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26.54">
                <text:p>26.54</text:p>
              </table:table-cell>
              <table:table-cell office:value-type="float" office:value="26.004693877551">
                <text:p>26.004693877551</text:p>
              </table:table-cell>
              <table:table-cell office:value-type="float" office:value="26.5348484848485">
                <text:p>26.5348484848485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26.65">
                <text:p>26.65</text:p>
              </table:table-cell>
              <table:table-cell office:value-type="float" office:value="26.0275510204082">
                <text:p>26.0275510204082</text:p>
              </table:table-cell>
              <table:table-cell office:value-type="float" office:value="26.5146464646465">
                <text:p>26.5146464646465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26.95">
                <text:p>26.95</text:p>
              </table:table-cell>
              <table:table-cell office:value-type="float" office:value="26.060612244898">
                <text:p>26.060612244898</text:p>
              </table:table-cell>
              <table:table-cell office:value-type="float" office:value="26.4955555555556">
                <text:p>26.4955555555556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26.86">
                <text:p>26.86</text:p>
              </table:table-cell>
              <table:table-cell office:value-type="float" office:value="26.0914285714286">
                <text:p>26.0914285714286</text:p>
              </table:table-cell>
              <table:table-cell office:value-type="float" office:value="26.4809090909091">
                <text:p>26.4809090909091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27.02">
                <text:p>27.02</text:p>
              </table:table-cell>
              <table:table-cell office:value-type="float" office:value="26.1208163265306">
                <text:p>26.1208163265306</text:p>
              </table:table-cell>
              <table:table-cell office:value-type="float" office:value="26.470202020202">
                <text:p>26.470202020202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26.9">
                <text:p>26.9</text:p>
              </table:table-cell>
              <table:table-cell office:value-type="float" office:value="26.1475510204082">
                <text:p>26.1475510204082</text:p>
              </table:table-cell>
              <table:table-cell office:value-type="float" office:value="26.459797979798">
                <text:p>26.459797979798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26.9">
                <text:p>26.9</text:p>
              </table:table-cell>
              <table:table-cell office:value-type="float" office:value="26.1726530612245">
                <text:p>26.1726530612245</text:p>
              </table:table-cell>
              <table:table-cell office:value-type="float" office:value="26.4479797979798">
                <text:p>26.4479797979798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26.9">
                <text:p>26.9</text:p>
              </table:table-cell>
              <table:table-cell office:value-type="float" office:value="26.1977551020408">
                <text:p>26.1977551020408</text:p>
              </table:table-cell>
              <table:table-cell office:value-type="float" office:value="26.4322222222222">
                <text:p>26.4322222222222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6.92">
                <text:p>26.92</text:p>
              </table:table-cell>
              <table:table-cell office:value-type="float" office:value="26.2228571428571">
                <text:p>26.2228571428571</text:p>
              </table:table-cell>
              <table:table-cell office:value-type="float" office:value="26.4164646464646">
                <text:p>26.4164646464646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6.72">
                <text:p>26.72</text:p>
              </table:table-cell>
              <table:table-cell office:value-type="float" office:value="26.2459183673469">
                <text:p>26.2459183673469</text:p>
              </table:table-cell>
              <table:table-cell office:value-type="float" office:value="26.4009090909091">
                <text:p>26.4009090909091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6.64">
                <text:p>26.64</text:p>
              </table:table-cell>
              <table:table-cell office:value-type="float" office:value="26.2628571428571">
                <text:p>26.2628571428571</text:p>
              </table:table-cell>
              <table:table-cell office:value-type="float" office:value="26.3841414141414">
                <text:p>26.3841414141414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26.64">
                <text:p>26.64</text:p>
              </table:table-cell>
              <table:table-cell office:value-type="float" office:value="26.2795918367347">
                <text:p>26.2795918367347</text:p>
              </table:table-cell>
              <table:table-cell office:value-type="float" office:value="26.3730303030303">
                <text:p>26.3730303030303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6.7">
                <text:p>26.7</text:p>
              </table:table-cell>
              <table:table-cell office:value-type="float" office:value="26.2985714285714">
                <text:p>26.2985714285714</text:p>
              </table:table-cell>
              <table:table-cell office:value-type="float" office:value="26.3649494949495">
                <text:p>26.3649494949495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26.7">
                <text:p>26.7</text:p>
              </table:table-cell>
              <table:table-cell office:value-type="float" office:value="26.3116326530612">
                <text:p>26.3116326530612</text:p>
              </table:table-cell>
              <table:table-cell office:value-type="float" office:value="26.3589898989899">
                <text:p>26.3589898989899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26.7">
                <text:p>26.7</text:p>
              </table:table-cell>
              <table:table-cell office:value-type="float" office:value="26.324693877551">
                <text:p>26.324693877551</text:p>
              </table:table-cell>
              <table:table-cell office:value-type="float" office:value="26.349494949495">
                <text:p>26.349494949495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6.7">
                <text:p>26.7</text:p>
              </table:table-cell>
              <table:table-cell office:value-type="float" office:value="26.3377551020408">
                <text:p>26.3377551020408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6.74">
                <text:p>26.74</text:p>
              </table:table-cell>
              <table:table-cell office:value-type="float" office:value="26.3561224489796">
                <text:p>26.3561224489796</text:p>
              </table:table-cell>
              <table:table-cell office:value-type="float" office:value="26.3305050505051">
                <text:p>26.3305050505051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6.2">
                <text:p>26.2</text:p>
              </table:table-cell>
              <table:table-cell office:value-type="float" office:value="26.3804081632653">
                <text:p>26.3804081632653</text:p>
              </table:table-cell>
              <table:table-cell office:value-type="float" office:value="26.3181818181818">
                <text:p>26.3181818181818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6.39">
                <text:p>26.39</text:p>
              </table:table-cell>
              <table:table-cell office:value-type="float" office:value="26.3918367346939">
                <text:p>26.3918367346939</text:p>
              </table:table-cell>
              <table:table-cell office:value-type="float" office:value="26.3008080808081">
                <text:p>26.3008080808081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6.39">
                <text:p>26.39</text:p>
              </table:table-cell>
              <table:table-cell office:value-type="float" office:value="26.4042857142857">
                <text:p>26.4042857142857</text:p>
              </table:table-cell>
              <table:table-cell office:value-type="float" office:value="26.2842424242424">
                <text:p>26.2842424242424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26.39">
                <text:p>26.39</text:p>
              </table:table-cell>
              <table:table-cell office:value-type="float" office:value="26.4177551020408">
                <text:p>26.4177551020408</text:p>
              </table:table-cell>
              <table:table-cell office:value-type="float" office:value="26.2684848484849">
                <text:p>26.2684848484849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26.39">
                <text:p>26.39</text:p>
              </table:table-cell>
              <table:table-cell office:value-type="float" office:value="26.4312244897959">
                <text:p>26.4312244897959</text:p>
              </table:table-cell>
              <table:table-cell office:value-type="float" office:value="26.2546464646465">
                <text:p>26.2546464646465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6.5">
                <text:p>26.5</text:p>
              </table:table-cell>
              <table:table-cell office:value-type="float" office:value="26.444693877551">
                <text:p>26.444693877551</text:p>
              </table:table-cell>
              <table:table-cell office:value-type="float" office:value="26.2408080808081">
                <text:p>26.2408080808081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7.05">
                <text:p>27.05</text:p>
              </table:table-cell>
              <table:table-cell office:value-type="float" office:value="26.4461224489796">
                <text:p>26.4461224489796</text:p>
              </table:table-cell>
              <table:table-cell office:value-type="float" office:value="26.2280808080808">
                <text:p>26.2280808080808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7.31">
                <text:p>27.31</text:p>
              </table:table-cell>
              <table:table-cell office:value-type="float" office:value="26.4612244897959">
                <text:p>26.4612244897959</text:p>
              </table:table-cell>
              <table:table-cell office:value-type="float" office:value="26.2175757575758">
                <text:p>26.2175757575758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7.35">
                <text:p>27.35</text:p>
              </table:table-cell>
              <table:table-cell office:value-type="float" office:value="26.4879591836735">
                <text:p>26.4879591836735</text:p>
              </table:table-cell>
              <table:table-cell office:value-type="float" office:value="26.2122222222222">
                <text:p>26.2122222222222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27.35">
                <text:p>27.35</text:p>
              </table:table-cell>
              <table:table-cell office:value-type="float" office:value="26.5069387755102">
                <text:p>26.5069387755102</text:p>
              </table:table-cell>
              <table:table-cell office:value-type="float" office:value="26.2076767676768">
                <text:p>26.2076767676768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27.35">
                <text:p>27.35</text:p>
              </table:table-cell>
              <table:table-cell office:value-type="float" office:value="26.5222448979592">
                <text:p>26.5222448979592</text:p>
              </table:table-cell>
              <table:table-cell office:value-type="float" office:value="26.2036363636364">
                <text:p>26.2036363636364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27.35">
                <text:p>27.35</text:p>
              </table:table-cell>
              <table:table-cell office:value-type="float" office:value="26.5375510204082">
                <text:p>26.5375510204082</text:p>
              </table:table-cell>
              <table:table-cell office:value-type="float" office:value="26.2013131313131">
                <text:p>26.2013131313131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7.06">
                <text:p>27.06</text:p>
              </table:table-cell>
              <table:table-cell office:value-type="float" office:value="26.5528571428571">
                <text:p>26.5528571428571</text:p>
              </table:table-cell>
              <table:table-cell office:value-type="float" office:value="26.1989898989899">
                <text:p>26.1989898989899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7.32">
                <text:p>27.32</text:p>
              </table:table-cell>
              <table:table-cell office:value-type="float" office:value="26.5626530612245">
                <text:p>26.5626530612245</text:p>
              </table:table-cell>
              <table:table-cell office:value-type="float" office:value="26.1937373737374">
                <text:p>26.1937373737374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7.29">
                <text:p>27.29</text:p>
              </table:table-cell>
              <table:table-cell office:value-type="float" office:value="26.5797959183674">
                <text:p>26.5797959183674</text:p>
              </table:table-cell>
              <table:table-cell office:value-type="float" office:value="26.1872727272727">
                <text:p>26.1872727272727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7.51">
                <text:p>27.51</text:p>
              </table:table-cell>
              <table:table-cell office:value-type="float" office:value="26.6059183673469">
                <text:p>26.6059183673469</text:p>
              </table:table-cell>
              <table:table-cell office:value-type="float" office:value="26.1814141414141">
                <text:p>26.1814141414141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7.33">
                <text:p>27.33</text:p>
              </table:table-cell>
              <table:table-cell office:value-type="float" office:value="26.6375510204082">
                <text:p>26.6375510204082</text:p>
              </table:table-cell>
              <table:table-cell office:value-type="float" office:value="26.1777777777778">
                <text:p>26.1777777777778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27.33">
                <text:p>27.33</text:p>
              </table:table-cell>
              <table:table-cell office:value-type="float" office:value="26.6669387755102">
                <text:p>26.6669387755102</text:p>
              </table:table-cell>
              <table:table-cell office:value-type="float" office:value="26.1838383838384">
                <text:p>26.1838383838384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27.33">
                <text:p>27.33</text:p>
              </table:table-cell>
              <table:table-cell office:value-type="float" office:value="26.6963265306122">
                <text:p>26.6963265306122</text:p>
              </table:table-cell>
              <table:table-cell office:value-type="float" office:value="26.2045454545455">
                <text:p>26.2045454545455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7.31">
                <text:p>27.31</text:p>
              </table:table-cell>
              <table:table-cell office:value-type="float" office:value="26.7257142857143">
                <text:p>26.7257142857143</text:p>
              </table:table-cell>
              <table:table-cell office:value-type="float" office:value="26.2252525252525">
                <text:p>26.2252525252525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6.87">
                <text:p>26.87</text:p>
              </table:table-cell>
              <table:table-cell office:value-type="float" office:value="26.754693877551">
                <text:p>26.754693877551</text:p>
              </table:table-cell>
              <table:table-cell office:value-type="float" office:value="26.2457575757576">
                <text:p>26.2457575757576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6.93">
                <text:p>26.93</text:p>
              </table:table-cell>
              <table:table-cell office:value-type="float" office:value="26.7669387755102">
                <text:p>26.7669387755102</text:p>
              </table:table-cell>
              <table:table-cell office:value-type="float" office:value="26.2652525252525">
                <text:p>26.2652525252525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27.14">
                <text:p>27.14</text:p>
              </table:table-cell>
              <table:table-cell office:value-type="float" office:value="26.7851020408163">
                <text:p>26.7851020408163</text:p>
              </table:table-cell>
              <table:table-cell office:value-type="float" office:value="26.2916161616162">
                <text:p>26.2916161616162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7.02">
                <text:p>27.02</text:p>
              </table:table-cell>
              <table:table-cell office:value-type="float" office:value="26.8044897959184">
                <text:p>26.8044897959184</text:p>
              </table:table-cell>
              <table:table-cell office:value-type="float" office:value="26.3044444444444">
                <text:p>26.3044444444444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27.02">
                <text:p>27.02</text:p>
              </table:table-cell>
              <table:table-cell office:value-type="float" office:value="26.8218367346939">
                <text:p>26.8218367346939</text:p>
              </table:table-cell>
              <table:table-cell office:value-type="float" office:value="26.3251515151515">
                <text:p>26.3251515151515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27.02">
                <text:p>27.02</text:p>
              </table:table-cell>
              <table:table-cell office:value-type="float" office:value="26.8391836734694">
                <text:p>26.8391836734694</text:p>
              </table:table-cell>
              <table:table-cell office:value-type="float" office:value="26.3425252525253">
                <text:p>26.3425252525253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6.95">
                <text:p>26.95</text:p>
              </table:table-cell>
              <table:table-cell office:value-type="float" office:value="26.8565306122449">
                <text:p>26.8565306122449</text:p>
              </table:table-cell>
              <table:table-cell office:value-type="float" office:value="26.359898989899">
                <text:p>26.359898989899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7.24">
                <text:p>27.24</text:p>
              </table:table-cell>
              <table:table-cell office:value-type="float" office:value="26.8708163265306">
                <text:p>26.8708163265306</text:p>
              </table:table-cell>
              <table:table-cell office:value-type="float" office:value="26.3765656565657">
                <text:p>26.3765656565657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7.38">
                <text:p>27.38</text:p>
              </table:table-cell>
              <table:table-cell office:value-type="float" office:value="26.8871428571429">
                <text:p>26.8871428571429</text:p>
              </table:table-cell>
              <table:table-cell office:value-type="float" office:value="26.3931313131313">
                <text:p>26.3931313131313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7.28">
                <text:p>27.28</text:p>
              </table:table-cell>
              <table:table-cell office:value-type="float" office:value="26.909387755102">
                <text:p>26.909387755102</text:p>
              </table:table-cell>
              <table:table-cell office:value-type="float" office:value="26.4128282828283">
                <text:p>26.4128282828283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7.32">
                <text:p>27.32</text:p>
              </table:table-cell>
              <table:table-cell office:value-type="float" office:value="26.9308163265306">
                <text:p>26.9308163265306</text:p>
              </table:table-cell>
              <table:table-cell office:value-type="float" office:value="26.4345454545455">
                <text:p>26.4345454545455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27.32">
                <text:p>27.32</text:p>
              </table:table-cell>
              <table:table-cell office:value-type="float" office:value="26.9467346938776">
                <text:p>26.9467346938776</text:p>
              </table:table-cell>
              <table:table-cell office:value-type="float" office:value="26.4537373737374">
                <text:p>26.4537373737374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27.32">
                <text:p>27.32</text:p>
              </table:table-cell>
              <table:table-cell office:value-type="float" office:value="26.9626530612245">
                <text:p>26.9626530612245</text:p>
              </table:table-cell>
              <table:table-cell office:value-type="float" office:value="26.4729292929293">
                <text:p>26.4729292929293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7.2">
                <text:p>27.2</text:p>
              </table:table-cell>
              <table:table-cell office:value-type="float" office:value="26.9785714285714">
                <text:p>26.9785714285714</text:p>
              </table:table-cell>
              <table:table-cell office:value-type="float" office:value="26.4921212121212">
                <text:p>26.4921212121212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27.17">
                <text:p>27.17</text:p>
              </table:table-cell>
              <table:table-cell office:value-type="float" office:value="26.9897959183673">
                <text:p>26.9897959183673</text:p>
              </table:table-cell>
              <table:table-cell office:value-type="float" office:value="26.510101010101">
                <text:p>26.510101010101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26.84">
                <text:p>26.84</text:p>
              </table:table-cell>
              <table:table-cell office:value-type="float" office:value="26.9942857142857">
                <text:p>26.9942857142857</text:p>
              </table:table-cell>
              <table:table-cell office:value-type="float" office:value="26.5317171717172">
                <text:p>26.5317171717172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26.5">
                <text:p>26.5</text:p>
              </table:table-cell>
              <table:table-cell office:value-type="float" office:value="26.9938775510204">
                <text:p>26.9938775510204</text:p>
              </table:table-cell>
              <table:table-cell office:value-type="float" office:value="26.5458585858586">
                <text:p>26.5458585858586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26.38">
                <text:p>26.38</text:p>
              </table:table-cell>
              <table:table-cell office:value-type="float" office:value="26.9832653061225">
                <text:p>26.9832653061225</text:p>
              </table:table-cell>
              <table:table-cell office:value-type="float" office:value="26.5567676767677">
                <text:p>26.5567676767677</text:p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26.38">
                <text:p>26.38</text:p>
              </table:table-cell>
              <table:table-cell office:value-type="float" office:value="26.9726530612245">
                <text:p>26.9726530612245</text:p>
              </table:table-cell>
              <table:table-cell office:value-type="float" office:value="26.5635353535354">
                <text:p>26.5635353535354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26.38">
                <text:p>26.38</text:p>
              </table:table-cell>
              <table:table-cell office:value-type="float" office:value="26.9620408163265">
                <text:p>26.9620408163265</text:p>
              </table:table-cell>
              <table:table-cell office:value-type="float" office:value="26.5707070707071">
                <text:p>26.5707070707071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26.61">
                <text:p>26.61</text:p>
              </table:table-cell>
              <table:table-cell office:value-type="float" office:value="26.9514285714286">
                <text:p>26.9514285714286</text:p>
              </table:table-cell>
              <table:table-cell office:value-type="float" office:value="26.5778787878788">
                <text:p>26.5778787878788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6.74">
                <text:p>26.74</text:p>
              </table:table-cell>
              <table:table-cell office:value-type="float" office:value="26.9451020408163">
                <text:p>26.9451020408163</text:p>
              </table:table-cell>
              <table:table-cell office:value-type="float" office:value="26.5873737373737">
                <text:p>26.5873737373737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26.68">
                <text:p>26.68</text:p>
              </table:table-cell>
              <table:table-cell office:value-type="float" office:value="26.9455102040816">
                <text:p>26.9455102040816</text:p>
              </table:table-cell>
              <table:table-cell office:value-type="float" office:value="26.5969696969697">
                <text:p>26.5969696969697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26.75">
                <text:p>26.75</text:p>
              </table:table-cell>
              <table:table-cell office:value-type="float" office:value="26.9463265306122">
                <text:p>26.9463265306122</text:p>
              </table:table-cell>
              <table:table-cell office:value-type="float" office:value="26.6049494949495">
                <text:p>26.6049494949495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26.88">
                <text:p>26.88</text:p>
              </table:table-cell>
              <table:table-cell office:value-type="float" office:value="26.9485714285714">
                <text:p>26.9485714285714</text:p>
              </table:table-cell>
              <table:table-cell office:value-type="float" office:value="26.6143434343434">
                <text:p>26.6143434343434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26.88">
                <text:p>26.88</text:p>
              </table:table-cell>
              <table:table-cell office:value-type="float" office:value="26.9522448979592">
                <text:p>26.9522448979592</text:p>
              </table:table-cell>
              <table:table-cell office:value-type="float" office:value="26.6261616161616">
                <text:p>26.6261616161616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26.88">
                <text:p>26.88</text:p>
              </table:table-cell>
              <table:table-cell office:value-type="float" office:value="26.9559183673469">
                <text:p>26.9559183673469</text:p>
              </table:table-cell>
              <table:table-cell office:value-type="float" office:value="26.6344444444444">
                <text:p>26.6344444444444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26.79">
                <text:p>26.79</text:p>
              </table:table-cell>
              <table:table-cell office:value-type="float" office:value="26.9595918367347">
                <text:p>26.9595918367347</text:p>
              </table:table-cell>
              <table:table-cell office:value-type="float" office:value="26.6427272727273">
                <text:p>26.6427272727273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27.1">
                <text:p>27.1</text:p>
              </table:table-cell>
              <table:table-cell office:value-type="float" office:value="26.9614285714286">
                <text:p>26.9614285714286</text:p>
              </table:table-cell>
              <table:table-cell office:value-type="float" office:value="26.650101010101">
                <text:p>26.650101010101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27.46">
                <text:p>27.46</text:p>
              </table:table-cell>
              <table:table-cell office:value-type="float" office:value="26.9687755102041">
                <text:p>26.9687755102041</text:p>
              </table:table-cell>
              <table:table-cell office:value-type="float" office:value="26.6632323232323">
                <text:p>26.6632323232323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27.34">
                <text:p>27.34</text:p>
              </table:table-cell>
              <table:table-cell office:value-type="float" office:value="26.9944897959184">
                <text:p>26.9944897959184</text:p>
              </table:table-cell>
              <table:table-cell office:value-type="float" office:value="26.6825252525253">
                <text:p>26.6825252525253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27.33">
                <text:p>27.33</text:p>
              </table:table-cell>
              <table:table-cell office:value-type="float" office:value="27.0138775510204">
                <text:p>27.0138775510204</text:p>
              </table:table-cell>
              <table:table-cell office:value-type="float" office:value="26.699696969697">
                <text:p>26.699696969697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27.33">
                <text:p>27.33</text:p>
              </table:table-cell>
              <table:table-cell office:value-type="float" office:value="27.0330612244898">
                <text:p>27.0330612244898</text:p>
              </table:table-cell>
              <table:table-cell office:value-type="float" office:value="26.7153535353535">
                <text:p>26.7153535353535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27.33">
                <text:p>27.33</text:p>
              </table:table-cell>
              <table:table-cell office:value-type="float" office:value="27.0522448979592">
                <text:p>27.0522448979592</text:p>
              </table:table-cell>
              <table:table-cell office:value-type="float" office:value="26.7315151515152">
                <text:p>26.7315151515152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7.26">
                <text:p>27.26</text:p>
              </table:table-cell>
              <table:table-cell office:value-type="float" office:value="27.0714285714286">
                <text:p>27.0714285714286</text:p>
              </table:table-cell>
              <table:table-cell office:value-type="float" office:value="26.7476767676768">
                <text:p>26.7476767676768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27.45">
                <text:p>27.45</text:p>
              </table:table-cell>
              <table:table-cell office:value-type="float" office:value="27.0869387755102">
                <text:p>27.0869387755102</text:p>
              </table:table-cell>
              <table:table-cell office:value-type="float" office:value="26.7631313131313">
                <text:p>26.7631313131313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27.51">
                <text:p>27.51</text:p>
              </table:table-cell>
              <table:table-cell office:value-type="float" office:value="27.0951020408163">
                <text:p>27.0951020408163</text:p>
              </table:table-cell>
              <table:table-cell office:value-type="float" office:value="26.7734343434343">
                <text:p>26.7734343434343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27.52">
                <text:p>27.52</text:p>
              </table:table-cell>
              <table:table-cell office:value-type="float" office:value="27.0991836734694">
                <text:p>27.0991836734694</text:p>
              </table:table-cell>
              <table:table-cell office:value-type="float" office:value="26.7855555555556">
                <text:p>26.7855555555556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27.95">
                <text:p>27.95</text:p>
              </table:table-cell>
              <table:table-cell office:value-type="float" office:value="27.1026530612245">
                <text:p>27.1026530612245</text:p>
              </table:table-cell>
              <table:table-cell office:value-type="float" office:value="26.8009090909091">
                <text:p>26.8009090909091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27.95">
                <text:p>27.95</text:p>
              </table:table-cell>
              <table:table-cell office:value-type="float" office:value="27.1148979591837">
                <text:p>27.1148979591837</text:p>
              </table:table-cell>
              <table:table-cell office:value-type="float" office:value="26.8163636363636">
                <text:p>26.8163636363636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27.95">
                <text:p>27.95</text:p>
              </table:table-cell>
              <table:table-cell office:value-type="float" office:value="27.1271428571429">
                <text:p>27.1271428571429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27.77">
                <text:p>27.77</text:p>
              </table:table-cell>
              <table:table-cell office:value-type="float" office:value="27.139387755102">
                <text:p>27.139387755102</text:p>
              </table:table-cell>
              <table:table-cell office:value-type="float" office:value="26.8436363636364">
                <text:p>26.8436363636364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27.75">
                <text:p>27.75</text:p>
              </table:table-cell>
              <table:table-cell office:value-type="float" office:value="27.1538775510204">
                <text:p>27.1538775510204</text:p>
              </table:table-cell>
              <table:table-cell office:value-type="float" office:value="26.8554545454545">
                <text:p>26.8554545454545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27.87">
                <text:p>27.87</text:p>
              </table:table-cell>
              <table:table-cell office:value-type="float" office:value="27.1626530612245">
                <text:p>27.1626530612245</text:p>
              </table:table-cell>
              <table:table-cell office:value-type="float" office:value="26.8672727272727">
                <text:p>26.8672727272727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27.82">
                <text:p>27.82</text:p>
              </table:table-cell>
              <table:table-cell office:value-type="float" office:value="27.1744897959184">
                <text:p>27.1744897959184</text:p>
              </table:table-cell>
              <table:table-cell office:value-type="float" office:value="26.8813131313131">
                <text:p>26.8813131313131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27.92">
                <text:p>27.92</text:p>
              </table:table-cell>
              <table:table-cell office:value-type="float" office:value="27.1808163265306">
                <text:p>27.1808163265306</text:p>
              </table:table-cell>
              <table:table-cell office:value-type="float" office:value="26.899595959596">
                <text:p>26.899595959596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27.92">
                <text:p>27.92</text:p>
              </table:table-cell>
              <table:table-cell office:value-type="float" office:value="27.1928571428571">
                <text:p>27.1928571428571</text:p>
              </table:table-cell>
              <table:table-cell office:value-type="float" office:value="26.9193939393939">
                <text:p>26.9193939393939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27.92">
                <text:p>27.92</text:p>
              </table:table-cell>
              <table:table-cell office:value-type="float" office:value="27.2048979591837">
                <text:p>27.2048979591837</text:p>
              </table:table-cell>
              <table:table-cell office:value-type="float" office:value="26.939898989899">
                <text:p>26.939898989899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27.92">
                <text:p>27.92</text:p>
              </table:table-cell>
              <table:table-cell office:value-type="float" office:value="27.2169387755102">
                <text:p>27.2169387755102</text:p>
              </table:table-cell>
              <table:table-cell office:value-type="float" office:value="26.960404040404">
                <text:p>26.960404040404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27.84">
                <text:p>27.84</text:p>
              </table:table-cell>
              <table:table-cell office:value-type="float" office:value="27.229387755102">
                <text:p>27.229387755102</text:p>
              </table:table-cell>
              <table:table-cell office:value-type="float" office:value="26.9809090909091">
                <text:p>26.9809090909091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27.6">
                <text:p>27.6</text:p>
              </table:table-cell>
              <table:table-cell office:value-type="float" office:value="27.2491836734694">
                <text:p>27.2491836734694</text:p>
              </table:table-cell>
              <table:table-cell office:value-type="float" office:value="27.0006060606061">
                <text:p>27.0006060606061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27.69">
                <text:p>27.69</text:p>
              </table:table-cell>
              <table:table-cell office:value-type="float" office:value="27.2628571428571">
                <text:p>27.2628571428571</text:p>
              </table:table-cell>
              <table:table-cell office:value-type="float" office:value="27.0140404040404">
                <text:p>27.0140404040404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27.64">
                <text:p>27.64</text:p>
              </table:table-cell>
              <table:table-cell office:value-type="float" office:value="27.2740816326531">
                <text:p>27.2740816326531</text:p>
              </table:table-cell>
              <table:table-cell office:value-type="float" office:value="27.0307070707071">
                <text:p>27.0307070707071</text:p>
              </table:table-cell>
            </table:table-row>
            <table:table-row>
              <table:table-cell office:value-type="float" office:value="45906">
                <text:p>45906</text:p>
              </table:table-cell>
              <table:table-cell office:value-type="float" office:value="27.64">
                <text:p>27.64</text:p>
              </table:table-cell>
              <table:table-cell office:value-type="float" office:value="27.2867346938776">
                <text:p>27.2867346938776</text:p>
              </table:table-cell>
              <table:table-cell office:value-type="float" office:value="27.0453535353535">
                <text:p>27.0453535353535</text:p>
              </table:table-cell>
            </table:table-row>
            <table:table-row>
              <table:table-cell office:value-type="float" office:value="45907">
                <text:p>45907</text:p>
              </table:table-cell>
              <table:table-cell office:value-type="float" office:value="27.64">
                <text:p>27.64</text:p>
              </table:table-cell>
              <table:table-cell office:value-type="float" office:value="27.299387755102">
                <text:p>27.299387755102</text:p>
              </table:table-cell>
              <table:table-cell office:value-type="float" office:value="27.060202020202">
                <text:p>27.060202020202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27.44">
                <text:p>27.44</text:p>
              </table:table-cell>
              <table:table-cell office:value-type="float" office:value="27.3120408163265">
                <text:p>27.3120408163265</text:p>
              </table:table-cell>
              <table:table-cell office:value-type="float" office:value="27.0750505050505">
                <text:p>27.0750505050505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27.45">
                <text:p>27.45</text:p>
              </table:table-cell>
              <table:table-cell office:value-type="float" office:value="27.3220408163265">
                <text:p>27.3220408163265</text:p>
              </table:table-cell>
              <table:table-cell office:value-type="float" office:value="27.0878787878788">
                <text:p>27.0878787878788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27.5">
                <text:p>27.5</text:p>
              </table:table-cell>
              <table:table-cell office:value-type="float" office:value="27.3263265306122">
                <text:p>27.326326530612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27.72">
                <text:p>27.72</text:p>
              </table:table-cell>
              <table:table-cell office:value-type="float" office:value="27.3287755102041">
                <text:p>27.3287755102041</text:p>
              </table:table-cell>
              <table:table-cell office:value-type="float" office:value="27.1107070707071">
                <text:p>27.1107070707071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27.48">
                <text:p>27.48</text:p>
              </table:table-cell>
              <table:table-cell office:value-type="float" office:value="27.3377551020408">
                <text:p>27.3377551020408</text:p>
              </table:table-cell>
              <table:table-cell office:value-type="float" office:value="27.1251515151515">
                <text:p>27.1251515151515</text:p>
              </table:table-cell>
            </table:table-row>
            <table:table-row>
              <table:table-cell office:value-type="float" office:value="45913">
                <text:p>45913</text:p>
              </table:table-cell>
              <table:table-cell office:value-type="float" office:value="27.48">
                <text:p>27.48</text:p>
              </table:table-cell>
              <table:table-cell office:value-type="float" office:value="27.3410204081633">
                <text:p>27.3410204081633</text:p>
              </table:table-cell>
              <table:table-cell office:value-type="float" office:value="27.1377777777778">
                <text:p>27.1377777777778</text:p>
              </table:table-cell>
            </table:table-row>
            <table:table-row>
              <table:table-cell office:value-type="float" office:value="45914">
                <text:p>45914</text:p>
              </table:table-cell>
              <table:table-cell office:value-type="float" office:value="27.48">
                <text:p>27.48</text:p>
              </table:table-cell>
              <table:table-cell office:value-type="float" office:value="27.3442857142857">
                <text:p>27.3442857142857</text:p>
              </table:table-cell>
              <table:table-cell office:value-type="float" office:value="27.1472727272727">
                <text:p>27.1472727272727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27.34">
                <text:p>27.34</text:p>
              </table:table-cell>
              <table:table-cell office:value-type="float" office:value="27.3475510204082">
                <text:p>27.3475510204082</text:p>
              </table:table-cell>
              <table:table-cell office:value-type="float" office:value="27.1567676767677">
                <text:p>27.1567676767677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27.42">
                <text:p>27.42</text:p>
              </table:table-cell>
              <table:table-cell office:value-type="float" office:value="27.3504081632653">
                <text:p>27.3504081632653</text:p>
              </table:table-cell>
              <table:table-cell office:value-type="float" office:value="27.1648484848485">
                <text:p>27.1648484848485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27.47">
                <text:p>27.47</text:p>
              </table:table-cell>
              <table:table-cell office:value-type="float" office:value="27.3555102040816">
                <text:p>27.3555102040816</text:p>
              </table:table-cell>
              <table:table-cell office:value-type="float" office:value="27.1726262626263">
                <text:p>27.1726262626263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27.45">
                <text:p>27.45</text:p>
              </table:table-cell>
              <table:table-cell office:value-type="float" office:value="27.3683673469388">
                <text:p>27.3683673469388</text:p>
              </table:table-cell>
              <table:table-cell office:value-type="float" office:value="27.1778787878788">
                <text:p>27.1778787878788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27.33">
                <text:p>27.33</text:p>
              </table:table-cell>
              <table:table-cell office:value-type="float" office:value="27.3877551020408">
                <text:p>27.3877551020408</text:p>
              </table:table-cell>
              <table:table-cell office:value-type="float" office:value="27.1838383838384">
                <text:p>27.1838383838384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27.33">
                <text:p>27.33</text:p>
              </table:table-cell>
              <table:table-cell office:value-type="float" office:value="27.4071428571429">
                <text:p>27.4071428571429</text:p>
              </table:table-cell>
              <table:table-cell office:value-type="float" office:value="27.1869696969697">
                <text:p>27.1869696969697</text:p>
              </table:table-cell>
            </table:table-row>
            <table:table-row>
              <table:table-cell office:value-type="float" office:value="45921">
                <text:p>45921</text:p>
              </table:table-cell>
              <table:table-cell office:value-type="float" office:value="27.33">
                <text:p>27.33</text:p>
              </table:table-cell>
              <table:table-cell office:value-type="float" office:value="27.4265306122449">
                <text:p>27.4265306122449</text:p>
              </table:table-cell>
              <table:table-cell office:value-type="float" office:value="27.1913131313131">
                <text:p>27.1913131313131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27.25">
                <text:p>27.25</text:p>
              </table:table-cell>
              <table:table-cell office:value-type="float" office:value="27.4459183673469">
                <text:p>27.4459183673469</text:p>
              </table:table-cell>
              <table:table-cell office:value-type="float" office:value="27.1956565656566">
                <text:p>27.1956565656566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27.4">
                <text:p>27.4</text:p>
              </table:table-cell>
              <table:table-cell office:value-type="float" office:value="27.4589795918367">
                <text:p>27.4589795918367</text:p>
              </table:table-cell>
              <table:table-cell office:value-type="float" office:value="27.1991919191919">
                <text:p>27.1991919191919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27.16">
                <text:p>27.16</text:p>
              </table:table-cell>
              <table:table-cell office:value-type="float" office:value="27.4724489795918">
                <text:p>27.4724489795918</text:p>
              </table:table-cell>
              <table:table-cell office:value-type="float" office:value="27.2040404040404">
                <text:p>27.2040404040404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26.99">
                <text:p>26.99</text:p>
              </table:table-cell>
              <table:table-cell office:value-type="float" office:value="27.4822448979592">
                <text:p>27.4822448979592</text:p>
              </table:table-cell>
              <table:table-cell office:value-type="float" office:value="27.2084848484848">
                <text:p>27.2084848484848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27.21">
                <text:p>27.21</text:p>
              </table:table-cell>
              <table:table-cell office:value-type="float" office:value="27.4871428571429">
                <text:p>27.4871428571429</text:p>
              </table:table-cell>
              <table:table-cell office:value-type="float" office:value="27.2120202020202">
                <text:p>27.2120202020202</text:p>
              </table:table-cell>
            </table:table-row>
            <table:table-row>
              <table:table-cell office:value-type="float" office:value="45927">
                <text:p>45927</text:p>
              </table:table-cell>
              <table:table-cell office:value-type="float" office:value="27.21">
                <text:p>27.21</text:p>
              </table:table-cell>
              <table:table-cell office:value-type="float" office:value="27.4938775510204">
                <text:p>27.4938775510204</text:p>
              </table:table-cell>
              <table:table-cell office:value-type="float" office:value="27.2177777777778">
                <text:p>27.2177777777778</text:p>
              </table:table-cell>
            </table:table-row>
            <table:table-row>
              <table:table-cell office:value-type="float" office:value="45928">
                <text:p>45928</text:p>
              </table:table-cell>
              <table:table-cell office:value-type="float" office:value="27.21">
                <text:p>27.21</text:p>
              </table:table-cell>
              <table:table-cell office:value-type="float" office:value="27.500612244898">
                <text:p>27.500612244898</text:p>
              </table:table-cell>
              <table:table-cell office:value-type="float" office:value="27.2229292929293">
                <text:p>27.2229292929293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27.1">
                <text:p>27.1</text:p>
              </table:table-cell>
              <table:table-cell office:value-type="float" office:value="27.5073469387755">
                <text:p>27.5073469387755</text:p>
              </table:table-cell>
              <table:table-cell office:value-type="float" office:value="27.2280808080808">
                <text:p>27.2280808080808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27.3">
                <text:p>27.3</text:p>
              </table:table-cell>
              <table:table-cell office:value-type="float" office:value="27.5136734693878">
                <text:p>27.5136734693878</text:p>
              </table:table-cell>
              <table:table-cell office:value-type="float" office:value="27.2321212121212">
                <text:p>27.2321212121212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27.53">
                <text:p>27.53</text:p>
              </table:table-cell>
              <table:table-cell office:value-type="float" office:value="27.5177551020408">
                <text:p>27.5177551020408</text:p>
              </table:table-cell>
              <table:table-cell office:value-type="float" office:value="27.2381818181818">
                <text:p>27.2381818181818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27.34">
                <text:p>27.34</text:p>
              </table:table-cell>
              <table:table-cell office:value-type="float" office:value="27.5191836734694">
                <text:p>27.5191836734694</text:p>
              </table:table-cell>
              <table:table-cell office:value-type="float" office:value="27.2461616161616">
                <text:p>27.2461616161616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27.41">
                <text:p>27.41</text:p>
              </table:table-cell>
              <table:table-cell office:value-type="float" office:value="27.5191836734694">
                <text:p>27.5191836734694</text:p>
              </table:table-cell>
              <table:table-cell office:value-type="float" office:value="27.2576767676768">
                <text:p>27.2576767676768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27.41">
                <text:p>27.41</text:p>
              </table:table-cell>
              <table:table-cell office:value-type="float" office:value="27.5208163265306">
                <text:p>27.5208163265306</text:p>
              </table:table-cell>
              <table:table-cell office:value-type="float" office:value="27.2679797979798">
                <text:p>27.2679797979798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27.41">
                <text:p>27.41</text:p>
              </table:table-cell>
              <table:table-cell office:value-type="float" office:value="27.5224489795918">
                <text:p>27.5224489795918</text:p>
              </table:table-cell>
              <table:table-cell office:value-type="float" office:value="27.2782828282828">
                <text:p>27.2782828282828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27.34">
                <text:p>27.34</text:p>
              </table:table-cell>
              <table:table-cell office:value-type="float" office:value="27.5240816326531">
                <text:p>27.5240816326531</text:p>
              </table:table-cell>
              <table:table-cell office:value-type="float" office:value="27.2885858585859">
                <text:p>27.2885858585859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27.28">
                <text:p>27.28</text:p>
              </table:table-cell>
              <table:table-cell office:value-type="float" office:value="27.5257142857143">
                <text:p>27.5257142857143</text:p>
              </table:table-cell>
              <table:table-cell office:value-type="float" office:value="27.2981818181818">
                <text:p>27.2981818181818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27.18">
                <text:p>27.18</text:p>
              </table:table-cell>
              <table:table-cell office:value-type="float" office:value="27.5222448979592">
                <text:p>27.5222448979592</text:p>
              </table:table-cell>
              <table:table-cell office:value-type="float" office:value="27.3060606060606">
                <text:p>27.3060606060606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27">
                <text:p>27</text:p>
              </table:table-cell>
              <table:table-cell office:value-type="float" office:value="27.5155102040816">
                <text:p>27.5155102040816</text:p>
              </table:table-cell>
              <table:table-cell office:value-type="float" office:value="27.3073737373737">
                <text:p>27.3073737373737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26.54">
                <text:p>26.54</text:p>
              </table:table-cell>
              <table:table-cell office:value-type="float" office:value="27.5048979591837">
                <text:p>27.5048979591837</text:p>
              </table:table-cell>
              <table:table-cell office:value-type="float" office:value="27.3042424242424">
                <text:p>27.3042424242424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26.54">
                <text:p>26.54</text:p>
              </table:table-cell>
              <table:table-cell office:value-type="float" office:value="27.4761224489796">
                <text:p>27.4761224489796</text:p>
              </table:table-cell>
              <table:table-cell office:value-type="float" office:value="27.2960606060606">
                <text:p>27.2960606060606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26.54">
                <text:p>26.54</text:p>
              </table:table-cell>
              <table:table-cell office:value-type="float" office:value="27.4473469387755">
                <text:p>27.4473469387755</text:p>
              </table:table-cell>
              <table:table-cell office:value-type="float" office:value="27.2878787878788">
                <text:p>27.2878787878788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26.63">
                <text:p>26.63</text:p>
              </table:table-cell>
              <table:table-cell office:value-type="float" office:value="27.4185714285714">
                <text:p>27.4185714285714</text:p>
              </table:table-cell>
              <table:table-cell office:value-type="float" office:value="27.279696969697">
                <text:p>27.279696969697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26.87">
                <text:p>26.87</text:p>
              </table:table-cell>
              <table:table-cell office:value-type="float" office:value="27.395306122449">
                <text:p>27.395306122449</text:p>
              </table:table-cell>
              <table:table-cell office:value-type="float" office:value="27.2724242424242">
                <text:p>27.2724242424242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26.78">
                <text:p>26.78</text:p>
              </table:table-cell>
              <table:table-cell office:value-type="float" office:value="27.3773469387755">
                <text:p>27.3773469387755</text:p>
              </table:table-cell>
              <table:table-cell office:value-type="float" office:value="27.2705050505051">
                <text:p>27.2705050505051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26.57">
                <text:p>26.57</text:p>
              </table:table-cell>
              <table:table-cell office:value-type="float" office:value="27.3551020408163">
                <text:p>27.3551020408163</text:p>
              </table:table-cell>
              <table:table-cell office:value-type="float" office:value="27.2650505050505">
                <text:p>27.2650505050505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26.79">
                <text:p>26.79</text:p>
              </table:table-cell>
              <table:table-cell office:value-type="float" office:value="27.3295918367347">
                <text:p>27.3295918367347</text:p>
              </table:table-cell>
              <table:table-cell office:value-type="float" office:value="27.2577777777778">
                <text:p>27.2577777777778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26.79">
                <text:p>26.79</text:p>
              </table:table-cell>
              <table:table-cell office:value-type="float" office:value="27.3065306122449">
                <text:p>27.3065306122449</text:p>
              </table:table-cell>
              <table:table-cell office:value-type="float" office:value="27.2505050505051">
                <text:p>27.2505050505051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26.79">
                <text:p>26.79</text:p>
              </table:table-cell>
              <table:table-cell office:value-type="float" office:value="27.2834693877551">
                <text:p>27.2834693877551</text:p>
              </table:table-cell>
              <table:table-cell office:value-type="float" office:value="27.2450505050505">
                <text:p>27.2450505050505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26.99">
                <text:p>26.99</text:p>
              </table:table-cell>
              <table:table-cell office:value-type="float" office:value="27.2604081632653">
                <text:p>27.2604081632653</text:p>
              </table:table-cell>
              <table:table-cell office:value-type="float" office:value="27.239595959596">
                <text:p>27.239595959596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27.07">
                <text:p>27.07</text:p>
              </table:table-cell>
              <table:table-cell office:value-type="float" office:value="27.2414285714286">
                <text:p>27.2414285714286</text:p>
              </table:table-cell>
              <table:table-cell office:value-type="float" office:value="27.2361616161616">
                <text:p>27.2361616161616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26.99">
                <text:p>26.99</text:p>
              </table:table-cell>
              <table:table-cell office:value-type="float" office:value="27.2257142857143">
                <text:p>27.2257142857143</text:p>
              </table:table-cell>
              <table:table-cell office:value-type="float" office:value="27.2337373737374">
                <text:p>27.2337373737374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27.03">
                <text:p>27.03</text:p>
              </table:table-cell>
              <table:table-cell office:value-type="float" office:value="27.2132653061225">
                <text:p>27.2132653061225</text:p>
              </table:table-cell>
              <table:table-cell office:value-type="float" office:value="27.2349494949495">
                <text:p>27.2349494949495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27.03">
                <text:p>27.03</text:p>
              </table:table-cell>
              <table:table-cell office:value-type="float" office:value="27.1997959183673">
                <text:p>27.1997959183673</text:p>
              </table:table-cell>
              <table:table-cell office:value-type="float" office:value="27.2359595959596">
                <text:p>27.2359595959596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27.03">
                <text:p>27.03</text:p>
              </table:table-cell>
              <table:table-cell office:value-type="float" office:value="27.1873469387755">
                <text:p>27.1873469387755</text:p>
              </table:table-cell>
              <table:table-cell office:value-type="float" office:value="27.2348484848485">
                <text:p>27.2348484848485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27.03">
                <text:p>27.03</text:p>
              </table:table-cell>
              <table:table-cell office:value-type="float" office:value="27.1748979591837">
                <text:p>27.1748979591837</text:p>
              </table:table-cell>
              <table:table-cell office:value-type="float" office:value="27.2349494949495">
                <text:p>27.2349494949495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27.12">
                <text:p>27.12</text:p>
              </table:table-cell>
              <table:table-cell office:value-type="float" office:value="27.1624489795918">
                <text:p>27.1624489795918</text:p>
              </table:table-cell>
              <table:table-cell office:value-type="float" office:value="27.2350505050505">
                <text:p>27.2350505050505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27">
                <text:p>27</text:p>
              </table:table-cell>
              <table:table-cell office:value-type="float" office:value="27.1559183673469">
                <text:p>27.1559183673469</text:p>
              </table:table-cell>
              <table:table-cell office:value-type="float" office:value="27.2360606060606">
                <text:p>27.2360606060606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26.74">
                <text:p>26.74</text:p>
              </table:table-cell>
              <table:table-cell office:value-type="float" office:value="27.1467346938776">
                <text:p>27.1467346938776</text:p>
              </table:table-cell>
              <table:table-cell office:value-type="float" office:value="27.2365656565657">
                <text:p>27.2365656565657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26.68">
                <text:p>26.68</text:p>
              </table:table-cell>
              <table:table-cell office:value-type="float" office:value="27.1312244897959">
                <text:p>27.1312244897959</text:p>
              </table:table-cell>
              <table:table-cell office:value-type="float" office:value="27.2315151515152">
                <text:p>27.2315151515152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26.75">
                <text:p>26.75</text:p>
              </table:table-cell>
              <table:table-cell office:value-type="float" office:value="27.11">
                <text:p>27.11</text:p>
              </table:table-cell>
              <table:table-cell office:value-type="float" office:value="27.2244444444444">
                <text:p>27.2244444444444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26.75">
                <text:p>26.75</text:p>
              </table:table-cell>
              <table:table-cell office:value-type="float" office:value="27.0951020408163">
                <text:p>27.0951020408163</text:p>
              </table:table-cell>
              <table:table-cell office:value-type="float" office:value="27.2190909090909">
                <text:p>27.2190909090909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26.75">
                <text:p>26.75</text:p>
              </table:table-cell>
              <table:table-cell office:value-type="float" office:value="27.0802040816327">
                <text:p>27.0802040816327</text:p>
              </table:table-cell>
              <table:table-cell office:value-type="float" office:value="27.2133333333333">
                <text:p>27.2133333333333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26.47">
                <text:p>26.47</text:p>
              </table:table-cell>
              <table:table-cell office:value-type="float" office:value="27.065306122449">
                <text:p>27.065306122449</text:p>
              </table:table-cell>
              <table:table-cell office:value-type="float" office:value="27.2075757575758">
                <text:p>27.2075757575758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26.44">
                <text:p>26.44</text:p>
              </table:table-cell>
              <table:table-cell office:value-type="float" office:value="27.0475510204082">
                <text:p>27.0475510204082</text:p>
              </table:table-cell>
              <table:table-cell office:value-type="float" office:value="27.1989898989899">
                <text:p>27.1989898989899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26.57">
                <text:p>26.57</text:p>
              </table:table-cell>
              <table:table-cell office:value-type="float" office:value="27.0275510204082">
                <text:p>27.0275510204082</text:p>
              </table:table-cell>
              <table:table-cell office:value-type="float" office:value="27.1913131313131">
                <text:p>27.1913131313131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26.52">
                <text:p>26.52</text:p>
              </table:table-cell>
              <table:table-cell office:value-type="float" office:value="27.0091836734694">
                <text:p>27.0091836734694</text:p>
              </table:table-cell>
              <table:table-cell office:value-type="float" office:value="27.1852525252525">
                <text:p>27.1852525252525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26.72">
                <text:p>26.72</text:p>
              </table:table-cell>
              <table:table-cell office:value-type="float" office:value="26.9902040816327">
                <text:p>26.9902040816327</text:p>
              </table:table-cell>
              <table:table-cell office:value-type="float" office:value="27.1820202020202">
                <text:p>27.1820202020202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26.72">
                <text:p>26.72</text:p>
              </table:table-cell>
              <table:table-cell office:value-type="float" office:value="26.9777551020408">
                <text:p>26.9777551020408</text:p>
              </table:table-cell>
              <table:table-cell office:value-type="float" office:value="27.1842424242424">
                <text:p>27.1842424242424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26.72">
                <text:p>26.72</text:p>
              </table:table-cell>
              <table:table-cell office:value-type="float" office:value="26.965306122449">
                <text:p>26.965306122449</text:p>
              </table:table-cell>
              <table:table-cell office:value-type="float" office:value="27.1876767676768">
                <text:p>27.1876767676768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26.77">
                <text:p>26.77</text:p>
              </table:table-cell>
              <table:table-cell office:value-type="float" office:value="26.9528571428571">
                <text:p>26.9528571428571</text:p>
              </table:table-cell>
              <table:table-cell office:value-type="float" office:value="27.1911111111111">
                <text:p>27.1911111111111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27.18">
                <text:p>27.18</text:p>
              </table:table-cell>
              <table:table-cell office:value-type="float" office:value="26.9430612244898">
                <text:p>26.9430612244898</text:p>
              </table:table-cell>
              <table:table-cell office:value-type="float" office:value="27.1950505050505">
                <text:p>27.1950505050505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27.19">
                <text:p>27.19</text:p>
              </table:table-cell>
              <table:table-cell office:value-type="float" office:value="26.9385714285714">
                <text:p>26.9385714285714</text:p>
              </table:table-cell>
              <table:table-cell office:value-type="float" office:value="27.2008080808081">
                <text:p>27.2008080808081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27.22">
                <text:p>27.22</text:p>
              </table:table-cell>
              <table:table-cell office:value-type="float" office:value="26.9391836734694">
                <text:p>26.9391836734694</text:p>
              </table:table-cell>
              <table:table-cell office:value-type="float" office:value="27.2053535353535">
                <text:p>27.2053535353535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27.24">
                <text:p>27.24</text:p>
              </table:table-cell>
              <table:table-cell office:value-type="float" office:value="26.9438775510204">
                <text:p>26.9438775510204</text:p>
              </table:table-cell>
              <table:table-cell office:value-type="float" office:value="27.2108080808081">
                <text:p>27.2108080808081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27.24">
                <text:p>27.24</text:p>
              </table:table-cell>
              <table:table-cell office:value-type="float" office:value="26.9444897959184">
                <text:p>26.9444897959184</text:p>
              </table:table-cell>
              <table:table-cell office:value-type="float" office:value="27.2157575757576">
                <text:p>27.2157575757576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27.24">
                <text:p>27.24</text:p>
              </table:table-cell>
              <table:table-cell office:value-type="float" office:value="26.9451020408163">
                <text:p>26.9451020408163</text:p>
              </table:table-cell>
              <table:table-cell office:value-type="float" office:value="27.2193939393939">
                <text:p>27.2193939393939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27">
                <text:p>27</text:p>
              </table:table-cell>
              <table:table-cell office:value-type="float" office:value="26.9457142857143">
                <text:p>26.9457142857143</text:p>
              </table:table-cell>
              <table:table-cell office:value-type="float" office:value="27.2230303030303">
                <text:p>27.2230303030303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27.16">
                <text:p>27.16</text:p>
              </table:table-cell>
              <table:table-cell office:value-type="float" office:value="26.9436734693878">
                <text:p>26.9436734693878</text:p>
              </table:table-cell>
              <table:table-cell office:value-type="float" office:value="27.2242424242424">
                <text:p>27.2242424242424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26.93">
                <text:p>26.93</text:p>
              </table:table-cell>
              <table:table-cell office:value-type="float" office:value="26.9408163265306">
                <text:p>26.9408163265306</text:p>
              </table:table-cell>
              <table:table-cell office:value-type="float" office:value="27.2279797979798">
                <text:p>27.2279797979798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26.62">
                <text:p>26.62</text:p>
              </table:table-cell>
              <table:table-cell office:value-type="float" office:value="26.9285714285714">
                <text:p>26.9285714285714</text:p>
              </table:table-cell>
              <table:table-cell office:value-type="float" office:value="27.2262626262626">
                <text:p>27.2262626262626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27.1">
                <text:p>27.1</text:p>
              </table:table-cell>
              <table:table-cell office:value-type="float" office:value="26.9138775510204">
                <text:p>26.9138775510204</text:p>
              </table:table-cell>
              <table:table-cell office:value-type="float" office:value="27.2177777777778">
                <text:p>27.2177777777778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27.1">
                <text:p>27.1</text:p>
              </table:table-cell>
              <table:table-cell office:value-type="float" office:value="26.9075510204082">
                <text:p>26.9075510204082</text:p>
              </table:table-cell>
              <table:table-cell office:value-type="float" office:value="27.2153535353535">
                <text:p>27.2153535353535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27.1">
                <text:p>27.1</text:p>
              </table:table-cell>
              <table:table-cell office:value-type="float" office:value="26.9012244897959">
                <text:p>26.9012244897959</text:p>
              </table:table-cell>
              <table:table-cell office:value-type="float" office:value="27.2130303030303">
                <text:p>27.2130303030303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26.95">
                <text:p>26.95</text:p>
              </table:table-cell>
              <table:table-cell office:value-type="float" office:value="26.8948979591837">
                <text:p>26.8948979591837</text:p>
              </table:table-cell>
              <table:table-cell office:value-type="float" office:value="27.2107070707071">
                <text:p>27.2107070707071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27.32">
                <text:p>27.32</text:p>
              </table:table-cell>
              <table:table-cell office:value-type="float" office:value="26.8869387755102">
                <text:p>26.8869387755102</text:p>
              </table:table-cell>
              <table:table-cell office:value-type="float" office:value="27.2068686868687">
                <text:p>27.2068686868687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27.45">
                <text:p>27.45</text:p>
              </table:table-cell>
              <table:table-cell office:value-type="float" office:value="26.8877551020408">
                <text:p>26.8877551020408</text:p>
              </table:table-cell>
              <table:table-cell office:value-type="float" office:value="27.2074747474748">
                <text:p>27.2074747474748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27.45">
                <text:p>27.45</text:p>
              </table:table-cell>
              <table:table-cell office:value-type="float" office:value="26.8932653061224">
                <text:p>26.8932653061224</text:p>
              </table:table-cell>
              <table:table-cell office:value-type="float" office:value="27.2074747474748">
                <text:p>27.2074747474748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27.59">
                <text:p>27.59</text:p>
              </table:table-cell>
              <table:table-cell office:value-type="float" office:value="26.9024489795918">
                <text:p>26.9024489795918</text:p>
              </table:table-cell>
              <table:table-cell office:value-type="float" office:value="27.2068686868687">
                <text:p>27.2068686868687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27.59">
                <text:p>27.59</text:p>
              </table:table-cell>
              <table:table-cell office:value-type="float" office:value="26.9238775510204">
                <text:p>26.9238775510204</text:p>
              </table:table-cell>
              <table:table-cell office:value-type="float" office:value="27.2075757575758">
                <text:p>27.2075757575758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27.59">
                <text:p>27.59</text:p>
              </table:table-cell>
              <table:table-cell office:value-type="float" office:value="26.945306122449">
                <text:p>26.945306122449</text:p>
              </table:table-cell>
              <table:table-cell office:value-type="float" office:value="27.2039393939394">
                <text:p>27.2039393939394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27.53">
                <text:p>27.53</text:p>
              </table:table-cell>
              <table:table-cell office:value-type="float" office:value="26.9667346938775">
                <text:p>26.9667346938775</text:p>
              </table:table-cell>
              <table:table-cell office:value-type="float" office:value="27.200303030303">
                <text:p>27.200303030303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27.4">
                <text:p>27.4</text:p>
              </table:table-cell>
              <table:table-cell office:value-type="float" office:value="26.9851020408163">
                <text:p>26.9851020408163</text:p>
              </table:table-cell>
              <table:table-cell office:value-type="float" office:value="27.1960606060606">
                <text:p>27.1960606060606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27.8">
                <text:p>27.8</text:p>
              </table:table-cell>
              <table:table-cell office:value-type="float" office:value="26.9959183673469">
                <text:p>26.9959183673469</text:p>
              </table:table-cell>
              <table:table-cell office:value-type="float" office:value="27.1923232323232">
                <text:p>27.1923232323232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27.75">
                <text:p>27.75</text:p>
              </table:table-cell>
              <table:table-cell office:value-type="float" office:value="27.0167346938776">
                <text:p>27.0167346938776</text:p>
              </table:table-cell>
              <table:table-cell office:value-type="float" office:value="27.1928282828283">
                <text:p>27.1928282828283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27.71">
                <text:p>27.71</text:p>
              </table:table-cell>
              <table:table-cell office:value-type="float" office:value="27.0408163265306">
                <text:p>27.0408163265306</text:p>
              </table:table-cell>
              <table:table-cell office:value-type="float" office:value="27.1916161616162">
                <text:p>27.1916161616162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27.71">
                <text:p>27.71</text:p>
              </table:table-cell>
              <table:table-cell office:value-type="float" office:value="27.0595918367347">
                <text:p>27.0595918367347</text:p>
              </table:table-cell>
              <table:table-cell office:value-type="float" office:value="27.1905050505051">
                <text:p>27.1905050505051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27.71">
                <text:p>27.71</text:p>
              </table:table-cell>
              <table:table-cell office:value-type="float" office:value="27.0783673469388">
                <text:p>27.0783673469388</text:p>
              </table:table-cell>
              <table:table-cell office:value-type="float" office:value="27.1883838383838">
                <text:p>27.1883838383838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27.58">
                <text:p>27.58</text:p>
              </table:table-cell>
              <table:table-cell office:value-type="float" office:value="27.0971428571429">
                <text:p>27.0971428571429</text:p>
              </table:table-cell>
              <table:table-cell office:value-type="float" office:value="27.1862626262626">
                <text:p>27.186262626262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7.46">
                <text:p>27.46</text:p>
              </table:table-cell>
              <table:table-cell office:value-type="float" office:value="27.1091836734694">
                <text:p>27.1091836734694</text:p>
              </table:table-cell>
              <table:table-cell office:value-type="float" office:value="27.1828282828283">
                <text:p>27.1828282828283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27.57">
                <text:p>27.57</text:p>
              </table:table-cell>
              <table:table-cell office:value-type="float" office:value="27.1171428571429">
                <text:p>27.1171428571429</text:p>
              </table:table-cell>
              <table:table-cell office:value-type="float" office:value="27.1781818181818">
                <text:p>27.1781818181818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27.68">
                <text:p>27.68</text:p>
              </table:table-cell>
              <table:table-cell office:value-type="float" office:value="27.1289795918367">
                <text:p>27.1289795918367</text:p>
              </table:table-cell>
              <table:table-cell office:value-type="float" office:value="27.1754545454545">
                <text:p>27.1754545454545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27.68">
                <text:p>27.68</text:p>
              </table:table-cell>
              <table:table-cell office:value-type="float" office:value="27.1422448979592">
                <text:p>27.1422448979592</text:p>
              </table:table-cell>
              <table:table-cell office:value-type="float" office:value="27.1762626262626">
                <text:p>27.1762626262626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27.68">
                <text:p>27.68</text:p>
              </table:table-cell>
              <table:table-cell office:value-type="float" office:value="27.1555102040816">
                <text:p>27.1555102040816</text:p>
              </table:table-cell>
              <table:table-cell office:value-type="float" office:value="27.1761616161616">
                <text:p>27.1761616161616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27.68">
                <text:p>27.68</text:p>
              </table:table-cell>
              <table:table-cell office:value-type="float" office:value="27.1687755102041">
                <text:p>27.1687755102041</text:p>
              </table:table-cell>
              <table:table-cell office:value-type="float" office:value="27.1765656565657">
                <text:p>27.1765656565657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27.76">
                <text:p>27.76</text:p>
              </table:table-cell>
              <table:table-cell office:value-type="float" office:value="27.1820408163265">
                <text:p>27.1820408163265</text:p>
              </table:table-cell>
              <table:table-cell office:value-type="float" office:value="27.1769696969697">
                <text:p>27.1769696969697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27.47">
                <text:p>27.47</text:p>
              </table:table-cell>
              <table:table-cell office:value-type="float" office:value="27.1951020408163">
                <text:p>27.1951020408163</text:p>
              </table:table-cell>
              <table:table-cell office:value-type="float" office:value="27.1781818181818">
                <text:p>27.1781818181818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27.6">
                <text:p>27.6</text:p>
              </table:table-cell>
              <table:table-cell office:value-type="float" office:value="27.204693877551">
                <text:p>27.204693877551</text:p>
              </table:table-cell>
              <table:table-cell office:value-type="float" office:value="27.1784848484849">
                <text:p>27.1784848484849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27.48">
                <text:p>27.48</text:p>
              </table:table-cell>
              <table:table-cell office:value-type="float" office:value="27.2222448979592">
                <text:p>27.222244897959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27.46">
                <text:p>27.46</text:p>
              </table:table-cell>
              <table:table-cell office:value-type="float" office:value="27.2385714285714">
                <text:p>27.2385714285714</text:p>
              </table:table-cell>
              <table:table-cell office:value-type="float" office:value="27.179797979798">
                <text:p>27.179797979798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27.46">
                <text:p>27.46</text:p>
              </table:table-cell>
              <table:table-cell office:value-type="float" office:value="27.2530612244898">
                <text:p>27.2530612244898</text:p>
              </table:table-cell>
              <table:table-cell office:value-type="float" office:value="27.1771717171717">
                <text:p>27.1771717171717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27.46">
                <text:p>27.46</text:p>
              </table:table-cell>
              <table:table-cell office:value-type="float" office:value="27.2675510204082">
                <text:p>27.2675510204082</text:p>
              </table:table-cell>
              <table:table-cell office:value-type="float" office:value="27.1769696969697">
                <text:p>27.1769696969697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27.62">
                <text:p>27.62</text:p>
              </table:table-cell>
              <table:table-cell office:value-type="float" office:value="27.2820408163265">
                <text:p>27.2820408163265</text:p>
              </table:table-cell>
              <table:table-cell office:value-type="float" office:value="27.1767676767677">
                <text:p>27.1767676767677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27.54">
                <text:p>27.54</text:p>
              </table:table-cell>
              <table:table-cell office:value-type="float" office:value="27.3055102040816">
                <text:p>27.3055102040816</text:p>
              </table:table-cell>
              <table:table-cell office:value-type="float" office:value="27.1781818181818">
                <text:p>27.1781818181818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27.66">
                <text:p>27.66</text:p>
              </table:table-cell>
              <table:table-cell office:value-type="float" office:value="27.3279591836735">
                <text:p>27.3279591836735</text:p>
              </table:table-cell>
              <table:table-cell office:value-type="float" office:value="27.180202020202">
                <text:p>27.180202020202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27.66">
                <text:p>27.66</text:p>
              </table:table-cell>
              <table:table-cell office:value-type="float" office:value="27.3502040816327">
                <text:p>27.3502040816327</text:p>
              </table:table-cell>
              <table:table-cell office:value-type="float" office:value="27.1826262626263">
                <text:p>27.1826262626263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27.64">
                <text:p>27.64</text:p>
              </table:table-cell>
              <table:table-cell office:value-type="float" office:value="27.3734693877551">
                <text:p>27.3734693877551</text:p>
              </table:table-cell>
              <table:table-cell office:value-type="float" office:value="27.1845454545455">
                <text:p>27.1845454545455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27.64">
                <text:p>27.64</text:p>
              </table:table-cell>
              <table:table-cell office:value-type="float" office:value="27.3922448979592">
                <text:p>27.3922448979592</text:p>
              </table:table-cell>
              <table:table-cell office:value-type="float" office:value="27.1864646464646">
                <text:p>27.1864646464646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27.64">
                <text:p>27.64</text:p>
              </table:table-cell>
              <table:table-cell office:value-type="float" office:value="27.4110204081633">
                <text:p>27.4110204081633</text:p>
              </table:table-cell>
              <table:table-cell office:value-type="float" office:value="27.189595959596">
                <text:p>27.189595959596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27.62">
                <text:p>27.62</text:p>
              </table:table-cell>
              <table:table-cell office:value-type="float" office:value="27.4297959183673">
                <text:p>27.4297959183673</text:p>
              </table:table-cell>
              <table:table-cell office:value-type="float" office:value="27.1927272727273">
                <text:p>27.1927272727273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27.63">
                <text:p>27.63</text:p>
              </table:table-cell>
              <table:table-cell office:value-type="float" office:value="27.4471428571429">
                <text:p>27.4471428571429</text:p>
              </table:table-cell>
              <table:table-cell office:value-type="float" office:value="27.1956565656566">
                <text:p>27.1956565656566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27.43">
                <text:p>27.43</text:p>
              </table:table-cell>
              <table:table-cell office:value-type="float" office:value="27.4563265306122">
                <text:p>27.4563265306122</text:p>
              </table:table-cell>
              <table:table-cell office:value-type="float" office:value="27.1994949494949">
                <text:p>27.1994949494949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27.43">
                <text:p>27.43</text:p>
              </table:table-cell>
              <table:table-cell office:value-type="float" office:value="27.4612244897959">
                <text:p>27.4612244897959</text:p>
              </table:table-cell>
              <table:table-cell office:value-type="float" office:value="27.199797979798">
                <text:p>27.199797979798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27.73">
                <text:p>27.73</text:p>
              </table:table-cell>
              <table:table-cell office:value-type="float" office:value="27.4655102040816">
                <text:p>27.4655102040816</text:p>
              </table:table-cell>
              <table:table-cell office:value-type="float" office:value="27.2025252525253">
                <text:p>27.2025252525253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27.73">
                <text:p>27.73</text:p>
              </table:table-cell>
              <table:table-cell office:value-type="float" office:value="27.4755102040816">
                <text:p>27.4755102040816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27.73">
                <text:p>27.73</text:p>
              </table:table-cell>
              <table:table-cell office:value-type="float" office:value="27.4855102040816">
                <text:p>27.4855102040816</text:p>
              </table:table-cell>
              <table:table-cell office:value-type="float" office:value="27.2152525252525">
                <text:p>27.2152525252525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27.91">
                <text:p>27.91</text:p>
              </table:table-cell>
              <table:table-cell office:value-type="float" office:value="27.4955102040816">
                <text:p>27.4955102040816</text:p>
              </table:table-cell>
              <table:table-cell office:value-type="float" office:value="27.2205050505051">
                <text:p>27.2205050505051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28.09">
                <text:p>28.09</text:p>
              </table:table-cell>
              <table:table-cell office:value-type="float" office:value="27.5140816326531">
                <text:p>27.5140816326531</text:p>
              </table:table-cell>
              <table:table-cell office:value-type="float" office:value="27.2275757575758">
                <text:p>27.2275757575758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27.9">
                <text:p>27.9</text:p>
              </table:table-cell>
              <table:table-cell office:value-type="float" office:value="27.5330612244898">
                <text:p>27.5330612244898</text:p>
              </table:table-cell>
              <table:table-cell office:value-type="float" office:value="27.2375757575758">
                <text:p>27.2375757575758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28.42">
                <text:p>28.42</text:p>
              </table:table-cell>
              <table:table-cell office:value-type="float" office:value="27.5528571428571">
                <text:p>27.5528571428571</text:p>
              </table:table-cell>
              <table:table-cell office:value-type="float" office:value="27.2436363636364">
                <text:p>27.2436363636364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28.55">
                <text:p>28.55</text:p>
              </table:table-cell>
              <table:table-cell office:value-type="float" office:value="27.5895918367347">
                <text:p>27.5895918367347</text:p>
              </table:table-cell>
              <table:table-cell office:value-type="float" office:value="27.2526262626263">
                <text:p>27.2526262626263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28.55">
                <text:p>28.55</text:p>
              </table:table-cell>
              <table:table-cell office:value-type="float" office:value="27.6191836734694">
                <text:p>27.6191836734694</text:p>
              </table:table-cell>
              <table:table-cell office:value-type="float" office:value="27.2648484848485">
                <text:p>27.2648484848485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28.55">
                <text:p>28.55</text:p>
              </table:table-cell>
              <table:table-cell office:value-type="float" office:value="27.6487755102041">
                <text:p>27.6487755102041</text:p>
              </table:table-cell>
              <table:table-cell office:value-type="float" office:value="27.2763636363636">
                <text:p>27.2763636363636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28.5">
                <text:p>28.5</text:p>
              </table:table-cell>
              <table:table-cell office:value-type="float" office:value="27.6783673469388">
                <text:p>27.6783673469388</text:p>
              </table:table-cell>
              <table:table-cell office:value-type="float" office:value="27.2878787878788">
                <text:p>27.287878787878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28.62">
                <text:p>28.62</text:p>
              </table:table-cell>
              <table:table-cell office:value-type="float" office:value="27.71">
                <text:p>27.71</text:p>
              </table:table-cell>
              <table:table-cell office:value-type="float" office:value="27.2988888888889">
                <text:p>27.2988888888889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29.04">
                <text:p>29.04</text:p>
              </table:table-cell>
              <table:table-cell office:value-type="float" office:value="27.7365306122449">
                <text:p>27.7365306122449</text:p>
              </table:table-cell>
              <table:table-cell office:value-type="float" office:value="27.3118181818182">
                <text:p>27.3118181818182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29.03">
                <text:p>29.03</text:p>
              </table:table-cell>
              <table:table-cell office:value-type="float" office:value="27.7689795918367">
                <text:p>27.7689795918367</text:p>
              </table:table-cell>
              <table:table-cell office:value-type="float" office:value="27.329595959596">
                <text:p>27.329595959596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8.9">
                <text:p>28.9</text:p>
              </table:table-cell>
              <table:table-cell office:value-type="float" office:value="27.8012244897959">
                <text:p>27.8012244897959</text:p>
              </table:table-cell>
              <table:table-cell office:value-type="float" office:value="27.3482828282828">
                <text:p>27.3482828282828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28.9">
                <text:p>28.9</text:p>
              </table:table-cell>
              <table:table-cell office:value-type="float" office:value="27.8279591836735">
                <text:p>27.8279591836735</text:p>
              </table:table-cell>
              <table:table-cell office:value-type="float" office:value="27.3674747474748">
                <text:p>27.3674747474748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28.9">
                <text:p>28.9</text:p>
              </table:table-cell>
              <table:table-cell office:value-type="float" office:value="27.854693877551">
                <text:p>27.854693877551</text:p>
              </table:table-cell>
              <table:table-cell office:value-type="float" office:value="27.3913131313131">
                <text:p>27.391313131313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28.9">
                <text:p>28.9</text:p>
              </table:table-cell>
              <table:table-cell office:value-type="float" office:value="27.8814285714286">
                <text:p>27.8814285714286</text:p>
              </table:table-cell>
              <table:table-cell office:value-type="float" office:value="27.4151515151515">
                <text:p>27.4151515151515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28.7">
                <text:p>28.7</text:p>
              </table:table-cell>
              <table:table-cell office:value-type="float" office:value="27.909387755102">
                <text:p>27.909387755102</text:p>
              </table:table-cell>
              <table:table-cell office:value-type="float" office:value="27.4389898989899">
                <text:p>27.4389898989899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29.15">
                <text:p>29.15</text:p>
              </table:table-cell>
              <table:table-cell office:value-type="float" office:value="27.9359183673469">
                <text:p>27.9359183673469</text:p>
              </table:table-cell>
              <table:table-cell office:value-type="float" office:value="27.459898989899">
                <text:p>27.459898989899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29.17">
                <text:p>29.17</text:p>
              </table:table-cell>
              <table:table-cell office:value-type="float" office:value="27.9634693877551">
                <text:p>27.9634693877551</text:p>
              </table:table-cell>
              <table:table-cell office:value-type="float" office:value="27.4829292929293">
                <text:p>27.4829292929293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29.14">
                <text:p>29.14</text:p>
              </table:table-cell>
              <table:table-cell office:value-type="float" office:value="27.9924489795918">
                <text:p>27.9924489795918</text:p>
              </table:table-cell>
              <table:table-cell office:value-type="float" office:value="27.5070707070707">
                <text:p>27.5070707070707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29.14">
                <text:p>29.14</text:p>
              </table:table-cell>
              <table:table-cell office:value-type="float" office:value="28.0216326530612">
                <text:p>28.0216326530612</text:p>
              </table:table-cell>
              <table:table-cell office:value-type="float" office:value="27.5330303030303">
                <text:p>27.5330303030303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29.14">
                <text:p>29.14</text:p>
              </table:table-cell>
              <table:table-cell office:value-type="float" office:value="28.0508163265306">
                <text:p>28.0508163265306</text:p>
              </table:table-cell>
              <table:table-cell office:value-type="float" office:value="27.5567676767677">
                <text:p>27.5567676767677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29.18">
                <text:p>29.18</text:p>
              </table:table-cell>
              <table:table-cell office:value-type="float" office:value="28.08">
                <text:p>28.08</text:p>
              </table:table-cell>
              <table:table-cell office:value-type="float" office:value="27.5805050505051">
                <text:p>27.5805050505051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29.37">
                <text:p>29.37</text:p>
              </table:table-cell>
              <table:table-cell office:value-type="float" office:value="28.1126530612245">
                <text:p>28.1126530612245</text:p>
              </table:table-cell>
              <table:table-cell office:value-type="float" office:value="27.6046464646465">
                <text:p>27.6046464646465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29.3">
                <text:p>29.3</text:p>
              </table:table-cell>
              <table:table-cell office:value-type="float" office:value="28.1516326530612">
                <text:p>28.1516326530612</text:p>
              </table:table-cell>
              <table:table-cell office:value-type="float" office:value="27.6286868686869">
                <text:p>27.6286868686869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29.37">
                <text:p>29.37</text:p>
              </table:table-cell>
              <table:table-cell office:value-type="float" office:value="28.1869387755102">
                <text:p>28.1869387755102</text:p>
              </table:table-cell>
              <table:table-cell office:value-type="float" office:value="27.6512121212121">
                <text:p>27.6512121212121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29.82">
                <text:p>29.82</text:p>
              </table:table-cell>
              <table:table-cell office:value-type="float" office:value="28.2214285714286">
                <text:p>28.2214285714286</text:p>
              </table:table-cell>
              <table:table-cell office:value-type="float" office:value="27.6752525252525">
                <text:p>27.6752525252525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29.82">
                <text:p>29.82</text:p>
              </table:table-cell>
              <table:table-cell office:value-type="float" office:value="28.2651020408163">
                <text:p>28.2651020408163</text:p>
              </table:table-cell>
              <table:table-cell office:value-type="float" office:value="27.7034343434343">
                <text:p>27.7034343434343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29.82">
                <text:p>29.82</text:p>
              </table:table-cell>
              <table:table-cell office:value-type="float" office:value="28.3087755102041">
                <text:p>28.3087755102041</text:p>
              </table:table-cell>
              <table:table-cell office:value-type="float" office:value="27.7316161616162">
                <text:p>27.7316161616162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30">
                <text:p>30</text:p>
              </table:table-cell>
              <table:table-cell office:value-type="float" office:value="28.3524489795918">
                <text:p>28.3524489795918</text:p>
              </table:table-cell>
              <table:table-cell office:value-type="float" office:value="27.759797979798">
                <text:p>27.759797979798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30.5">
                <text:p>30.5</text:p>
              </table:table-cell>
              <table:table-cell office:value-type="float" office:value="28.3981632653061">
                <text:p>28.3981632653061</text:p>
              </table:table-cell>
              <table:table-cell office:value-type="float" office:value="27.789797979798">
                <text:p>27.789797979798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31.01">
                <text:p>31.01</text:p>
              </table:table-cell>
              <table:table-cell office:value-type="float" office:value="28.46">
                <text:p>28.46</text:p>
              </table:table-cell>
              <table:table-cell office:value-type="float" office:value="27.8239393939394">
                <text:p>27.8239393939394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30.97">
                <text:p>30.97</text:p>
              </table:table-cell>
              <table:table-cell office:value-type="float" office:value="28.5295918367347">
                <text:p>28.5295918367347</text:p>
              </table:table-cell>
              <table:table-cell office:value-type="float" office:value="27.8644444444444">
                <text:p>27.8644444444444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31.47">
                <text:p>31.47</text:p>
              </table:table-cell>
              <table:table-cell office:value-type="float" office:value="28.6008163265306">
                <text:p>28.6008163265306</text:p>
              </table:table-cell>
              <table:table-cell office:value-type="float" office:value="27.9071717171717">
                <text:p>27.9071717171717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31.47">
                <text:p>31.47</text:p>
              </table:table-cell>
              <table:table-cell office:value-type="float" office:value="28.6826530612245">
                <text:p>28.6826530612245</text:p>
              </table:table-cell>
              <table:table-cell office:value-type="float" office:value="27.9555555555556">
                <text:p>27.9555555555556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31.47">
                <text:p>31.47</text:p>
              </table:table-cell>
              <table:table-cell office:value-type="float" office:value="28.7644897959184">
                <text:p>28.7644897959184</text:p>
              </table:table-cell>
              <table:table-cell office:value-type="float" office:value="28.0032323232323">
                <text:p>28.0032323232323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31.35">
                <text:p>31.35</text:p>
              </table:table-cell>
              <table:table-cell office:value-type="float" office:value="28.8463265306122">
                <text:p>28.8463265306122</text:p>
              </table:table-cell>
              <table:table-cell office:value-type="float" office:value="28.0509090909091">
                <text:p>28.0509090909091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31.3">
                <text:p>31.3</text:p>
              </table:table-cell>
              <table:table-cell office:value-type="float" office:value="28.9224489795918">
                <text:p>28.9224489795918</text:p>
              </table:table-cell>
              <table:table-cell office:value-type="float" office:value="28.0973737373737">
                <text:p>28.0973737373737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31.64">
                <text:p>31.64</text:p>
              </table:table-cell>
              <table:table-cell office:value-type="float" office:value="28.9991836734694">
                <text:p>28.9991836734694</text:p>
              </table:table-cell>
              <table:table-cell office:value-type="float" office:value="28.1461616161616">
                <text:p>28.1461616161616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31.34">
                <text:p>31.34</text:p>
              </table:table-cell>
              <table:table-cell office:value-type="float" office:value="29.0804081632653">
                <text:p>29.0804081632653</text:p>
              </table:table-cell>
              <table:table-cell office:value-type="float" office:value="28.1986868686869">
                <text:p>28.1986868686869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31.61">
                <text:p>31.61</text:p>
              </table:table-cell>
              <table:table-cell office:value-type="float" office:value="29.1555102040816">
                <text:p>29.1555102040816</text:p>
              </table:table-cell>
              <table:table-cell office:value-type="float" office:value="28.2468686868687">
                <text:p>28.2468686868687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31.61">
                <text:p>31.61</text:p>
              </table:table-cell>
              <table:table-cell office:value-type="float" office:value="29.2365306122449">
                <text:p>29.2365306122449</text:p>
              </table:table-cell>
              <table:table-cell office:value-type="float" office:value="28.2982828282828">
                <text:p>28.2982828282828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31.61">
                <text:p>31.61</text:p>
              </table:table-cell>
              <table:table-cell office:value-type="float" office:value="29.3175510204082">
                <text:p>29.3175510204082</text:p>
              </table:table-cell>
              <table:table-cell office:value-type="float" office:value="28.3476767676768">
                <text:p>28.3476767676768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31.61">
                <text:p>31.61</text:p>
              </table:table-cell>
              <table:table-cell office:value-type="float" office:value="29.3985714285714">
                <text:p>29.3985714285714</text:p>
              </table:table-cell>
              <table:table-cell office:value-type="float" office:value="28.3970707070707">
                <text:p>28.3970707070707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31.42">
                <text:p>31.42</text:p>
              </table:table-cell>
              <table:table-cell office:value-type="float" office:value="29.48">
                <text:p>29.48</text:p>
              </table:table-cell>
              <table:table-cell office:value-type="float" office:value="28.4464646464646">
                <text:p>28.4464646464646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31.56">
                <text:p>31.56</text:p>
              </table:table-cell>
              <table:table-cell office:value-type="float" office:value="29.5573469387755">
                <text:p>29.5573469387755</text:p>
              </table:table-cell>
              <table:table-cell office:value-type="float" office:value="28.4934343434343">
                <text:p>28.4934343434343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31.57">
                <text:p>31.57</text:p>
              </table:table-cell>
              <table:table-cell office:value-type="float" office:value="29.6416326530612">
                <text:p>29.6416326530612</text:p>
              </table:table-cell>
              <table:table-cell office:value-type="float" office:value="28.5376767676768">
                <text:p>28.5376767676768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31.61">
                <text:p>31.61</text:p>
              </table:table-cell>
              <table:table-cell office:value-type="float" office:value="29.7261224489796">
                <text:p>29.7261224489796</text:p>
              </table:table-cell>
              <table:table-cell office:value-type="float" office:value="28.5819191919192">
                <text:p>28.5819191919192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31.61">
                <text:p>31.61</text:p>
              </table:table-cell>
              <table:table-cell office:value-type="float" office:value="29.805306122449">
                <text:p>29.805306122449</text:p>
              </table:table-cell>
              <table:table-cell office:value-type="float" office:value="28.6262626262626">
                <text:p>28.6262626262626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31.61">
                <text:p>31.61</text:p>
              </table:table-cell>
              <table:table-cell office:value-type="float" office:value="29.8844897959184">
                <text:p>29.8844897959184</text:p>
              </table:table-cell>
              <table:table-cell office:value-type="float" office:value="28.670404040404">
                <text:p>28.670404040404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31.53">
                <text:p>31.53</text:p>
              </table:table-cell>
              <table:table-cell office:value-type="float" office:value="29.9636734693878">
                <text:p>29.9636734693878</text:p>
              </table:table-cell>
              <table:table-cell office:value-type="float" office:value="28.7145454545455">
                <text:p>28.7145454545455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31.64">
                <text:p>31.64</text:p>
              </table:table-cell>
              <table:table-cell office:value-type="float" office:value="30.0375510204082">
                <text:p>30.0375510204082</text:p>
              </table:table-cell>
              <table:table-cell office:value-type="float" office:value="28.7578787878788">
                <text:p>28.7578787878788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31.51">
                <text:p>31.51</text:p>
              </table:table-cell>
              <table:table-cell office:value-type="float" office:value="30.11">
                <text:p>30.11</text:p>
              </table:table-cell>
              <table:table-cell office:value-type="float" office:value="28.8047474747475">
                <text:p>28.8047474747475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31.51">
                <text:p>31.51</text:p>
              </table:table-cell>
              <table:table-cell office:value-type="float" office:value="30.1836734693878">
                <text:p>30.1836734693878</text:p>
              </table:table-cell>
              <table:table-cell office:value-type="float" office:value="28.8486868686869">
                <text:p>28.8486868686869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31.77">
                <text:p>31.77</text:p>
              </table:table-cell>
              <table:table-cell office:value-type="float" office:value="30.2467346938776">
                <text:p>30.2467346938776</text:p>
              </table:table-cell>
              <table:table-cell office:value-type="float" office:value="28.8949494949495">
                <text:p>28.8949494949495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31.77">
                <text:p>31.77</text:p>
              </table:table-cell>
              <table:table-cell office:value-type="float" office:value="30.3124489795918">
                <text:p>30.3124489795918</text:p>
              </table:table-cell>
              <table:table-cell office:value-type="float" office:value="28.9469696969697">
                <text:p>28.9469696969697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31.77">
                <text:p>31.77</text:p>
              </table:table-cell>
              <table:table-cell office:value-type="float" office:value="30.3781632653061">
                <text:p>30.3781632653061</text:p>
              </table:table-cell>
              <table:table-cell office:value-type="float" office:value="28.9941414141414">
                <text:p>28.9941414141414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31.86">
                <text:p>31.86</text:p>
              </table:table-cell>
              <table:table-cell office:value-type="float" office:value="30.4438775510204">
                <text:p>30.4438775510204</text:p>
              </table:table-cell>
              <table:table-cell office:value-type="float" office:value="29.0413131313131">
                <text:p>29.0413131313131</text:p>
              </table:table-cell>
            </table:table-row>
            <table:table-row>
              <table:table-cell office:value-type="float" office:value="46084">
                <text:p>46084</text:p>
              </table:table-cell>
              <table:table-cell office:value-type="float" office:value="31.59">
                <text:p>31.59</text:p>
              </table:table-cell>
              <table:table-cell office:value-type="float" office:value="30.5124489795918">
                <text:p>30.5124489795918</text:p>
              </table:table-cell>
              <table:table-cell office:value-type="float" office:value="29.0893939393939">
                <text:p>29.0893939393939</text:p>
              </table:table-cell>
            </table:table-row>
            <table:table-row>
              <table:table-cell office:value-type="float" office:value="46085">
                <text:p>46085</text:p>
              </table:table-cell>
              <table:table-cell office:value-type="float" office:value="31.54">
                <text:p>31.54</text:p>
              </table:table-cell>
              <table:table-cell office:value-type="float" office:value="30.5730612244898">
                <text:p>30.5730612244898</text:p>
              </table:table-cell>
              <table:table-cell office:value-type="float" office:value="29.1362626262626">
                <text:p>29.1362626262626</text:p>
              </table:table-cell>
            </table:table-row>
            <table:table-row>
              <table:table-cell office:value-type="float" office:value="46086">
                <text:p>46086</text:p>
              </table:table-cell>
              <table:table-cell office:value-type="float" office:value="31.26">
                <text:p>31.26</text:p>
              </table:table-cell>
              <table:table-cell office:value-type="float" office:value="30.6240816326531">
                <text:p>30.6240816326531</text:p>
              </table:table-cell>
              <table:table-cell office:value-type="float" office:value="29.1788888888889">
                <text:p>29.1788888888889</text:p>
              </table:table-cell>
            </table:table-row>
            <table:table-row>
              <table:table-cell office:value-type="float" office:value="46087">
                <text:p>46087</text:p>
              </table:table-cell>
              <table:table-cell office:value-type="float" office:value="31.13">
                <text:p>31.13</text:p>
              </table:table-cell>
              <table:table-cell office:value-type="float" office:value="30.6695918367347">
                <text:p>30.6695918367347</text:p>
              </table:table-cell>
              <table:table-cell office:value-type="float" office:value="29.2173737373737">
                <text:p>29.2173737373737</text:p>
              </table:table-cell>
            </table:table-row>
            <table:table-row>
              <table:table-cell office:value-type="float" office:value="46088">
                <text:p>46088</text:p>
              </table:table-cell>
              <table:table-cell office:value-type="float" office:value="31.13">
                <text:p>31.13</text:p>
              </table:table-cell>
              <table:table-cell office:value-type="float" office:value="30.7151020408163">
                <text:p>30.7151020408163</text:p>
              </table:table-cell>
              <table:table-cell office:value-type="float" office:value="29.2545454545455">
                <text:p>29.2545454545455</text:p>
              </table:table-cell>
            </table:table-row>
            <table:table-row>
              <table:table-cell office:value-type="float" office:value="46089">
                <text:p>46089</text:p>
              </table:table-cell>
              <table:table-cell office:value-type="float" office:value="31.13">
                <text:p>31.13</text:p>
              </table:table-cell>
              <table:table-cell office:value-type="float" office:value="30.760612244898">
                <text:p>30.760612244898</text:p>
              </table:table-cell>
              <table:table-cell office:value-type="float" office:value="29.290303030303">
                <text:p>29.290303030303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31.02">
                <text:p>31.02</text:p>
              </table:table-cell>
              <table:table-cell office:value-type="float" office:value="30.8061224489796">
                <text:p>30.8061224489796</text:p>
              </table:table-cell>
              <table:table-cell office:value-type="float" office:value="29.3260606060606">
                <text:p>29.3260606060606</text:p>
              </table:table-cell>
            </table:table-row>
            <table:table-row>
              <table:table-cell office:value-type="float" office:value="46091">
                <text:p>46091</text:p>
              </table:table-cell>
              <table:table-cell office:value-type="float" office:value="30.9">
                <text:p>30.9</text:p>
              </table:table-cell>
              <table:table-cell office:value-type="float" office:value="30.849387755102">
                <text:p>30.849387755102</text:p>
              </table:table-cell>
              <table:table-cell office:value-type="float" office:value="29.3607070707071">
                <text:p>29.3607070707071</text:p>
              </table:table-cell>
            </table:table-row>
            <table:table-row>
              <table:table-cell office:value-type="float" office:value="46092">
                <text:p>46092</text:p>
              </table:table-cell>
              <table:table-cell office:value-type="float" office:value="31">
                <text:p>31</text:p>
              </table:table-cell>
              <table:table-cell office:value-type="float" office:value="30.8942857142857">
                <text:p>30.8942857142857</text:p>
              </table:table-cell>
              <table:table-cell office:value-type="float" office:value="29.3947474747475">
                <text:p>29.3947474747475</text:p>
              </table:table-cell>
            </table:table-row>
            <table:table-row>
              <table:table-cell office:value-type="float" office:value="46093">
                <text:p>46093</text:p>
              </table:table-cell>
              <table:table-cell office:value-type="float" office:value="30.82">
                <text:p>30.82</text:p>
              </table:table-cell>
              <table:table-cell office:value-type="float" office:value="30.9320408163265">
                <text:p>30.9320408163265</text:p>
              </table:table-cell>
              <table:table-cell office:value-type="float" office:value="29.4311111111111">
                <text:p>29.4311111111111</text:p>
              </table:table-cell>
            </table:table-row>
            <table:table-row>
              <table:table-cell office:value-type="float" office:value="46094">
                <text:p>46094</text:p>
              </table:table-cell>
              <table:table-cell office:value-type="float" office:value="30.8">
                <text:p>30.8</text:p>
              </table:table-cell>
              <table:table-cell office:value-type="float" office:value="30.9657142857143">
                <text:p>30.9657142857143</text:p>
              </table:table-cell>
              <table:table-cell office:value-type="float" office:value="29.4616161616162">
                <text:p>29.4616161616162</text:p>
              </table:table-cell>
            </table:table-row>
            <table:table-row>
              <table:table-cell office:value-type="float" office:value="46095">
                <text:p>46095</text:p>
              </table:table-cell>
              <table:table-cell office:value-type="float" office:value="30.8">
                <text:p>30.8</text:p>
              </table:table-cell>
              <table:table-cell office:value-type="float" office:value="30.9995918367347">
                <text:p>30.9995918367347</text:p>
              </table:table-cell>
              <table:table-cell office:value-type="float" office:value="29.4924242424242">
                <text:p>29.4924242424242</text:p>
              </table:table-cell>
            </table:table-row>
            <table:table-row>
              <table:table-cell office:value-type="float" office:value="46096">
                <text:p>46096</text:p>
              </table:table-cell>
              <table:table-cell office:value-type="float" office:value="30.8">
                <text:p>30.8</text:p>
              </table:table-cell>
              <table:table-cell office:value-type="float" office:value="31.0334693877551">
                <text:p>31.0334693877551</text:p>
              </table:table-cell>
              <table:table-cell office:value-type="float" office:value="29.5236363636364">
                <text:p>29.5236363636364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30.87">
                <text:p>30.87</text:p>
              </table:table-cell>
              <table:table-cell office:value-type="float" office:value="31.0673469387755">
                <text:p>31.0673469387755</text:p>
              </table:table-cell>
              <table:table-cell office:value-type="float" office:value="29.5548484848485">
                <text:p>29.5548484848485</text:p>
              </table:table-cell>
            </table:table-row>
            <table:table-row>
              <table:table-cell office:value-type="float" office:value="46098">
                <text:p>46098</text:p>
              </table:table-cell>
              <table:table-cell office:value-type="float" office:value="30.95">
                <text:p>30.95</text:p>
              </table:table-cell>
              <table:table-cell office:value-type="float" office:value="31.1018367346939">
                <text:p>31.1018367346939</text:p>
              </table:table-cell>
              <table:table-cell office:value-type="float" office:value="29.5867676767677">
                <text:p>29.5867676767677</text:p>
              </table:table-cell>
            </table:table-row>
            <table:table-row>
              <table:table-cell office:value-type="float" office:value="46099">
                <text:p>46099</text:p>
              </table:table-cell>
              <table:table-cell office:value-type="float" office:value="30.58">
                <text:p>30.58</text:p>
              </table:table-cell>
              <table:table-cell office:value-type="float" office:value="31.1340816326531">
                <text:p>31.1340816326531</text:p>
              </table:table-cell>
              <table:table-cell office:value-type="float" office:value="29.6208080808081">
                <text:p>29.6208080808081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30.59">
                <text:p>30.59</text:p>
              </table:table-cell>
              <table:table-cell office:value-type="float" office:value="31.1602040816327">
                <text:p>31.1602040816327</text:p>
              </table:table-cell>
              <table:table-cell office:value-type="float" office:value="29.6523232323232">
                <text:p>29.6523232323232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30.39">
                <text:p>30.39</text:p>
              </table:table-cell>
              <table:table-cell office:value-type="float" office:value="31.1851020408163">
                <text:p>31.1851020408163</text:p>
              </table:table-cell>
              <table:table-cell office:value-type="float" office:value="29.6828282828283">
                <text:p>29.6828282828283</text:p>
              </table:table-cell>
            </table:table-row>
            <table:table-row>
              <table:table-cell office:value-type="float" office:value="46102">
                <text:p>46102</text:p>
              </table:table-cell>
              <table:table-cell office:value-type="float" office:value="30.39">
                <text:p>30.39</text:p>
              </table:table-cell>
              <table:table-cell office:value-type="float" office:value="31.1967346938776">
                <text:p>31.1967346938776</text:p>
              </table:table-cell>
              <table:table-cell office:value-type="float" office:value="29.710202020202">
                <text:p>29.710202020202</text:p>
              </table:table-cell>
            </table:table-row>
            <table:table-row>
              <table:table-cell office:value-type="float" office:value="46103">
                <text:p>46103</text:p>
              </table:table-cell>
              <table:table-cell office:value-type="float" office:value="30.39">
                <text:p>30.39</text:p>
              </table:table-cell>
              <table:table-cell office:value-type="float" office:value="31.2083673469388">
                <text:p>31.2083673469388</text:p>
              </table:table-cell>
              <table:table-cell office:value-type="float" office:value="29.7375757575758">
                <text:p>29.7375757575758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30.54">
                <text:p>30.54</text:p>
              </table:table-cell>
              <table:table-cell office:value-type="float" office:value="31.22">
                <text:p>31.22</text:p>
              </table:table-cell>
              <table:table-cell office:value-type="float" office:value="29.7649494949495">
                <text:p>29.7649494949495</text:p>
              </table:table-cell>
            </table:table-row>
            <table:table-row>
              <table:table-cell office:value-type="float" office:value="46105">
                <text:p>46105</text:p>
              </table:table-cell>
              <table:table-cell office:value-type="float" office:value="30.64">
                <text:p>30.64</text:p>
              </table:table-cell>
              <table:table-cell office:value-type="float" office:value="31.2310204081633">
                <text:p>31.2310204081633</text:p>
              </table:table-cell>
              <table:table-cell office:value-type="float" office:value="29.7938383838384">
                <text:p>29.7938383838384</text:p>
              </table:table-cell>
            </table:table-row>
            <table:table-row>
              <table:table-cell office:value-type="float" office:value="46106">
                <text:p>46106</text:p>
              </table:table-cell>
              <table:table-cell office:value-type="float" office:value="30.54">
                <text:p>30.54</text:p>
              </table:table-cell>
              <table:table-cell office:value-type="float" office:value="31.2338775510204">
                <text:p>31.2338775510204</text:p>
              </table:table-cell>
              <table:table-cell office:value-type="float" office:value="29.8229292929293">
                <text:p>29.8229292929293</text:p>
              </table:table-cell>
            </table:table-row>
            <table:table-row>
              <table:table-cell office:value-type="float" office:value="46107">
                <text:p>46107</text:p>
              </table:table-cell>
              <table:table-cell office:value-type="float" office:value="30.62">
                <text:p>30.62</text:p>
              </table:table-cell>
              <table:table-cell office:value-type="float" office:value="31.2242857142857">
                <text:p>31.2242857142857</text:p>
              </table:table-cell>
              <table:table-cell office:value-type="float" office:value="29.8539393939394">
                <text:p>29.8539393939394</text:p>
              </table:table-cell>
            </table:table-row>
            <table:table-row>
              <table:table-cell office:value-type="float" office:value="46108">
                <text:p>46108</text:p>
              </table:table-cell>
              <table:table-cell office:value-type="float" office:value="30.44">
                <text:p>30.44</text:p>
              </table:table-cell>
              <table:table-cell office:value-type="float" office:value="31.2171428571429">
                <text:p>31.2171428571429</text:p>
              </table:table-cell>
              <table:table-cell office:value-type="float" office:value="29.8844444444444">
                <text:p>29.8844444444444</text:p>
              </table:table-cell>
            </table:table-row>
            <table:table-row>
              <table:table-cell office:value-type="float" office:value="46109">
                <text:p>46109</text:p>
              </table:table-cell>
              <table:table-cell office:value-type="float" office:value="30.44">
                <text:p>30.44</text:p>
              </table:table-cell>
              <table:table-cell office:value-type="float" office:value="31.1961224489796">
                <text:p>31.1961224489796</text:p>
              </table:table-cell>
              <table:table-cell office:value-type="float" office:value="29.9143434343434">
                <text:p>29.9143434343434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30.44">
                <text:p>30.44</text:p>
              </table:table-cell>
              <table:table-cell office:value-type="float" office:value="31.1751020408163">
                <text:p>31.1751020408163</text:p>
              </table:table-cell>
              <table:table-cell office:value-type="float" office:value="29.9444444444444">
                <text:p>29.9444444444444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30.48">
                <text:p>30.48</text:p>
              </table:table-cell>
              <table:table-cell office:value-type="float" office:value="31.1540816326531">
                <text:p>31.1540816326531</text:p>
              </table:table-cell>
              <table:table-cell office:value-type="float" office:value="29.9745454545455">
                <text:p>29.9745454545455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30.68">
                <text:p>30.68</text:p>
              </table:table-cell>
              <table:table-cell office:value-type="float" office:value="31.1363265306122">
                <text:p>31.1363265306122</text:p>
              </table:table-cell>
              <table:table-cell office:value-type="float" office:value="30.0050505050505">
                <text:p>30.0050505050505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30.51">
                <text:p>30.51</text:p>
              </table:table-cell>
              <table:table-cell office:value-type="float" office:value="31.1236734693878">
                <text:p>31.1236734693878</text:p>
              </table:table-cell>
              <table:table-cell office:value-type="float" office:value="30.0359595959596">
                <text:p>30.0359595959596</text:p>
              </table:table-cell>
            </table:table-row>
            <table:table-row>
              <table:table-cell office:value-type="float" office:value="46114">
                <text:p>46114</text:p>
              </table:table-cell>
              <table:table-cell office:value-type="float" office:value="30.56">
                <text:p>30.56</text:p>
              </table:table-cell>
              <table:table-cell office:value-type="float" office:value="31.100612244898">
                <text:p>31.100612244898</text:p>
              </table:table-cell>
              <table:table-cell office:value-type="float" office:value="30.0659595959596">
                <text:p>30.0659595959596</text:p>
              </table:table-cell>
            </table:table-row>
            <table:table-row>
              <table:table-cell office:value-type="float" office:value="46115">
                <text:p>46115</text:p>
              </table:table-cell>
              <table:table-cell office:value-type="float" office:value="30.56">
                <text:p>30.56</text:p>
              </table:table-cell>
              <table:table-cell office:value-type="float" office:value="31.084693877551">
                <text:p>31.084693877551</text:p>
              </table:table-cell>
              <table:table-cell office:value-type="float" office:value="30.0952525252525">
                <text:p>30.0952525252525</text:p>
              </table:table-cell>
            </table:table-row>
            <table:table-row>
              <table:table-cell office:value-type="float" office:value="46116">
                <text:p>46116</text:p>
              </table:table-cell>
              <table:table-cell office:value-type="float" office:value="30.56">
                <text:p>30.56</text:p>
              </table:table-cell>
              <table:table-cell office:value-type="float" office:value="31.0632653061224">
                <text:p>31.0632653061224</text:p>
              </table:table-cell>
              <table:table-cell office:value-type="float" office:value="30.1245454545455">
                <text:p>30.1245454545455</text:p>
              </table:table-cell>
            </table:table-row>
            <table:table-row>
              <table:table-cell office:value-type="float" office:value="46117">
                <text:p>46117</text:p>
              </table:table-cell>
              <table:table-cell office:value-type="float" office:value="30.56">
                <text:p>30.56</text:p>
              </table:table-cell>
              <table:table-cell office:value-type="float" office:value="31.0418367346939">
                <text:p>31.0418367346939</text:p>
              </table:table-cell>
              <table:table-cell office:value-type="float" office:value="30.1540404040404">
                <text:p>30.1540404040404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30.64">
                <text:p>30.64</text:p>
              </table:table-cell>
              <table:table-cell office:value-type="float" office:value="31.0204081632653">
                <text:p>31.0204081632653</text:p>
              </table:table-cell>
              <table:table-cell office:value-type="float" office:value="30.1835353535354">
                <text:p>30.1835353535354</text:p>
              </table:table-cell>
            </table:table-row>
            <table:table-row>
              <table:table-cell office:value-type="float" office:value="46119">
                <text:p>46119</text:p>
              </table:table-cell>
              <table:table-cell office:value-type="float" office:value="30.56">
                <text:p>30.56</text:p>
              </table:table-cell>
              <table:table-cell office:value-type="float" office:value="31.000612244898">
                <text:p>31.000612244898</text:p>
              </table:table-cell>
              <table:table-cell office:value-type="float" office:value="30.2138383838384">
                <text:p>30.2138383838384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30.86">
                <text:p>30.86</text:p>
              </table:table-cell>
              <table:table-cell office:value-type="float" office:value="30.9830612244898">
                <text:p>30.9830612244898</text:p>
              </table:table-cell>
              <table:table-cell office:value-type="float" office:value="30.2435353535354">
                <text:p>30.2435353535354</text:p>
              </table:table-cell>
            </table:table-row>
            <table:table-row>
              <table:table-cell office:value-type="float" office:value="46121">
                <text:p>46121</text:p>
              </table:table-cell>
              <table:table-cell office:value-type="float" office:value="30.94">
                <text:p>30.94</text:p>
              </table:table-cell>
              <table:table-cell office:value-type="float" office:value="30.9687755102041">
                <text:p>30.9687755102041</text:p>
              </table:table-cell>
              <table:table-cell office:value-type="float" office:value="30.2761616161616">
                <text:p>30.2761616161616</text:p>
              </table:table-cell>
            </table:table-row>
            <table:table-row>
              <table:table-cell office:value-type="float" office:value="46122">
                <text:p>46122</text:p>
              </table:table-cell>
              <table:table-cell office:value-type="float" office:value="30.56">
                <text:p>30.56</text:p>
              </table:table-cell>
              <table:table-cell office:value-type="float" office:value="30.9559183673469">
                <text:p>30.9559183673469</text:p>
              </table:table-cell>
              <table:table-cell office:value-type="float" office:value="30.3116161616162">
                <text:p>30.3116161616162</text:p>
              </table:table-cell>
            </table:table-row>
            <table:table-row>
              <table:table-cell office:value-type="float" office:value="46123">
                <text:p>46123</text:p>
              </table:table-cell>
              <table:table-cell office:value-type="float" office:value="30.56">
                <text:p>30.56</text:p>
              </table:table-cell>
              <table:table-cell office:value-type="float" office:value="30.9344897959184">
                <text:p>30.9344897959184</text:p>
              </table:table-cell>
              <table:table-cell office:value-type="float" office:value="30.3432323232323">
                <text:p>30.3432323232323</text:p>
              </table:table-cell>
            </table:table-row>
            <table:table-row>
              <table:table-cell office:value-type="float" office:value="46124">
                <text:p>46124</text:p>
              </table:table-cell>
              <table:table-cell office:value-type="float" office:value="30.56">
                <text:p>30.56</text:p>
              </table:table-cell>
              <table:table-cell office:value-type="float" office:value="30.9130612244898">
                <text:p>30.9130612244898</text:p>
              </table:table-cell>
              <table:table-cell office:value-type="float" office:value="30.3718181818182">
                <text:p>30.3718181818182</text:p>
              </table:table-cell>
            </table:table-row>
            <table:table-row>
              <table:table-cell office:value-type="float" office:value="46125">
                <text:p>46125</text:p>
              </table:table-cell>
              <table:table-cell office:value-type="float" office:value="30.74">
                <text:p>30.74</text:p>
              </table:table-cell>
              <table:table-cell office:value-type="float" office:value="30.8916326530612">
                <text:p>30.8916326530612</text:p>
              </table:table-cell>
              <table:table-cell office:value-type="float" office:value="30.400404040404">
                <text:p>30.400404040404</text:p>
              </table:table-cell>
            </table:table-row>
            <table:table-row>
              <table:table-cell office:value-type="float" office:value="46126">
                <text:p>46126</text:p>
              </table:table-cell>
              <table:table-cell office:value-type="float" office:value="30.71">
                <text:p>30.71</text:p>
              </table:table-cell>
              <table:table-cell office:value-type="float" office:value="30.8755102040816">
                <text:p>30.8755102040816</text:p>
              </table:table-cell>
              <table:table-cell office:value-type="float" office:value="30.4308080808081">
                <text:p>30.4308080808081</text:p>
              </table:table-cell>
            </table:table-row>
            <table:table-row>
              <table:table-cell office:value-type="float" office:value="46127">
                <text:p>46127</text:p>
              </table:table-cell>
              <table:table-cell office:value-type="float" office:value="30.65">
                <text:p>30.65</text:p>
              </table:table-cell>
              <table:table-cell office:value-type="float" office:value="30.8565306122449">
                <text:p>30.8565306122449</text:p>
              </table:table-cell>
              <table:table-cell office:value-type="float" office:value="30.4590909090909">
                <text:p>30.4590909090909</text:p>
              </table:table-cell>
            </table:table-row>
            <table:table-row>
              <table:table-cell office:value-type="float" office:value="46128">
                <text:p>46128</text:p>
              </table:table-cell>
              <table:table-cell office:value-type="float" office:value="30.81">
                <text:p>30.81</text:p>
              </table:table-cell>
              <table:table-cell office:value-type="float" office:value="30.8389795918367">
                <text:p>30.8389795918367</text:p>
              </table:table-cell>
              <table:table-cell office:value-type="float" office:value="30.4849494949495">
                <text:p>30.4849494949495</text:p>
              </table:table-cell>
            </table:table-row>
            <table:table-row>
              <table:table-cell office:value-type="float" office:value="46129">
                <text:p>46129</text:p>
              </table:table-cell>
              <table:table-cell office:value-type="float" office:value="31.05">
                <text:p>31.05</text:p>
              </table:table-cell>
              <table:table-cell office:value-type="float" office:value="30.824693877551">
                <text:p>30.824693877551</text:p>
              </table:table-cell>
              <table:table-cell office:value-type="float" office:value="30.5143434343434">
                <text:p>30.5143434343434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31.05">
                <text:p>31.05</text:p>
              </table:table-cell>
              <table:table-cell office:value-type="float" office:value="30.81">
                <text:p>30.81</text:p>
              </table:table-cell>
              <table:table-cell office:value-type="float" office:value="30.5409090909091">
                <text:p>30.5409090909091</text:p>
              </table:table-cell>
            </table:table-row>
            <table:table-row>
              <table:table-cell office:value-type="float" office:value="46131">
                <text:p>46131</text:p>
              </table:table-cell>
              <table:table-cell office:value-type="float" office:value="31.05">
                <text:p>31.05</text:p>
              </table:table-cell>
              <table:table-cell office:value-type="float" office:value="30.795306122449">
                <text:p>30.795306122449</text:p>
              </table:table-cell>
              <table:table-cell office:value-type="float" office:value="30.5661616161616">
                <text:p>30.5661616161616</text:p>
              </table:table-cell>
            </table:table-row>
            <table:table-row>
              <table:table-cell office:value-type="float" office:value="46132">
                <text:p>46132</text:p>
              </table:table-cell>
              <table:table-cell office:value-type="float" office:value="31.03">
                <text:p>31.03</text:p>
              </table:table-cell>
              <table:table-cell office:value-type="float" office:value="30.780612244898">
                <text:p>30.780612244898</text:p>
              </table:table-cell>
              <table:table-cell office:value-type="float" office:value="30.5914141414141">
                <text:p>30.5914141414141</text:p>
              </table:table-cell>
            </table:table-row>
            <table:table-row>
              <table:table-cell office:value-type="float" office:value="46133">
                <text:p>46133</text:p>
              </table:table-cell>
              <table:table-cell office:value-type="float" office:value="30.98">
                <text:p>30.98</text:p>
              </table:table-cell>
              <table:table-cell office:value-type="float" office:value="30.7636734693878">
                <text:p>30.7636734693878</text:p>
              </table:table-cell>
              <table:table-cell office:value-type="float" office:value="30.6164646464647">
                <text:p>30.6164646464647</text:p>
              </table:table-cell>
            </table:table-row>
            <table:table-row>
              <table:table-cell office:value-type="float" office:value="46134">
                <text:p>46134</text:p>
              </table:table-cell>
              <table:table-cell office:value-type="float" office:value="31.01">
                <text:p>31.01</text:p>
              </table:table-cell>
              <table:table-cell office:value-type="float" office:value="30.7512244897959">
                <text:p>30.7512244897959</text:p>
              </table:table-cell>
              <table:table-cell office:value-type="float" office:value="30.6415151515152">
                <text:p>30.6415151515152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31.42">
                <text:p>31.42</text:p>
              </table:table-cell>
              <table:table-cell office:value-type="float" office:value="30.7404081632653">
                <text:p>30.7404081632653</text:p>
              </table:table-cell>
              <table:table-cell office:value-type="float" office:value="30.6656565656566">
                <text:p>30.6656565656566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31.2">
                <text:p>31.2</text:p>
              </table:table-cell>
              <table:table-cell office:value-type="float" office:value="30.7436734693878">
                <text:p>30.7436734693878</text:p>
              </table:table-cell>
              <table:table-cell office:value-type="float" office:value="30.689696969697">
                <text:p>30.689696969697</text:p>
              </table:table-cell>
            </table:table-row>
            <table:table-row>
              <table:table-cell office:value-type="float" office:value="46137">
                <text:p>46137</text:p>
              </table:table-cell>
              <table:table-cell office:value-type="float" office:value="31.2">
                <text:p>31.2</text:p>
              </table:table-cell>
              <table:table-cell office:value-type="float" office:value="30.7451020408163">
                <text:p>30.7451020408163</text:p>
              </table:table-cell>
              <table:table-cell office:value-type="float" office:value="30.7116161616162">
                <text:p>30.7116161616162</text:p>
              </table:table-cell>
            </table:table-row>
            <table:table-row>
              <table:table-cell office:value-type="float" office:value="46138">
                <text:p>46138</text:p>
              </table:table-cell>
              <table:table-cell office:value-type="float" office:value="31.2">
                <text:p>31.2</text:p>
              </table:table-cell>
              <table:table-cell office:value-type="float" office:value="30.7465306122449">
                <text:p>30.7465306122449</text:p>
              </table:table-cell>
              <table:table-cell office:value-type="float" office:value="30.7348484848485">
                <text:p>30.7348484848485</text:p>
              </table:table-cell>
            </table:table-row>
            <table:table-row>
              <table:table-cell office:value-type="float" office:value="46139">
                <text:p>46139</text:p>
              </table:table-cell>
              <table:table-cell office:value-type="float" office:value="31.13">
                <text:p>31.13</text:p>
              </table:table-cell>
              <table:table-cell office:value-type="float" office:value="30.7479591836735">
                <text:p>30.7479591836735</text:p>
              </table:table-cell>
              <table:table-cell office:value-type="float" office:value="30.7580808080808">
                <text:p>30.7580808080808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31.31">
                <text:p>31.31</text:p>
              </table:table-cell>
              <table:table-cell office:value-type="float" office:value="30.7502040816327">
                <text:p>30.7502040816327</text:p>
              </table:table-cell>
              <table:table-cell office:value-type="float" office:value="30.7806060606061">
                <text:p>30.7806060606061</text:p>
              </table:table-cell>
            </table:table-row>
            <table:table-row>
              <table:table-cell office:value-type="float" office:value="46141">
                <text:p>46141</text:p>
              </table:table-cell>
              <table:table-cell office:value-type="float" office:value="31.45">
                <text:p>31.45</text:p>
              </table:table-cell>
              <table:table-cell office:value-type="float" office:value="30.7585714285714">
                <text:p>30.7585714285714</text:p>
              </table:table-cell>
              <table:table-cell office:value-type="float" office:value="30.8049494949495">
                <text:p>30.8049494949495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32.07">
                <text:p>32.07</text:p>
              </table:table-cell>
              <table:table-cell office:value-type="float" office:value="30.7677551020408">
                <text:p>30.7677551020408</text:p>
              </table:table-cell>
              <table:table-cell office:value-type="float" office:value="30.8327272727273">
                <text:p>30.8327272727273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31.86">
                <text:p>31.86</text:p>
              </table:table-cell>
              <table:table-cell office:value-type="float" office:value="30.7932653061224">
                <text:p>30.7932653061224</text:p>
              </table:table-cell>
              <table:table-cell office:value-type="float" office:value="30.8622222222222">
                <text:p>30.8622222222222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31.86">
                <text:p>31.86</text:p>
              </table:table-cell>
              <table:table-cell office:value-type="float" office:value="30.8148979591837">
                <text:p>30.8148979591837</text:p>
              </table:table-cell>
              <table:table-cell office:value-type="float" office:value="30.8893939393939">
                <text:p>30.8893939393939</text:p>
              </table:table-cell>
            </table:table-row>
            <table:table-row>
              <table:table-cell office:value-type="float" office:value="46145">
                <text:p>46145</text:p>
              </table:table-cell>
              <table:table-cell office:value-type="float" office:value="31.86">
                <text:p>31.86</text:p>
              </table:table-cell>
              <table:table-cell office:value-type="float" office:value="30.8365306122449">
                <text:p>30.8365306122449</text:p>
              </table:table-cell>
              <table:table-cell office:value-type="float" office:value="30.9168686868687">
                <text:p>30.9168686868687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31.52">
                <text:p>31.52</text:p>
              </table:table-cell>
              <table:table-cell office:value-type="float" office:value="30.8581632653061">
                <text:p>30.8581632653061</text:p>
              </table:table-cell>
              <table:table-cell office:value-type="float" office:value="30.9443434343434">
                <text:p>30.9443434343434</text:p>
              </table:table-cell>
            </table:table-row>
            <table:table-row>
              <table:table-cell office:value-type="float" office:value="46147">
                <text:p>46147</text:p>
              </table:table-cell>
              <table:table-cell office:value-type="float" office:value="31.69">
                <text:p>31.69</text:p>
              </table:table-cell>
              <table:table-cell office:value-type="float" office:value="30.8714285714286">
                <text:p>30.8714285714286</text:p>
              </table:table-cell>
              <table:table-cell office:value-type="float" office:value="30.9683838383838">
                <text:p>30.9683838383838</text:p>
              </table:table-cell>
            </table:table-row>
            <table:table-row>
              <table:table-cell office:value-type="float" office:value="46148">
                <text:p>46148</text:p>
              </table:table-cell>
              <table:table-cell office:value-type="float" office:value="31.66">
                <text:p>31.66</text:p>
              </table:table-cell>
              <table:table-cell office:value-type="float" office:value="30.8865306122449">
                <text:p>30.8865306122449</text:p>
              </table:table-cell>
              <table:table-cell office:value-type="float" office:value="30.9937373737374">
                <text:p>30.9937373737374</text:p>
              </table:table-cell>
            </table:table-row>
            <table:table-row>
              <table:table-cell office:value-type="float" office:value="46149">
                <text:p>46149</text:p>
              </table:table-cell>
              <table:table-cell office:value-type="float" office:value="31.54">
                <text:p>31.54</text:p>
              </table:table-cell>
              <table:table-cell office:value-type="float" office:value="30.9085714285714">
                <text:p>30.9085714285714</text:p>
              </table:table-cell>
              <table:table-cell office:value-type="float" office:value="31.0168686868687">
                <text:p>31.0168686868687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31.62">
                <text:p>31.62</text:p>
              </table:table-cell>
              <table:table-cell office:value-type="float" office:value="30.9279591836735">
                <text:p>30.9279591836735</text:p>
              </table:table-cell>
              <table:table-cell office:value-type="float" office:value="31.0394949494949">
                <text:p>31.0394949494949</text:p>
              </table:table-cell>
            </table:table-row>
            <table:table-row>
              <table:table-cell office:value-type="float" office:value="46151">
                <text:p>46151</text:p>
              </table:table-cell>
              <table:table-cell office:value-type="float" office:value="31.62">
                <text:p>31.62</text:p>
              </table:table-cell>
              <table:table-cell office:value-type="float" office:value="30.9530612244898">
                <text:p>30.9530612244898</text:p>
              </table:table-cell>
              <table:table-cell office:value-type="float" office:value="31.0622222222222">
                <text:p>31.0622222222222</text:p>
              </table:table-cell>
            </table:table-row>
            <table:table-row>
              <table:table-cell office:value-type="float" office:value="46152">
                <text:p>46152</text:p>
              </table:table-cell>
              <table:table-cell office:value-type="float" office:value="31.62">
                <text:p>31.62</text:p>
              </table:table-cell>
              <table:table-cell office:value-type="float" office:value="30.9781632653061">
                <text:p>30.9781632653061</text:p>
              </table:table-cell>
              <table:table-cell office:value-type="float" office:value="31.080404040404">
                <text:p>31.080404040404</text:p>
              </table:table-cell>
            </table:table-row>
            <table:table-row>
              <table:table-cell office:value-type="float" office:value="46153">
                <text:p>46153</text:p>
              </table:table-cell>
              <table:table-cell office:value-type="float" office:value="31.75">
                <text:p>31.75</text:p>
              </table:table-cell>
              <table:table-cell office:value-type="float" office:value="31.0032653061225">
                <text:p>31.0032653061225</text:p>
              </table:table-cell>
              <table:table-cell office:value-type="float" office:value="31.0985858585859">
                <text:p>31.0985858585859</text:p>
              </table:table-cell>
            </table:table-row>
            <table:table-row>
              <table:table-cell office:value-type="float" office:value="46154">
                <text:p>46154</text:p>
              </table:table-cell>
              <table:table-cell office:value-type="float" office:value="31.76">
                <text:p>31.76</text:p>
              </table:table-cell>
              <table:table-cell office:value-type="float" office:value="31.0279591836735">
                <text:p>31.0279591836735</text:p>
              </table:table-cell>
              <table:table-cell office:value-type="float" office:value="31.1180808080808">
                <text:p>31.1180808080808</text:p>
              </table:table-cell>
            </table:table-row>
            <table:table-row>
              <table:table-cell office:value-type="float" office:value="46155">
                <text:p>46155</text:p>
              </table:table-cell>
              <table:table-cell office:value-type="float" office:value="31.75">
                <text:p>31.75</text:p>
              </table:table-cell>
              <table:table-cell office:value-type="float" office:value="31.0508163265306">
                <text:p>31.0508163265306</text:p>
              </table:table-cell>
              <table:table-cell office:value-type="float" office:value="31.1358585858586">
                <text:p>31.1358585858586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31.8">
                <text:p>31.8</text:p>
              </table:table-cell>
              <table:table-cell office:value-type="float" office:value="31.0755102040816">
                <text:p>31.0755102040816</text:p>
              </table:table-cell>
              <table:table-cell office:value-type="float" office:value="31.1484848484848">
                <text:p>31.1484848484848</text:p>
              </table:table-cell>
            </table:table-row>
            <table:table-row>
              <table:table-cell office:value-type="float" office:value="46157">
                <text:p>46157</text:p>
              </table:table-cell>
              <table:table-cell office:value-type="float" office:value="31.72">
                <text:p>31.72</text:p>
              </table:table-cell>
              <table:table-cell office:value-type="float" office:value="31.0995918367347">
                <text:p>31.0995918367347</text:p>
              </table:table-cell>
              <table:table-cell office:value-type="float" office:value="31.1564646464646">
                <text:p>31.1564646464646</text:p>
              </table:table-cell>
            </table:table-row>
            <table:table-row>
              <table:table-cell office:value-type="float" office:value="46158">
                <text:p>46158</text:p>
              </table:table-cell>
              <table:table-cell office:value-type="float" office:value="31.72">
                <text:p>31.72</text:p>
              </table:table-cell>
              <table:table-cell office:value-type="float" office:value="31.1257142857143">
                <text:p>31.1257142857143</text:p>
              </table:table-cell>
              <table:table-cell office:value-type="float" office:value="31.1640404040404">
                <text:p>31.1640404040404</text:p>
              </table:table-cell>
            </table:table-row>
            <table:table-row>
              <table:table-cell office:value-type="float" office:value="46159">
                <text:p>46159</text:p>
              </table:table-cell>
              <table:table-cell office:value-type="float" office:value="31.72">
                <text:p>31.72</text:p>
              </table:table-cell>
              <table:table-cell office:value-type="float" office:value="31.1518367346939">
                <text:p>31.1518367346939</text:p>
              </table:table-cell>
              <table:table-cell office:value-type="float" office:value="31.1665656565657">
                <text:p>31.1665656565657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32.04">
                <text:p>32.04</text:p>
              </table:table-cell>
              <table:table-cell office:value-type="float" office:value="31.1779591836735">
                <text:p>31.1779591836735</text:p>
              </table:table-cell>
              <table:table-cell office:value-type="float" office:value="31.1690909090909">
                <text:p>31.1690909090909</text:p>
              </table:table-cell>
            </table:table-row>
            <table:table-row>
              <table:table-cell office:value-type="float" office:value="46161">
                <text:p>46161</text:p>
              </table:table-cell>
              <table:table-cell office:value-type="float" office:value="32.1">
                <text:p>32.1</text:p>
              </table:table-cell>
              <table:table-cell office:value-type="float" office:value="31.2097959183673">
                <text:p>31.2097959183673</text:p>
              </table:table-cell>
              <table:table-cell office:value-type="float" office:value="31.1748484848485">
                <text:p>31.1748484848485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32.12">
                <text:p>32.12</text:p>
              </table:table-cell>
              <table:table-cell office:value-type="float" office:value="31.2387755102041">
                <text:p>31.2387755102041</text:p>
              </table:table-cell>
              <table:table-cell office:value-type="float" office:value="31.1824242424242">
                <text:p>31.1824242424242</text:p>
              </table:table-cell>
            </table:table-row>
            <table:table-row>
              <table:table-cell office:value-type="float" office:value="46163">
                <text:p>46163</text:p>
              </table:table-cell>
              <table:table-cell office:value-type="float" office:value="32.25">
                <text:p>32.25</text:p>
              </table:table-cell>
              <table:table-cell office:value-type="float" office:value="31.2716326530612">
                <text:p>31.2716326530612</text:p>
              </table:table-cell>
              <table:table-cell office:value-type="float" office:value="31.1907070707071">
                <text:p>31.1907070707071</text:p>
              </table:table-cell>
            </table:table-row>
            <table:table-row>
              <table:table-cell office:value-type="float" office:value="46164">
                <text:p>46164</text:p>
              </table:table-cell>
              <table:table-cell office:value-type="float" office:value="32.83">
                <text:p>32.83</text:p>
              </table:table-cell>
              <table:table-cell office:value-type="float" office:value="31.3061224489796">
                <text:p>31.3061224489796</text:p>
              </table:table-cell>
              <table:table-cell office:value-type="float" office:value="31.1968686868687">
                <text:p>31.1968686868687</text:p>
              </table:table-cell>
            </table:table-row>
            <table:table-row>
              <table:table-cell office:value-type="float" office:value="46165">
                <text:p>46165</text:p>
              </table:table-cell>
              <table:table-cell office:value-type="float" office:value="32.83">
                <text:p>32.83</text:p>
              </table:table-cell>
              <table:table-cell office:value-type="float" office:value="31.3524489795918">
                <text:p>31.3524489795918</text:p>
              </table:table-cell>
              <table:table-cell office:value-type="float" office:value="31.2119191919192">
                <text:p>31.2119191919192</text:p>
              </table:table-cell>
            </table:table-row>
            <table:table-row>
              <table:table-cell office:value-type="float" office:value="46166">
                <text:p>46166</text:p>
              </table:table-cell>
              <table:table-cell office:value-type="float" office:value="32.83">
                <text:p>32.83</text:p>
              </table:table-cell>
              <table:table-cell office:value-type="float" office:value="31.3987755102041">
                <text:p>31.3987755102041</text:p>
              </table:table-cell>
              <table:table-cell office:value-type="float" office:value="31.2242424242424">
                <text:p>31.2242424242424</text:p>
              </table:table-cell>
            </table:table-row>
            <table:table-row>
              <table:table-cell office:value-type="float" office:value="46167">
                <text:p>46167</text:p>
              </table:table-cell>
              <table:table-cell office:value-type="float" office:value="32.83">
                <text:p>32.83</text:p>
              </table:table-cell>
              <table:table-cell office:value-type="float" office:value="31.4451020408163">
                <text:p>31.4451020408163</text:p>
              </table:table-cell>
              <table:table-cell office:value-type="float" office:value="31.2365656565657">
                <text:p>31.2365656565657</text:p>
              </table:table-cell>
            </table:table-row>
            <table:table-row>
              <table:table-cell office:value-type="float" office:value="46168">
                <text:p>46168</text:p>
              </table:table-cell>
              <table:table-cell office:value-type="float" office:value="32.67">
                <text:p>32.67</text:p>
              </table:table-cell>
              <table:table-cell office:value-type="float" office:value="31.4897959183673">
                <text:p>31.4897959183673</text:p>
              </table:table-cell>
              <table:table-cell office:value-type="float" office:value="31.2488888888889">
                <text:p>31.2488888888889</text:p>
              </table:table-cell>
            </table:table-row>
            <table:table-row>
              <table:table-cell office:value-type="float" office:value="46169">
                <text:p>46169</text:p>
              </table:table-cell>
              <table:table-cell office:value-type="float" office:value="32.55">
                <text:p>32.55</text:p>
              </table:table-cell>
              <table:table-cell office:value-type="float" office:value="31.5328571428571">
                <text:p>31.5328571428571</text:p>
              </table:table-cell>
              <table:table-cell office:value-type="float" office:value="31.259595959596">
                <text:p>31.259595959596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32.63">
                <text:p>32.63</text:p>
              </table:table-cell>
              <table:table-cell office:value-type="float" office:value="31.5673469387755">
                <text:p>31.5673469387755</text:p>
              </table:table-cell>
              <table:table-cell office:value-type="float" office:value="31.2710101010101">
                <text:p>31.2710101010101</text:p>
              </table:table-cell>
            </table:table-row>
            <table:table-row>
              <table:table-cell office:value-type="float" office:value="46171">
                <text:p>46171</text:p>
              </table:table-cell>
              <table:table-cell office:value-type="float" office:value="32.5">
                <text:p>32.5</text:p>
              </table:table-cell>
              <table:table-cell office:value-type="float" office:value="31.6018367346939">
                <text:p>31.6018367346939</text:p>
              </table:table-cell>
              <table:table-cell office:value-type="float" office:value="31.2818181818182">
                <text:p>31.2818181818182</text:p>
              </table:table-cell>
            </table:table-row>
            <table:table-row>
              <table:table-cell office:value-type="float" office:value="46172">
                <text:p>46172</text:p>
              </table:table-cell>
              <table:table-cell office:value-type="float" office:value="32.5">
                <text:p>32.5</text:p>
              </table:table-cell>
              <table:table-cell office:value-type="float" office:value="31.6414285714286">
                <text:p>31.6414285714286</text:p>
              </table:table-cell>
              <table:table-cell office:value-type="float" office:value="31.2912121212121">
                <text:p>31.2912121212121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32.5">
                <text:p>32.5</text:p>
              </table:table-cell>
              <table:table-cell office:value-type="float" office:value="31.6810204081633">
                <text:p>31.6810204081633</text:p>
              </table:table-cell>
              <table:table-cell office:value-type="float" office:value="31.300202020202">
                <text:p>31.300202020202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32.18">
                <text:p>32.18</text:p>
              </table:table-cell>
              <table:table-cell office:value-type="float" office:value="31.720612244898">
                <text:p>31.720612244898</text:p>
              </table:table-cell>
              <table:table-cell office:value-type="float" office:value="31.3091919191919">
                <text:p>31.3091919191919</text:p>
              </table:table-cell>
            </table:table-row>
            <table:table-row>
              <table:table-cell office:value-type="float" office:value="46175">
                <text:p>46175</text:p>
              </table:table-cell>
              <table:table-cell office:value-type="float" office:value="32.37">
                <text:p>32.37</text:p>
              </table:table-cell>
              <table:table-cell office:value-type="float" office:value="31.75">
                <text:p>31.75</text:p>
              </table:table-cell>
              <table:table-cell office:value-type="float" office:value="31.3149494949495">
                <text:p>31.3149494949495</text:p>
              </table:table-cell>
            </table:table-row>
            <table:table-row>
              <table:table-cell office:value-type="float" office:value="46176">
                <text:p>46176</text:p>
              </table:table-cell>
              <table:table-cell office:value-type="float" office:value="32.37">
                <text:p>32.37</text:p>
              </table:table-cell>
              <table:table-cell office:value-type="float" office:value="31.7838775510204">
                <text:p>31.7838775510204</text:p>
              </table:table-cell>
              <table:table-cell office:value-type="float" office:value="31.3234343434343">
                <text:p>31.3234343434343</text:p>
              </table:table-cell>
            </table:table-row>
            <table:table-row>
              <table:table-cell office:value-type="float" office:value="46177">
                <text:p>46177</text:p>
              </table:table-cell>
              <table:table-cell office:value-type="float" office:value="32.59">
                <text:p>32.59</text:p>
              </table:table-cell>
              <table:table-cell office:value-type="float" office:value="31.8189795918367">
                <text:p>31.8189795918367</text:p>
              </table:table-cell>
              <table:table-cell office:value-type="float" office:value="31.3308080808081">
                <text:p>31.3308080808081</text:p>
              </table:table-cell>
            </table:table-row>
            <table:table-row>
              <table:table-cell office:value-type="float" office:value="46178">
                <text:p>46178</text:p>
              </table:table-cell>
              <table:table-cell office:value-type="float" office:value="32.3">
                <text:p>32.3</text:p>
              </table:table-cell>
              <table:table-cell office:value-type="float" office:value="31.855306122449">
                <text:p>31.855306122449</text:p>
              </table:table-cell>
              <table:table-cell office:value-type="float" office:value="31.3417171717172">
                <text:p>31.3417171717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